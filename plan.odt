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7cdf" officeooo:paragraph-rsid="00097cdf"/>
    </style:style>
    <style:style style:name="P2" style:family="paragraph" style:parent-style-name="Standard">
      <style:paragraph-properties fo:text-align="start" style:justify-single-word="false"/>
      <style:text-properties officeooo:rsid="00097cdf" officeooo:paragraph-rsid="00097cdf"/>
    </style:style>
    <style:style style:name="P3" style:family="paragraph" style:parent-style-name="Standard">
      <style:paragraph-properties fo:text-align="start" style:justify-single-word="false"/>
      <style:text-properties officeooo:rsid="000a1fc5" officeooo:paragraph-rsid="000a1fc5"/>
    </style:style>
    <style:style style:name="P4" style:family="paragraph" style:parent-style-name="Standard">
      <style:paragraph-properties fo:text-align="start" style:justify-single-word="false"/>
      <style:text-properties officeooo:rsid="000ae2da" officeooo:paragraph-rsid="000ae2da"/>
    </style:style>
    <style:style style:name="P5" style:family="paragraph" style:parent-style-name="Standard">
      <style:paragraph-properties fo:text-align="start" style:justify-single-word="false"/>
      <style:text-properties officeooo:rsid="000ae2da" officeooo:paragraph-rsid="000ae2da"/>
    </style:style>
    <style:style style:name="P6" style:family="paragraph" style:parent-style-name="Standard">
      <style:paragraph-properties fo:text-align="start" style:justify-single-word="false"/>
      <style:text-properties officeooo:rsid="000c66fc" officeooo:paragraph-rsid="000c66fc"/>
    </style:style>
    <style:style style:name="P7" style:family="paragraph" style:parent-style-name="Standard">
      <style:paragraph-properties fo:text-align="start" style:justify-single-word="false"/>
      <style:text-properties officeooo:rsid="00097cdf" officeooo:paragraph-rsid="000dfd19"/>
    </style:style>
    <style:style style:name="P8" style:family="paragraph" style:parent-style-name="Standard">
      <style:paragraph-properties fo:text-align="start" style:justify-single-word="false"/>
      <style:text-properties officeooo:rsid="00097cdf" officeooo:paragraph-rsid="00097cdf"/>
    </style:style>
    <style:style style:name="P9" style:family="paragraph" style:parent-style-name="Standard">
      <style:paragraph-properties fo:text-align="start" style:justify-single-word="false"/>
      <style:text-properties officeooo:rsid="000a1fc5" officeooo:paragraph-rsid="000a1fc5"/>
    </style:style>
    <style:style style:name="P10" style:family="paragraph" style:parent-style-name="Standard">
      <style:paragraph-properties fo:text-align="start" style:justify-single-word="false"/>
      <style:text-properties officeooo:rsid="0011c79f" officeooo:paragraph-rsid="0011c79f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97cdf" officeooo:paragraph-rsid="00097cd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a1fc5" officeooo:paragraph-rsid="000a1fc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590e1" officeooo:paragraph-rsid="001590e1"/>
    </style:style>
    <style:style style:name="P14" style:family="paragraph" style:parent-style-name="Standard">
      <style:paragraph-properties fo:text-align="start" style:justify-single-word="false"/>
      <style:text-properties officeooo:rsid="00184e13" officeooo:paragraph-rsid="00184e13"/>
    </style:style>
    <style:style style:name="P15" style:family="paragraph" style:parent-style-name="Standard">
      <style:paragraph-properties fo:text-align="start" style:justify-single-word="false"/>
      <style:text-properties officeooo:rsid="001f94e7" officeooo:paragraph-rsid="001f94e7"/>
    </style:style>
    <style:style style:name="P16" style:family="paragraph" style:parent-style-name="Standard">
      <style:paragraph-properties fo:text-align="start" style:justify-single-word="false"/>
      <style:text-properties officeooo:rsid="00219f98" officeooo:paragraph-rsid="002324fb"/>
    </style:style>
    <style:style style:name="P17" style:family="paragraph" style:parent-style-name="Standard">
      <style:paragraph-properties fo:text-align="start" style:justify-single-word="false"/>
      <style:text-properties officeooo:rsid="00242e03" officeooo:paragraph-rsid="00242e03"/>
    </style:style>
    <style:style style:name="P18" style:family="paragraph" style:parent-style-name="Standard">
      <style:paragraph-properties fo:text-align="start" style:justify-single-word="false"/>
      <style:text-properties officeooo:rsid="00242e03" officeooo:paragraph-rsid="00250d16"/>
    </style:style>
    <style:style style:name="P19" style:family="paragraph" style:parent-style-name="Standard">
      <style:paragraph-properties fo:text-align="start" style:justify-single-word="false"/>
      <style:text-properties officeooo:rsid="00250d16" officeooo:paragraph-rsid="00250d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0e1" style:font-weight-asian="bold" style:font-weight-complex="bold"/>
    </style:style>
    <style:style style:name="T3" style:family="text">
      <style:text-properties officeooo:rsid="000ae2da"/>
    </style:style>
    <style:style style:name="T4" style:family="text">
      <style:text-properties officeooo:rsid="000dfd19"/>
    </style:style>
    <style:style style:name="T5" style:family="text">
      <style:text-properties officeooo:rsid="000e3eea"/>
    </style:style>
    <style:style style:name="T6" style:family="text">
      <style:text-properties officeooo:rsid="001039ea"/>
    </style:style>
    <style:style style:name="T7" style:family="text">
      <style:text-properties officeooo:rsid="0011c79f"/>
    </style:style>
    <style:style style:name="T8" style:family="text">
      <style:text-properties officeooo:rsid="0013a9b7"/>
    </style:style>
    <style:style style:name="T9" style:family="text">
      <style:text-properties officeooo:rsid="001590e1"/>
    </style:style>
    <style:style style:name="T10" style:family="text">
      <style:text-properties officeooo:rsid="001617a6"/>
    </style:style>
    <style:style style:name="T11" style:family="text">
      <style:text-properties officeooo:rsid="0017aa99"/>
    </style:style>
    <style:style style:name="T12" style:family="text">
      <style:text-properties officeooo:rsid="00190862"/>
    </style:style>
    <style:style style:name="T13" style:family="text">
      <style:text-properties officeooo:rsid="0019f164"/>
    </style:style>
    <style:style style:name="T14" style:family="text">
      <style:text-properties officeooo:rsid="001b04aa"/>
    </style:style>
    <style:style style:name="T15" style:family="text">
      <style:text-properties officeooo:rsid="001bd26b"/>
    </style:style>
    <style:style style:name="T16" style:family="text">
      <style:text-properties officeooo:rsid="001da720"/>
    </style:style>
    <style:style style:name="T17" style:family="text">
      <style:text-properties officeooo:rsid="002123f6"/>
    </style:style>
    <style:style style:name="T18" style:family="text">
      <style:text-properties officeooo:rsid="002324fb"/>
    </style:style>
    <style:style style:name="T19" style:family="text">
      <style:text-properties officeooo:rsid="00242e03"/>
    </style:style>
    <style:style style:name="T20" style:family="text">
      <style:text-properties officeooo:rsid="00250d16"/>
    </style:style>
    <style:style style:name="T21" style:family="text">
      <style:text-properties officeooo:rsid="00254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dée de plan</text:span> </text:p>
      <text:p text:style-name="P1"/>
      <text:p text:style-name="P4">Problématique ? </text:p>
      <text:p text:style-name="P4"/>
      <text:p text:style-name="P4">Dans quelle mesure l’indexation et l’analyse automatique des archives audiovisuelles répond elle-aux besoin d’indexation spécifiques aux archives audiovisuelles ?</text:p>
      <text:p text:style-name="P6">Comment construire un outil d’indexation des archives audiovisuelles à la fois performant et qui répond aux normes de gestion des collections audiovisuelles ? (cf FRBR)</text:p>
      <text:p text:style-name="P6"/>
      <text:p text:style-name="P13">Intro : </text:p>
      <text:p text:style-name="P13">contexte du mémoire : stage</text:p>
      <text:p text:style-name="P13">archives audiovisuelles : intérêt perso + définitions</text:p>
      <text:p text:style-name="P13">spécificités des archives audiovisuelles appliquées à l’IA </text:p>
      <text:p text:style-name="P2"/>
      <text:p text:style-name="P11">I- <text:span text:style-name="T8">L</text:span>’indexation automatique des archives audiovisuelles</text:p>
      <text:p text:style-name="P2"/>
      <text:p text:style-name="P7">1) <text:span text:style-name="T4">Skinsoft <text:s/></text:span><text:span text:style-name="T5">+ tension privé/public </text:span><text:span text:style-name="T7">(répondre aux beosins) : </text:span><text:span text:style-name="T19">est ce que l’IA est attendue côté client</text:span></text:p>
      <text:p text:style-name="P18">le besoin existe : albert kahn a déjà manuellement dans sa bdd ce que l’ia prévoie de faire automatiquement. </text:p>
      <text:p text:style-name="P18"/>
      <text:p text:style-name="P7"><text:span text:style-name="T4">2) </text:span><text:span text:style-name="T6">S</text:span>pécificités des archives audiovisuelles <text:span text:style-name="T6">et l’espace de travail S-movies (FRBR) : </text:span><text:span text:style-name="T13">indexer les archives audiovisuelles (sans l’IA)</text:span></text:p>
      <text:p text:style-name="P15">hiérarchie FRBR complexe et non intuitive <text:span text:style-name="T17">(problèmes UX : occupe bcp skinsoft dans les projets actuels)</text:span></text:p>
      <text:p text:style-name="P15"/>
      <text:p text:style-name="P2"><text:span text:style-name="T6">3</text:span>) <text:span text:style-name="T7">Combiner attentes et spécifités : projet IA </text:span><text:span text:style-name="T10">(pouvoir appliquer l’IA aux normes et règles de catalogage de collections spécifiques). </text:span><text:span text:style-name="T11">Faire de l’IA un facilitauer et une force de proposition</text:span></text:p>
      <text:p text:style-name="P19">lien entre contraintes et spécifications</text:p>
      <text:p text:style-name="P2"/>
      <text:p text:style-name="P3"><text:span text:style-name="T1">II- </text:span><text:span text:style-name="T2">Spécifications fonctionnelles d’indexation automatique des archives audiovisuelles par IA</text:span><text:span text:style-name="T9"> </text:span>Analyser et indexer automatiquement <text:span text:style-name="T4">(fonctionnalités audiovisuelles basées sur l’IA à mettre en place)</text:span></text:p>
      <text:p text:style-name="P17"/>
      <text:p text:style-name="P3"/>
      <text:p text:style-name="P3">1) <text:span text:style-name="T12">Analyse d’objets, transcription audio, reconnaissance vocale</text:span></text:p>
      <text:p text:style-name="P3">2) <text:span text:style-name="T12">S</text:span>egmentation temporelle : définition et cas d’usages <text:span text:style-name="T12">(appui sur données d’entraînement)</text:span></text:p>
      <text:p text:style-name="P3">3) <text:span text:style-name="T12">Pipeline à mettre en place </text:span><text:span text:style-name="T13">(combinaison d’outils) </text:span><text:span text:style-name="T12">et </text:span><text:span text:style-name="T13">lien avec les normes en place : FRBR. La mise en place suppose de repenser le FRBR </text:span><text:span text:style-name="T14">(si les niveaux du FRBR sont confusants pour l’utilisateur, ils le seront encore plus pour un algorithme). </text:span><text:span text:style-name="T15">Les données extraites de l’item numérique/média doivent pouvoir remonter vers l’oeuvre et/ou vers la manifestation. </text:span><text:span text:style-name="T16">Reversement des métadonnées</text:span></text:p>
      <text:p text:style-name="P15">La refonte de la navigation entre les niveaux du FRBR est à proposer dans la pipeline </text:p>
      <text:p text:style-name="P16">4) quel résultat va à quel niveau du FRBR ? Segmentation : manifestation/item, econnaissance d’objets et de personnes : manifestation/oeuvre. <text:span text:style-name="T18">Contenu : oeuvre, technique : manifestation. Mais l’analyse se fait au niveau de l’item : image/média. </text:span></text:p>
      <text:p text:style-name="P16"><text:span text:style-name="T4">4) faire circuler les métadonnées enrichies engtre les niveaux du WEMI (partie sous jacentes aux autres) </text:span></text:p>
      <text:p text:style-name="P3"/>
      <text:p text:style-name="P12">III- <text:span text:style-name="T12">B</text:span>iais et enjeux </text:p>
      <text:p text:style-name="P3"/>
      <text:p text:style-name="P3">1) données d’entraînement inadaptées : <text:span text:style-name="T20">représentativité et disponibilité </text:span></text:p>
      <text:p text:style-name="P4">2) biais de la computer vision : <text:span text:style-name="T20">conséquence des données d’entraînement </text:span></text:p>
      <text:p text:style-name="P3"><text:soft-page-break/><text:span text:style-name="T3">3</text:span>) archiviste comme correcteur et annotateur : interactivité plutot que automatisation <text:span text:style-name="T12">(mettre en place une plateforme où l’utilisateur peut décider des données à conserver)</text:span></text:p>
      <text:p text:style-name="P14">4) accessibilité (UNESCO?) : <text:span text:style-name="T21">ce que l’indexation automatique peut rendre possible </text:span></text:p>
      <text:p text:style-name="P3"/>
      <text:p text:style-name="P3"/>
      <text:p text:style-name="P10">NB : la question des données d’entraînement : doit apparaitre dans la partie 2 mais aussi comme limite dans la partie 3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07:00:01.248586223</meta:creation-date>
    <dc:date>2026-06-27T09:55:28.175009141</dc:date>
    <meta:editing-duration>PT45M31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2" meta:paragraph-count="28" meta:word-count="432" meta:character-count="2952" meta:non-whitespace-character-count="2534"/>
  </office:meta>
</office:document-meta>
</file>