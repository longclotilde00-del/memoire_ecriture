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4.6689in"/>
    </style:style>
    <style:style style:name="co3" style:family="table-column">
      <style:table-column-properties fo:break-before="auto" style:column-width="1.2555in"/>
    </style:style>
    <style:style style:name="co4" style:family="table-column">
      <style:table-column-properties fo:break-before="auto" style:column-width="0.8035in"/>
    </style:style>
    <style:style style:name="co5" style:family="table-column">
      <style:table-column-properties fo:break-before="auto" style:column-width="10.3516in"/>
    </style:style>
    <style:style style:name="co6" style:family="table-column">
      <style:table-column-properties fo:break-before="auto" style:column-width="3.8543in"/>
    </style:style>
    <style:style style:name="co7" style:family="table-column">
      <style:table-column-properties fo:break-before="auto" style:column-width="16.3083in"/>
    </style:style>
    <style:style style:name="co8" style:family="table-column">
      <style:table-column-properties fo:break-before="auto" style:column-width="5.7929in"/>
    </style:style>
    <style:style style:name="co9" style:family="table-column">
      <style:table-column-properties fo:break-before="auto" style:column-width="1.3984in"/>
    </style:style>
    <style:style style:name="co10" style:family="table-column">
      <style:table-column-properties fo:break-before="auto" style:column-width="1.8165in"/>
    </style:style>
    <style:style style:name="co11" style:family="table-column">
      <style:table-column-properties fo:break-before="auto" style:column-width="4.998in"/>
    </style:style>
    <style:style style:name="co12" style:family="table-column">
      <style:table-column-properties fo:break-before="auto" style:column-width="1.2335in"/>
    </style:style>
    <style:style style:name="co13" style:family="table-column">
      <style:table-column-properties fo:break-before="auto" style:column-width="1.1783in"/>
    </style:style>
    <style:style style:name="co14" style:family="table-column">
      <style:table-column-properties fo:break-before="auto" style:column-width="4.9555in"/>
    </style:style>
    <style:style style:name="co15" style:family="table-column">
      <style:table-column-properties fo:break-before="auto" style:column-width="10.2409in"/>
    </style:style>
    <style:style style:name="co16" style:family="table-column">
      <style:table-column-properties fo:break-before="auto" style:column-width="4.6862in"/>
    </style:style>
    <style:style style:name="co17" style:family="table-column">
      <style:table-column-properties fo:break-before="auto" style:column-width="0.922in"/>
    </style:style>
    <style:style style:name="co18" style:family="table-column">
      <style:table-column-properties fo:break-before="auto" style:column-width="0.6736in"/>
    </style:style>
    <style:style style:name="co19" style:family="table-column">
      <style:table-column-properties fo:break-before="auto" style:column-width="5.0827in"/>
    </style:style>
    <style:style style:name="co20" style:family="table-column">
      <style:table-column-properties fo:break-before="auto" style:column-width="7.5382in"/>
    </style:style>
    <style:style style:name="co21" style:family="table-column">
      <style:table-column-properties fo:break-before="auto" style:column-width="0.6382in"/>
    </style:style>
    <style:style style:name="co22" style:family="table-column">
      <style:table-column-properties fo:break-before="auto" style:column-width="1.2937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2.2591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2.0728in" fo:break-before="auto" style:use-optimal-row-height="true"/>
    </style:style>
    <style:style style:name="ro16" style:family="table-row">
      <style:table-row-properties style:row-height="0.578in" fo:break-before="auto" style:use-optimal-row-height="true"/>
    </style:style>
    <style:style style:name="ro17" style:family="table-row">
      <style:table-row-properties style:row-height="0.3925in" fo:break-before="auto" style:use-optimal-row-height="true"/>
    </style:style>
    <style:style style:name="ro18" style:family="table-row">
      <style:table-row-properties style:row-height="0.4043in" fo:break-before="auto" style:use-optimal-row-height="true"/>
    </style:style>
    <style:style style:name="ta1" style:family="table" style:master-page-name="PageStyle_5f_Projets_20_">
      <style:table-properties table:display="true" style:writing-mode="lr-tb"/>
    </style:style>
    <style:style style:name="ta2" style:family="table" style:master-page-name="PageStyle_5f_Articles_20_de_20_recherche">
      <style:table-properties table:display="true" style:writing-mode="lr-tb"/>
    </style:style>
    <style:style style:name="ta3" style:family="table" style:master-page-name="PageStyle_5f_articles_5f_lecture">
      <style:table-properties table:display="true" style:writing-mode="lr-tb"/>
    </style:style>
    <style:style style:name="ta4" style:family="table" style:master-page-name="PageStyle_5f_NLP">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7"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9"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1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0pt" style:font-name-asian="DejaVu Sans" style:font-size-asian="10pt" style:font-name-complex="Noto Sans Arabic UI" style:font-size-complex="10pt"/>
    </style:style>
    <style:style style:name="ce2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2pt" fo:font-weight="bold" style:font-name-asian="DejaVu Sans" style:font-size-asian="12pt" style:font-weight-asian="bold" style:font-name-complex="Noto Sans Arabic UI" style:font-size-complex="12pt"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fo:color="#0563c1" style:font-name="Calibri"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6"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7" style:family="text">
      <style:text-properties fo:font-size="12pt" fo:font-weight="bold" style:font-size-asian="12pt" style:font-size-complex="12pt" style:font-weight-asian="bold" style:font-weight-complex="bold"/>
    </style:style>
    <style:style style:name="T8"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ts "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16374" table:default-cell-style-name="ce1"/>
        <table:table-row table:style-name="ro1" table:number-rows-repeated="2">
          <table:table-cell table:number-columns-repeated="16384"/>
        </table:table-row>
        <table:table-row table:style-name="ro2">
          <table:table-cell table:style-name="ce2" office:value-type="string" calcext:value-type="string">
            <text:p>Type</text:p>
          </table:table-cell>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Autre 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5"/>
        </table:table-row>
        <table:table-row table:style-name="ro3">
          <table:table-cell office:value-type="string" calcext:value-type="string">
            <text:p>Open source</text:p>
          </table:table-cell>
          <table:table-cell office:value-type="string" calcext:value-type="string">
            <text:p>Vitrivr</text:p>
          </table:table-cell>
          <table:table-cell office:value-type="string" calcext:value-type="string">
            <text:p>University of Basel</text:p>
          </table:table-cell>
          <table:table-cell office:value-type="string" calcext:value-type="string">
            <text:p>Indexation/NLP</text:p>
          </table:table-cell>
          <table:table-cell table:style-name="ce5" office:value-type="string" calcext:value-type="string">
            <text:p><text:a xlink:href="https://vitrivr.org/vitrivr.html" xlink:type="simple">https://vitrivr.org/vitrivr.html</text:a></text:p>
          </table:table-cell>
          <table:table-cell table:style-name="ce5"/>
          <table:table-cell office:value-type="string" calcext:value-type="string">
            <text:p>outil open source de recherche par image dans des collections vidéo. Il propose une architecture en trois éléments : shot segmentation, feature extraction, query processing. </text:p>
            <text:p>Modes de recherche que l’outil permet : query by sketch, query by example, query by text, recherche multimodale.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speech segment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SpeechSegmenter" xlink:type="simple">https://github.com/ina-foss/inaSpeechSegmenter</text:a></text:p>
          </table:table-cell>
          <table:table-cell table:style-name="ce5"/>
          <table:table-cell office:value-type="string" calcext:value-type="string">
            <text:p>outil de segmentation audio : parole, musique, bruit développé par l’INA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face analyz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FaceAnalyzer" xlink:type="simple">https://github.com/ina-foss/inaFaceAnalyzer</text:a></text:p>
          </table:table-cell>
          <table:table-cell table:style-name="ce5"/>
          <table:table-cell office:value-type="string" calcext:value-type="string">
            <text:p>librairie python d’analyse de visages dans des images et vidéos, prédit l’âge et le sexe à partir de l’analyse d’un visage  </text:p>
          </table:table-cell>
          <table:table-cell table:number-columns-repeated="16377"/>
        </table:table-row>
        <table:table-row table:style-name="ro3">
          <table:table-cell office:value-type="string" calcext:value-type="string">
            <text:p>Open source</text:p>
          </table:table-cell>
          <table:table-cell office:value-type="string" calcext:value-type="string">
            <text:p>Whisper</text:p>
          </table:table-cell>
          <table:table-cell office:value-type="string" calcext:value-type="string">
            <text:p>OPENAI</text:p>
          </table:table-cell>
          <table:table-cell office:value-type="string" calcext:value-type="string">
            <text:p>Indexation</text:p>
          </table:table-cell>
          <table:table-cell table:style-name="ce5" office:value-type="string" calcext:value-type="string">
            <text:p><text:a xlink:href="https://github.com/openai/whisper" xlink:type="simple">https://github.com/openai/whisper</text:a></text:p>
          </table:table-cell>
          <table:table-cell table:style-name="ce5"/>
          <table:table-cell office:value-type="string" calcext:value-type="string">
            <text:p>modèle de reconnaisance de voix entraîné par OpenAI : reconnaissance de langue, traduction, </text:p>
          </table:table-cell>
          <table:table-cell table:number-columns-repeated="16377"/>
        </table:table-row>
        <table:table-row table:style-name="ro3">
          <table:table-cell office:value-type="string" calcext:value-type="string">
            <text:p>Open source</text:p>
          </table:table-cell>
          <table:table-cell office:value-type="string" calcext:value-type="string">
            <text:p>spaCY</text:p>
          </table:table-cell>
          <table:table-cell/>
          <table:table-cell office:value-type="string" calcext:value-type="string">
            <text:p>NLP</text:p>
          </table:table-cell>
          <table:table-cell table:style-name="ce5" office:value-type="string" calcext:value-type="string">
            <text:p><text:a xlink:href="https://github.com/explosion/spaCy" xlink:type="simple">https://github.com/explosion/spaCy</text:a></text:p>
          </table:table-cell>
          <table:table-cell table:style-name="ce5"/>
          <table:table-cell office:value-type="string" calcext:value-type="string">
            <text:p>Bibliothèque python de reconnaissance automatique des langues. Permet la tokenisation et la reconnaissance d'entités nommé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mplify seiri</text:p>
          </table:table-cell>
          <table:table-cell/>
          <table:table-cell office:value-type="string" calcext:value-type="string">
            <text:p>Indexation</text:p>
          </table:table-cell>
          <table:table-cell table:style-name="ce5" office:value-type="string" calcext:value-type="string">
            <text:p><text:a xlink:href="https://www.amplifysoft.io/en/products/seiri-your-ai-assistant-for-extracting-metadata-and-cataloging-media-content/" xlink:type="simple">https://www.amplifysoft.io/en/products/seiri-your-ai-assistant-for-extracting-metadata-and-cataloging-media-content/</text:a></text:p>
          </table:table-cell>
          <table:table-cell table:style-name="ce5"/>
          <table:table-cell office:value-type="string" calcext:value-type="string">
            <text:p>plateforme d'extraction de métadonnées depuis des contenus audio et vidéo : NER avancée, OCR, reconnaissance faciale, transcription automatique de la parole en texte, reconnaissance de logos, reconnaissance de types de scènes, description d'images, segmentation sémantique, résumés de contenu, contenu, classification, storyboard par images clés, IA générative, modèles multimodaux et multilingues</text:p>
          </table:table-cell>
          <table:table-cell table:number-columns-repeated="16377"/>
        </table:table-row>
        <table:table-row table:style-name="ro3">
          <table:table-cell office:value-type="string" calcext:value-type="string">
            <text:p>Open source</text:p>
          </table:table-cell>
          <table:table-cell office:value-type="string" calcext:value-type="string">
            <text:p>Video-LLava</text:p>
          </table:table-cell>
          <table:table-cell/>
          <table:table-cell office:value-type="string" calcext:value-type="string">
            <text:p>Indexation</text:p>
          </table:table-cell>
          <table:table-cell table:style-name="ce5" office:value-type="string" calcext:value-type="string">
            <text:p><text:a xlink:href="https://github.com/PKU-YuanGroup/Video-LLaVA" xlink:type="simple">https://github.com/PKU-YuanGroup/Video-LLaVA</text:a></text:p>
          </table:table-cell>
          <table:table-cell table:style-name="ce5"/>
          <table:table-cell office:value-type="string" calcext:value-type="string">
            <text:p>Modèle IA qui permet de comprendre uniformément vidéos et images, répond à des questions à partir des vidéos, peut générer du texte et des schémas à partir de contenus vidéo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elmind</text:p>
          </table:table-cell>
          <table:table-cell/>
          <table:table-cell office:value-type="string" calcext:value-type="string">
            <text:p>Indexation</text:p>
          </table:table-cell>
          <table:table-cell table:style-name="ce5" office:value-type="string" calcext:value-type="string">
            <text:p><text:a xlink:href="https://reelmind.ai/blog/automated-video-scene-detection-ai-for-seamless-editing" xlink:type="simple">https://reelmind.ai/blog/automated-video-scene-detection-ai-for-seamless-editing</text:a></text:p>
          </table:table-cell>
          <table:table-cell table:style-name="ce5"/>
          <table:table-cell office:value-type="string" calcext:value-type="string">
            <text:p>outil IA créé pour la création de contenu notamment et pour le montage vidéo. Detection de coupes et de transitions, groupe les scènes selon le contenu (dialogue, action, payasage)</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sNet-152</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resources.wolframcloud.com/NeuralNetRepository/resources/ResNet-152-Trained-on-ImageNet-Competition-Data/" xlink:type="simple">https://resources.wolframcloud.com/NeuralNetRepository/resources/ResNet-152-Trained-on-ImageNet-Competition-Data/</text:a></text:p>
          </table:table-cell>
          <table:table-cell table:style-name="ce5"/>
          <table:table-cell office:value-type="string" calcext:value-type="string">
            <text:p>outil de reconnaissance d'objets dans l'im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rchipanion </text:p>
          </table:table-cell>
          <table:table-cell/>
          <table:table-cell office:value-type="string" calcext:value-type="string">
            <text:p>NLP</text:p>
          </table:table-cell>
          <table:table-cell table:style-name="ce5" office:value-type="string" calcext:value-type="string">
            <text:p><text:a xlink:href="https://www.archipanion.com/fr/" xlink:type="simple">https://www.archipanion.com/fr/</text:a></text:p>
          </table:table-cell>
          <table:table-cell table:style-name="ce5"/>
          <table:table-cell office:value-type="string" calcext:value-type="string">
            <text:p>Outil IA propriétaire dédié aux collections patrimoniales qui propose de l'extraction automatique de métadonnées, de la recherche visuelle, de la recherche en langage naturel. Exemple d'application ici : https://archipanion.amorce.eu/fr </text:p>
          </table:table-cell>
          <table:table-cell table:number-columns-repeated="16377"/>
        </table:table-row>
        <table:table-row table:style-name="ro3">
          <table:table-cell office:value-type="string" calcext:value-type="string">
            <text:p>Open source</text:p>
          </table:table-cell>
          <table:table-cell office:value-type="string" calcext:value-type="string">
            <text:p>Tesseract</text:p>
          </table:table-cell>
          <table:table-cell/>
          <table:table-cell office:value-type="string" calcext:value-type="string">
            <text:p>NLP</text:p>
          </table:table-cell>
          <table:table-cell table:style-name="ce5" office:value-type="string" calcext:value-type="string">
            <text:p><text:a xlink:href="https://github.com/tesseract-ocr/tesseract" xlink:type="simple">https://github.com/tesseract-ocr/tesseract</text:a></text:p>
          </table:table-cell>
          <table:table-cell table:style-name="ce5"/>
          <table:table-cell office:value-type="string" calcext:value-type="string">
            <text:p>Outil open source de reconnaissance optique de caractères </text:p>
          </table:table-cell>
          <table:table-cell table:number-columns-repeated="16377"/>
        </table:table-row>
        <table:table-row table:style-name="ro3">
          <table:table-cell office:value-type="string" calcext:value-type="string">
            <text:p>Open source</text:p>
          </table:table-cell>
          <table:table-cell office:value-type="string" calcext:value-type="string">
            <text:p>2SDS</text:p>
          </table:table-cell>
          <table:table-cell/>
          <table:table-cell office:value-type="string" calcext:value-type="string">
            <text:p>Indexation</text:p>
          </table:table-cell>
          <table:table-cell table:style-name="ce5" office:value-type="string" calcext:value-type="string">
            <text:p><text:a xlink:href="https://github.com/miraclefactory/2sds" xlink:type="simple">https://github.com/miraclefactory/2sds</text:a></text:p>
          </table:table-cell>
          <table:table-cell table:style-name="ce5"/>
          <table:table-cell office:value-type="string" calcext:value-type="string">
            <text:p>Algorithme de segmentation temporelle pour l'analyse de flux video.</text:p>
          </table:table-cell>
          <table:table-cell table:number-columns-repeated="16377"/>
        </table:table-row>
        <table:table-row table:style-name="ro3">
          <table:table-cell office:value-type="string" calcext:value-type="string">
            <text:p>Open source</text:p>
          </table:table-cell>
          <table:table-cell office:value-type="string" calcext:value-type="string">
            <text:p>ViViT</text:p>
          </table:table-cell>
          <table:table-cell/>
          <table:table-cell office:value-type="string" calcext:value-type="string">
            <text:p>Indexation</text:p>
          </table:table-cell>
          <table:table-cell table:style-name="ce5" office:value-type="string" calcext:value-type="string">
            <text:p><text:a xlink:href="https://github.com/rishikksh20/ViViT-pytorch" xlink:type="simple">https://github.com/rishikksh20/ViViT-pytorch</text:a></text:p>
          </table:table-cell>
          <table:table-cell table:style-name="ce5"/>
          <table:table-cell office:value-type="string" calcext:value-type="string">
            <text:p>Video Vision Transformer : Modèle d'IA basé sur les transformers pour analyser des vidéos. Il est utilisé pour des tâches de vision vidéo pour la reconnaissance d'actions, compréhension de scènes, classification de vidéos. Ce modèle utilise les transformers et non le CNN. </text:p>
          </table:table-cell>
          <table:table-cell table:number-columns-repeated="16377"/>
        </table:table-row>
        <table:table-row table:style-name="ro3">
          <table:table-cell office:value-type="string" calcext:value-type="string">
            <text:p>Propriétiare</text:p>
          </table:table-cell>
          <table:table-cell office:value-type="string" calcext:value-type="string">
            <text:p>Video AI</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cloud.google.com/video-intelligence?utm_source=google&amp;utm_medium=cpc&amp;utm_campaign=Cloud-SS-DR-GCP-1713666-GCP-DR-EMEA-FR-fr-Google-BKWS-BRO-na&amp;utm_content=c-Hybrid+%7C+BKWS+-+BRO+%7C+Txt+-+AIML-AR+and+Video+APIs-Video+AI-490391486144&amp;utm_term=goog" xlink:type="simple">https://cloud.google.com/video-intelligence?utm_source=google&amp;utm_medium=cpc&amp;utm_campaign=Cloud-SS-DR-GCP-1713666-GCP-DR-EMEA-FR-fr-Google-BKWS-BRO-na&amp;utm_content=c-Hybrid+%7C+BKWS+-+BRO+%7C+Txt+-+AIML-AR+and+Video+APIs-Video+AI-490391486144&amp;utm_term=google+cloud+video+intelligence&amp;gclsrc=aw.ds&amp;gad_source=1&amp;gad_campaignid=23620115464&amp;gclid=EAIaIQobChMI__X1h63ClAMVqptoCR3R_zBhEAAYASAAEgJ7YfD_BwE</text:a></text:p>
          </table:table-cell>
          <table:table-cell table:style-name="ce5"/>
          <table:table-cell office:value-type="string" calcext:value-type="string">
            <text:p>Video AI est une API créée par Google basée sur des modèles de machine learning qui peuvent reconnaitre des lieux, objets et actions. Permet aussi d'annoter des vidéos, des séquences, des plans et des imag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zure AI video indexer </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learn.microsoft.com/en-us/azure/azure-video-indexer/video-indexer-overview" xlink:type="simple">https://learn.microsoft.com/en-us/azure/azure-video-indexer/video-indexer-overview</text:a></text:p>
          </table:table-cell>
          <table:table-cell table:style-name="ce5"/>
          <table:table-cell office:value-type="string" calcext:value-type="string">
            <text:p>Azure video indexer est un modèle d'IA qui extrait des métadonnées de l'image et du son</text:p>
          </table:table-cell>
          <table:table-cell table:number-columns-repeated="16377"/>
        </table:table-row>
        <table:table-row table:style-name="ro3">
          <table:table-cell office:value-type="string" calcext:value-type="string">
            <text:p>Open source</text:p>
          </table:table-cell>
          <table:table-cell office:value-type="string" calcext:value-type="string">
            <text:p>Media Pipe</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github.com/michaelgallacher/opencv-pipeline" xlink:type="simple">https://github.com/michaelgallacher/opencv-pipeline</text:a></text:p>
          </table:table-cell>
          <table:table-cell table:style-name="ce5"/>
          <table:table-cell office:value-type="string" calcext:value-type="string">
            <text:p>MediaPipe est une pipeline qui inclut des modèles tels que la détection d'objets, la calssification d'image, la segmentation d'images, la segmentation interactive, détection de visages, détecteur de langue, classification audio. </text:p>
          </table:table-cell>
          <table:table-cell table:number-columns-repeated="16377"/>
        </table:table-row>
        <table:table-row table:style-name="ro3">
          <table:table-cell office:value-type="string" calcext:value-type="string">
            <text:p>Open source</text:p>
          </table:table-cell>
          <table:table-cell office:value-type="string" calcext:value-type="string">
            <text:p>Moe-VRD</text:p>
          </table:table-cell>
          <table:table-cell/>
          <table:table-cell office:value-type="string" calcext:value-type="string">
            <text:p>Indexation</text:p>
          </table:table-cell>
          <table:table-cell table:style-name="ce5" office:value-type="string" calcext:value-type="string">
            <text:p><text:a xlink:href="https://github.com/shibshib/Moe-VRD" xlink:type="simple">https://github.com/shibshib/Moe-VRD</text:a></text:p>
          </table:table-cell>
          <table:table-cell table:style-name="ce5"/>
          <table:table-cell office:value-type="string" calcext:value-type="string">
            <text:p>Moe-VRD est un modèle d'IA qui détecte les relations entre objets dans des séquences vidéo et permet donc de générer des métadonénes de type sujet, relation, objet. </text:p>
          </table:table-cell>
          <table:table-cell table:number-columns-repeated="16377"/>
        </table:table-row>
        <table:table-row table:style-name="ro3">
          <table:table-cell office:value-type="string" calcext:value-type="string">
            <text:p>Open source</text:p>
          </table:table-cell>
          <table:table-cell office:value-type="string" calcext:value-type="string">
            <text:p>CVAT</text:p>
          </table:table-cell>
          <table:table-cell/>
          <table:table-cell office:value-type="string" calcext:value-type="string">
            <text:p>Indexation</text:p>
          </table:table-cell>
          <table:table-cell table:style-name="ce5" office:value-type="string" calcext:value-type="string">
            <text:p><text:a xlink:href="https://github.com/cvat-ai/cvat" xlink:type="simple">https://github.com/cvat-ai/cvat</text:a></text:p>
          </table:table-cell>
          <table:table-cell table:style-name="ce5"/>
          <table:table-cell office:value-type="string" calcext:value-type="string">
            <text:p>Plateforme open source d'annotation des données qui permet aussi le suivi des objets sur plusieurs plans (object tracking). </text:p>
          </table:table-cell>
          <table:table-cell table:number-columns-repeated="16377"/>
        </table:table-row>
        <table:table-row table:style-name="ro2">
          <table:table-cell/>
          <table:table-cell office:value-type="string" calcext:value-type="string">
            <text:p>camemBERT</text:p>
          </table:table-cell>
          <table:table-cell/>
          <table:table-cell office:value-type="string" calcext:value-type="string">
            <text:p>NLP</text:p>
          </table:table-cell>
          <table:table-cell table:style-name="ce5" office:value-type="string" calcext:value-type="string">
            <text:p><text:a xlink:href="https://medium.com/@vitalshchutski/french-nlp-entamez-le-camembert-avec-les-librairies-fast-bert-et-transformers-14e65f84c148" xlink:type="simple">https://medium.com/@vitalshchutski/french-nlp-entamez-le-camembert-avec-les-librairies-fast-bert-et-transformers-14e65f84c148</text:a></text:p>
          </table:table-cell>
          <table:table-cell table:style-name="ce5"/>
          <table:table-cell office:value-type="string" calcext:value-type="string">
            <text:p>Copie du modèle de langage BERT créé par Google, repris et entraîné avec des données françaises. </text:p>
          </table:table-cell>
          <table:table-cell table:number-columns-repeated="16377"/>
        </table:table-row>
        <table:table-row table:style-name="ro3">
          <table:table-cell office:value-type="string" calcext:value-type="string">
            <text:p>Open source</text:p>
          </table:table-cell>
          <table:table-cell office:value-type="string" calcext:value-type="string">
            <text:p>VANA AI</text:p>
          </table:table-cell>
          <table:table-cell/>
          <table:table-cell office:value-type="string" calcext:value-type="string">
            <text:p>NLP</text:p>
          </table:table-cell>
          <table:table-cell table:style-name="ce5" office:value-type="string" calcext:value-type="string">
            <text:p><text:a xlink:href="https://vanna.ai/" xlink:type="simple">https://vanna.ai/ </text:a></text:p>
          </table:table-cell>
          <table:table-cell table:style-name="ce5"/>
          <table:table-cell office:value-type="string" calcext:value-type="string">
            <text:p>VANA AI est un pipeline Python basé sur l'usage de NLP, LLM et RAG afin de transformer une requête en langage naturel en une requête SQL utilisable. </text:p>
          </table:table-cell>
          <table:table-cell/>
          <table:table-cell office:value-type="string" calcext:value-type="string">
            <text:p>NLP / LLM / RAG</text:p>
          </table:table-cell>
          <table:table-cell table:number-columns-repeated="16375"/>
        </table:table-row>
        <table:table-row table:style-name="ro3">
          <table:table-cell office:value-type="string" calcext:value-type="string">
            <text:p>Open source</text:p>
          </table:table-cell>
          <table:table-cell office:value-type="string" calcext:value-type="string">
            <text:p>LangChain SQL Agent</text:p>
          </table:table-cell>
          <table:table-cell/>
          <table:table-cell office:value-type="string" calcext:value-type="string">
            <text:p>NLP</text:p>
          </table:table-cell>
          <table:table-cell table:style-name="ce5" office:value-type="string" calcext:value-type="string">
            <text:p><text:a xlink:href="https://docs.langchain.com/" xlink:type="simple">https://docs.langchain.com/</text:a></text:p>
          </table:table-cell>
          <table:table-cell table:style-name="ce5"/>
          <table:table-cell table:style-name="ce4" office:value-type="string" calcext:value-type="string">
            <text:p><text:span text:style-name="T1">LangChain SQL Agent est un </text:span><text:span text:style-name="T2">Framework</text:span><text:span text:style-name="T3"> permettant de fiabiliser la génération de requête SQL. C'est un vérificateur de syntaxe SQL.</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Oracle Autonomous Database Select AI</text:p>
          </table:table-cell>
          <table:table-cell office:value-type="string" calcext:value-type="string">
            <text:p>Oracle</text:p>
          </table:table-cell>
          <table:table-cell office:value-type="string" calcext:value-type="string">
            <text:p>NLP</text:p>
          </table:table-cell>
          <table:table-cell table:style-name="ce5" office:value-type="string" calcext:value-type="string">
            <text:p><text:a xlink:href="https://www.oracle.com/fr/artificial-intelligence/generate-sql-queries-with-ai/" xlink:type="simple">https://www.oracle.com/fr/artificial-intelligence/generate-sql-queries-with-ai/</text:a></text:p>
          </table:table-cell>
          <table:table-cell table:style-name="ce5"/>
          <table:table-cell table:style-name="ce4" office:value-type="string" calcext:value-type="string">
            <text:p><text:span text:style-name="T1">Oracle est un Systsème de gestion de base de donnée qui a déjà intégré un pipeline </text:span><text:span text:style-name="T2">text-to-SQL</text:span><text:span text:style-name="T3"> dans leurs bases de donnnée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ERT</text:p>
          </table:table-cell>
          <table:table-cell/>
          <table:table-cell office:value-type="string" calcext:value-type="string">
            <text:p>NLP</text:p>
          </table:table-cell>
          <table:table-cell table:style-name="ce5" office:value-type="string" calcext:value-type="string">
            <text:p><text:a xlink:href="https://github.com/tokelde/BERT_Easy_Implementation" xlink:type="simple">https://github.com/tokelde/BERT_Easy_Implementation</text:a></text:p>
          </table:table-cell>
          <table:table-cell table:style-name="ce5"/>
          <table:table-cell table:style-name="ce4" office:value-type="string" calcext:value-type="string">
            <text:p><text:span text:style-name="T1">Projet pionnier sur la génération de requête SQL à partir de requête utilisateur grâce aux NLP. Grande avancée dans l'utilisation des NLP avec la création des </text:span><text:span text:style-name="T2">Transformer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TaBERT</text:p>
          </table:table-cell>
          <table:table-cell/>
          <table:table-cell office:value-type="string" calcext:value-type="string">
            <text:p>NLP</text:p>
          </table:table-cell>
          <table:table-cell table:style-name="ce5" office:value-type="string" calcext:value-type="string">
            <text:p><text:a xlink:href="https://github.com/facebookresearch/TaBERT" xlink:type="simple">https://github.com/facebookresearch/TaBERT</text:a></text:p>
          </table:table-cell>
          <table:table-cell table:style-name="ce5"/>
          <table:table-cell office:value-type="string" calcext:value-type="string">
            <text:p>Prolongement du projet BERT, TaBERT vise à fiabiliser BERT en permettant la compréhension d'une base SQL déjà formée.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ova</text:p>
          </table:table-cell>
          <table:table-cell/>
          <table:table-cell office:value-type="string" calcext:value-type="string">
            <text:p>NLP</text:p>
          </table:table-cell>
          <table:table-cell table:style-name="ce5" office:value-type="string" calcext:value-type="string">
            <text:p><text:a xlink:href="https://github.com/naver/sqlova" xlink:type="simple">https://github.com/naver/sqlova</text:a></text:p>
          </table:table-cell>
          <table:table-cell table:style-name="ce5"/>
          <table:table-cell office:value-type="string" calcext:value-type="string">
            <text:p>SQLova est un projet Github open source qui applique les concepts de base de BERT et TaBERT.</text:p>
          </table:table-cell>
          <table:table-cell table:number-columns-repeated="16377"/>
        </table:table-row>
        <table:table-row table:style-name="ro3">
          <table:table-cell office:value-type="string" calcext:value-type="string">
            <text:p>Open source</text:p>
          </table:table-cell>
          <table:table-cell office:value-type="string" calcext:value-type="string">
            <text:p>NLP-SQL-BERT</text:p>
          </table:table-cell>
          <table:table-cell/>
          <table:table-cell office:value-type="string" calcext:value-type="string">
            <text:p>NLP</text:p>
          </table:table-cell>
          <table:table-cell table:style-name="ce5" office:value-type="string" calcext:value-type="string">
            <text:p><text:a xlink:href="https://github.com/sonalkum/NLP-SQL-BERT" xlink:type="simple">https://github.com/sonalkum/NLP-SQL-BERT</text:a></text:p>
          </table:table-cell>
          <table:table-cell table:style-name="ce5"/>
          <table:table-cell office:value-type="string" calcext:value-type="string">
            <text:p>NLP-SQL-BERT est un projet Github open source qui applique les concepts de base de BERT et TaBERT.</text:p>
          </table:table-cell>
          <table:table-cell table:number-columns-repeated="16377"/>
        </table:table-row>
        <table:table-row table:style-name="ro2">
          <table:table-cell/>
          <table:table-cell office:value-type="string" calcext:value-type="string">
            <text:p>V7 auto track</text:p>
          </table:table-cell>
          <table:table-cell/>
          <table:table-cell office:value-type="string" calcext:value-type="string">
            <text:p>indexation</text:p>
          </table:table-cell>
          <table:table-cell table:style-name="ce5" office:value-type="string" calcext:value-type="string">
            <text:p><text:a xlink:href="https://www.v7darwin.com/blog/auto-track-motion-in-videos" xlink:type="simple">https://www.v7darwin.com/blog/auto-track-motion-in-videos </text:a></text:p>
          </table:table-cell>
          <table:table-cell table:style-name="ce5"/>
          <table:table-cell office:value-type="string" calcext:value-type="string">
            <text:p>How to segment objects in video and video annotation</text:p>
          </table:table-cell>
          <table:table-cell table:number-columns-repeated="16377"/>
        </table:table-row>
        <table:table-row table:style-name="ro3">
          <table:table-cell office:value-type="string" calcext:value-type="string">
            <text:p>Open source</text:p>
          </table:table-cell>
          <table:table-cell office:value-type="string" calcext:value-type="string">
            <text:p>PySceneDetect</text:p>
          </table:table-cell>
          <table:table-cell office:value-type="string" calcext:value-type="string">
            <text:p>YuanGroup</text:p>
          </table:table-cell>
          <table:table-cell office:value-type="string" calcext:value-type="string">
            <text:p>Indexation </text:p>
          </table:table-cell>
          <table:table-cell table:style-name="ce5" office:value-type="string" calcext:value-type="string">
            <text:p><text:a xlink:href="https://scenedetect.com/" xlink:type="simple">https://scenedetect.com</text:a></text:p>
          </table:table-cell>
          <table:table-cell table:style-name="ce5" office:value-type="string" calcext:value-type="string">
            <text:p><text:a xlink:href="https://github.com/breakthrough/pyscenedetect" xlink:type="simple">https://github.com/breakthrough/pyscenedetect </text:a></text:p>
          </table:table-cell>
          <table:table-cell office:value-type="string" calcext:value-type="string">
            <text:p>PyScene Detect est un projet open Source qui vise à séquencer des images animés à chaque changement de plan. <text:s/></text:p>
          </table:table-cell>
          <table:table-cell table:number-columns-repeated="16377"/>
        </table:table-row>
        <table:table-row table:style-name="ro4">
          <table:table-cell office:value-type="string" calcext:value-type="string">
            <text:p>Propriétaire gratuit ?</text:p>
          </table:table-cell>
          <table:table-cell table:style-name="ce4" office:value-type="string" calcext:value-type="string">
            <text:p><text:span text:style-name="T1">NVIDIA Data Loading Library </text:span><text:span text:style-name="T2">(DALI)</text:span></text:p>
          </table:table-cell>
          <table:table-cell office:value-type="string" calcext:value-type="string">
            <text:p>NVIDIA</text:p>
          </table:table-cell>
          <table:table-cell office:value-type="string" calcext:value-type="string">
            <text:p>Indexation </text:p>
          </table:table-cell>
          <table:table-cell table:style-name="ce5" office:value-type="string" calcext:value-type="string">
            <text:p><text:a xlink:href="https://developer.nvidia.com/dali" xlink:type="simple">https://developer.nvidia.com/dali</text:a></text:p>
          </table:table-cell>
          <table:table-cell table:style-name="ce5"/>
          <table:table-cell office:value-type="string" calcext:value-type="string">
            <text:p>Projet porté par NVIDIA, société spécialisée dans les GPUs, qui vise à prétraiter les images animés afin de faciliter leurs traitement par IA. L'idée est de fiabiliser la détection des scènes, des changements de plans, des bruits, formes, etc par un pré traitement fait pour l'IA. </text:p>
          </table:table-cell>
          <table:table-cell table:number-columns-repeated="16377"/>
        </table:table-row>
        <table:table-row table:style-name="ro3">
          <table:table-cell office:value-type="string" calcext:value-type="string">
            <text:p>Open source</text:p>
          </table:table-cell>
          <table:table-cell office:value-type="string" calcext:value-type="string">
            <text:p>TransNetV2</text:p>
          </table:table-cell>
          <table:table-cell/>
          <table:table-cell office:value-type="string" calcext:value-type="string">
            <text:p>Indexation </text:p>
          </table:table-cell>
          <table:table-cell table:style-name="ce5" office:value-type="string" calcext:value-type="string">
            <text:p><text:a xlink:href="https://github.com/soCzech/TransNetV2" xlink:type="simple">https://github.com/soCzech/TransNetV2</text:a></text:p>
          </table:table-cell>
          <table:table-cell table:style-name="ce5"/>
          <table:table-cell office:value-type="string" calcext:value-type="string">
            <text:p>Réseaux neuronaux développé pour la détection de changement de plan et de transitions dans une image animée.</text:p>
          </table:table-cell>
          <table:table-cell table:number-columns-repeated="16377"/>
        </table:table-row>
        <table:table-row table:style-name="ro3">
          <table:table-cell office:value-type="string" calcext:value-type="string">
            <text:p>Open source</text:p>
          </table:table-cell>
          <table:table-cell office:value-type="string" calcext:value-type="string">
            <text:p>PyAV</text:p>
          </table:table-cell>
          <table:table-cell/>
          <table:table-cell office:value-type="string" calcext:value-type="string">
            <text:p>Indexation </text:p>
          </table:table-cell>
          <table:table-cell table:style-name="ce5" office:value-type="string" calcext:value-type="string">
            <text:p><text:a xlink:href="https://github.com/pyav-org/pyav" xlink:type="simple">https://github.com/pyav-org/pyav</text:a></text:p>
          </table:table-cell>
          <table:table-cell table:style-name="ce5"/>
          <table:table-cell table:style-name="ce4" office:value-type="string" calcext:value-type="string">
            <text:p><text:span text:style-name="T1">Projet Open Source permettant l'utilisation de FFMPEG </text:span><text:span text:style-name="T2">(bibliothèque écrite en langage C particulièrement puissante pour le traitement de vidéo) </text:span><text:span text:style-name="T3">en Python afin de permettre le séquençage, la division de vidéos, etc.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AM2</text:p>
          </table:table-cell>
          <table:table-cell/>
          <table:table-cell office:value-type="string" calcext:value-type="string">
            <text:p>Indexation </text:p>
          </table:table-cell>
          <table:table-cell table:style-name="ce5" office:value-type="string" calcext:value-type="string">
            <text:p><text:a xlink:href="https://github.com/facebookresearch/sam2" xlink:type="simple">https://github.com/facebookresearch/sam2</text:a></text:p>
          </table:table-cell>
          <table:table-cell table:style-name="ce5"/>
          <table:table-cell office:value-type="string" calcext:value-type="string">
            <text:p>Projet Open Source qui permet de segmenter des vidéos et image àà l'échelle des entités visibles. Une fois une entité identifié, segmenté, SAM2 prend en charge le suivis de ces mouvements. </text:p>
          </table:table-cell>
          <table:table-cell table:number-columns-repeated="16377"/>
        </table:table-row>
        <table:table-row table:style-name="ro3">
          <table:table-cell office:value-type="string" calcext:value-type="string">
            <text:p>Open source</text:p>
          </table:table-cell>
          <table:table-cell office:value-type="string" calcext:value-type="string">
            <text:p>YOLO</text:p>
          </table:table-cell>
          <table:table-cell/>
          <table:table-cell office:value-type="string" calcext:value-type="string">
            <text:p>Indexation </text:p>
          </table:table-cell>
          <table:table-cell table:style-name="ce5" office:value-type="string" calcext:value-type="string">
            <text:p><text:a xlink:href="https://github.com/ultralytics/ultralytics" xlink:type="simple">https://github.com/ultralytics/ultralytics</text:a></text:p>
          </table:table-cell>
          <table:table-cell table:style-name="ce5"/>
          <table:table-cell office:value-type="string" calcext:value-type="string">
            <text:p>YOLO est un projet Open Source de réseau neuronnaux pouur la détection de formes dans les images et vidéos et leurs labellisation. Particulièrement utile si combiné avec SAM2 pour de la fiabilisation de résultats. </text:p>
          </table:table-cell>
          <table:table-cell table:number-columns-repeated="16377"/>
        </table:table-row>
        <table:table-row table:style-name="ro3">
          <table:table-cell office:value-type="string" calcext:value-type="string">
            <text:p>Open source</text:p>
          </table:table-cell>
          <table:table-cell office:value-type="string" calcext:value-type="string">
            <text:p>FaceNet</text:p>
          </table:table-cell>
          <table:table-cell/>
          <table:table-cell office:value-type="string" calcext:value-type="string">
            <text:p>Indexation </text:p>
          </table:table-cell>
          <table:table-cell table:style-name="ce5" office:value-type="string" calcext:value-type="string">
            <text:p><text:a xlink:href="https://github.com/davidsandberg/facenet/blob/master" xlink:type="simple">https://github.com/davidsandberg/facenet/blob/master</text:a></text:p>
          </table:table-cell>
          <table:table-cell table:style-name="ce5"/>
          <table:table-cell office:value-type="string" calcext:value-type="string">
            <text:p>FaceNet est un projet OpenSource spécialisé dans la reconnaissance faciale. En s'appuyant sur une base vectorielle, cet outil serait capable d'identifier des personnalités dans des images. On pourrait l'appliquer à de la vidéo en le combinant avec YOLO et SAM2. </text:p>
          </table:table-cell>
          <table:table-cell table:number-columns-repeated="16377"/>
        </table:table-row>
        <table:table-row table:style-name="ro3">
          <table:table-cell office:value-type="string" calcext:value-type="string">
            <text:p>Propriétaire</text:p>
          </table:table-cell>
          <table:table-cell office:value-type="string" calcext:value-type="string">
            <text:p>Text2SQL</text:p>
          </table:table-cell>
          <table:table-cell/>
          <table:table-cell office:value-type="string" calcext:value-type="string">
            <text:p>NLP</text:p>
          </table:table-cell>
          <table:table-cell table:style-name="ce5" office:value-type="string" calcext:value-type="string">
            <text:p><text:a xlink:href="https://www.text2sql.ai/" xlink:type="simple">https://www.text2sql.ai/</text:a></text:p>
          </table:table-cell>
          <table:table-cell/>
          <table:table-cell office:value-type="string" calcext:value-type="string">
            <text:p>Outil IA qui permet la génération de requête SQL à partir de requête utilisateur. Lien vers l'outil. </text:p>
          </table:table-cell>
          <table:table-cell table:number-columns-repeated="16377"/>
        </table:table-row>
        <table:table-row table:style-name="ro3">
          <table:table-cell office:value-type="string" calcext:value-type="string">
            <text:p>Open source</text:p>
          </table:table-cell>
          <table:table-cell office:value-type="string" calcext:value-type="string">
            <text:p>NLTK</text:p>
          </table:table-cell>
          <table:table-cell/>
          <table:table-cell office:value-type="string" calcext:value-type="string">
            <text:p>NLP</text:p>
          </table:table-cell>
          <table:table-cell table:style-name="ce5" office:value-type="string" calcext:value-type="string">
            <text:p><text:a xlink:href="https://github.com/nltk/nltk" xlink:type="simple">https://github.com/nltk/nltk</text:a></text:p>
          </table:table-cell>
          <table:table-cell/>
          <table:table-cell office:value-type="string" calcext:value-type="string">
            <text:p>Librairie python de NLP. Elle se distingue de SPACY pour son aspect plus modulable, étant plus une boîte à outil qu'un pipeline, par son aspect plus complets permettant plus de type de traitement, et sa souplesse. Elle est cependant plus difficile d''utilisation et plus lente </text:p>
          </table:table-cell>
          <table:table-cell table:number-columns-repeated="2" office:value-type="string" calcext:value-type="string">
            <text:p>Python</text:p>
          </table:table-cell>
          <table:table-cell table:number-columns-repeated="16375"/>
        </table:table-row>
        <table:table-row table:style-name="ro3">
          <table:table-cell office:value-type="string" calcext:value-type="string">
            <text:p>Open source</text:p>
          </table:table-cell>
          <table:table-cell office:value-type="string" calcext:value-type="string">
            <text:p>FFMPEG</text:p>
          </table:table-cell>
          <table:table-cell/>
          <table:table-cell office:value-type="string" calcext:value-type="string">
            <text:p>Indexation </text:p>
          </table:table-cell>
          <table:table-cell table:style-name="ce5" office:value-type="string" calcext:value-type="string">
            <text:p><text:a xlink:href="https://www.ffmpeg.org/" xlink:type="simple">https://www.ffmpeg.org/</text:a></text:p>
          </table:table-cell>
          <table:table-cell/>
          <table:table-cell office:value-type="string" calcext:value-type="string">
            <text:p>Outil écrit en C qui permet la manipulation des images et vidéos. Ce n'est pas un outil d'IA, mais beaucoup des outils cités et trouvés s'appuient sur cette bibliothèque</text:p>
          </table:table-cell>
          <table:table-cell table:number-columns-repeated="16377"/>
        </table:table-row>
        <table:table-row table:style-name="ro3">
          <table:table-cell office:value-type="string" calcext:value-type="string">
            <text:p>Open source</text:p>
          </table:table-cell>
          <table:table-cell office:value-type="string" calcext:value-type="string">
            <text:p>Spatialyze</text:p>
          </table:table-cell>
          <table:table-cell/>
          <table:table-cell office:value-type="string" calcext:value-type="string">
            <text:p>Indexation</text:p>
          </table:table-cell>
          <table:table-cell table:style-name="ce5" office:value-type="string" calcext:value-type="string">
            <text:p><text:a xlink:href="https://github.com/apperception-db/spatialyze" xlink:type="simple">https://github.com/apperception-db/spatialyze</text:a></text:p>
          </table:table-cell>
          <table:table-cell/>
          <table:table-cell office:value-type="string" calcext:value-type="string">
            <text:p>Framework qui permet la géolocalisation de vidéos par l'extraction de métadonnées géospatial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ntifier</text:p>
          </table:table-cell>
          <table:table-cell/>
          <table:table-cell office:value-type="string" calcext:value-type="string">
            <text:p>Indexation </text:p>
          </table:table-cell>
          <table:table-cell table:style-name="ce5" office:value-type="string" calcext:value-type="string">
            <text:p><text:a xlink:href="https://videntifier.com/" xlink:type="simple">https://videntifier.com/</text:a></text:p>
          </table:table-cell>
          <table:table-cell/>
          <table:table-cell office:value-type="string" calcext:value-type="string">
            <text:p>Solution propriétaire spécialisée dans l'identification de vidéos dans l'objectif de la protection de la propriété intelectuelle. L'idée générale est de pouvoir analyser chaque vidéo et de lui donner une emprunte propre qui garanti son unicité.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xle AI</text:p>
          </table:table-cell>
          <table:table-cell office:value-type="string" calcext:value-type="string">
            <text:p>Axle</text:p>
          </table:table-cell>
          <table:table-cell office:value-type="string" calcext:value-type="string">
            <text:p>Indexation</text:p>
          </table:table-cell>
          <table:table-cell table:style-name="ce5" office:value-type="string" calcext:value-type="string">
            <text:p><text:a xlink:href="https://www.axle.ai/" xlink:type="simple">https://www.axle.ai</text:a></text:p>
          </table:table-cell>
          <table:table-cell/>
          <table:table-cell table:style-name="ce4" office:value-type="string" calcext:value-type="string">
            <text:p><text:span text:style-name="T1">Solution propriétaire spécialisée dans la recherche sémantique </text:span><text:span text:style-name="T2">(donc par le sens)</text:span><text:span text:style-name="T3"> dans des vidéos. Compréhension sémantique de scènes, </text:span><text:span text:style-name="T2">tagging</text:span><text:span text:style-name="T3"> automatique de scènes, d'entités et d'objets et analyse des bruits et dialogues. C'est une solution Cloud. </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AWS</text:p>
          </table:table-cell>
          <table:table-cell office:value-type="string" calcext:value-type="string">
            <text:p>Amazon</text:p>
          </table:table-cell>
          <table:table-cell office:value-type="string" calcext:value-type="string">
            <text:p>Indexation</text:p>
          </table:table-cell>
          <table:table-cell table:style-name="ce5" office:value-type="string" calcext:value-type="string">
            <text:p><text:a xlink:href="https://aws.amazon.com/fr/rekognition" xlink:type="simple">https://aws.amazon.com/fr/rekognition </text:a></text:p>
          </table:table-cell>
          <table:table-cell/>
          <table:table-cell office:value-type="string" calcext:value-type="string">
            <text:p>Solution propriétaire multi-usage. AWS permet : la détection de segments dans les vidéos et leurs séquençages automatiquement, la reconnaissance faciale, la reconnaissance de célébrités, l'étiquetage de scène, d'objets, d'entités et cela de manière personnalisée. Prend également en charge la comparaison des visages, la détection de texte et l'analyse d'un vis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oLingo</text:p>
          </table:table-cell>
          <table:table-cell office:value-type="string" calcext:value-type="string">
            <text:p>Netflix ?</text:p>
          </table:table-cell>
          <table:table-cell office:value-type="string" calcext:value-type="string">
            <text:p>Indexation</text:p>
          </table:table-cell>
          <table:table-cell table:style-name="ce5" office:value-type="string" calcext:value-type="string">
            <text:p><text:a xlink:href="https://github.com/Huanshere/VideoLingo" xlink:type="simple">https://github.com/Huanshere/VideoLingo</text:a></text:p>
          </table:table-cell>
          <table:table-cell table:style-name="ce5" office:value-type="string" calcext:value-type="string">
            <text:p><text:a xlink:href="https://videolingo.io/en" xlink:type="simple">https://videolingo.io/en</text:a></text:p>
          </table:table-cell>
          <table:table-cell office:value-type="string" calcext:value-type="string">
            <text:p>Solution propriétaire utilisée par Netflix afin de générer des sous titres automatiquement. Il prend en charge l'analyse vidéos et la compréhension orale afin d'extraire du sens et traduire.</text:p>
          </table:table-cell>
          <table:table-cell office:value-type="string" calcext:value-type="string">
            <text:p>WhisperX</text:p>
          </table:table-cell>
          <table:table-cell office:value-type="string" calcext:value-type="string">
            <text:p>NLP </text:p>
          </table:table-cell>
          <table:table-cell table:number-columns-repeated="16375"/>
        </table:table-row>
        <table:table-row table:style-name="ro3">
          <table:table-cell office:value-type="string" calcext:value-type="string">
            <text:p>Open source</text:p>
          </table:table-cell>
          <table:table-cell office:value-type="string" calcext:value-type="string">
            <text:p>MetaDetective</text:p>
          </table:table-cell>
          <table:table-cell/>
          <table:table-cell office:value-type="string" calcext:value-type="string">
            <text:p>Indexation </text:p>
          </table:table-cell>
          <table:table-cell table:style-name="ce5" office:value-type="string" calcext:value-type="string">
            <text:p><text:a xlink:href="https://github.com/franckferman/MetaDetective" xlink:type="simple">https://github.com/franckferman/MetaDetective</text:a></text:p>
          </table:table-cell>
          <table:table-cell/>
          <table:table-cell office:value-type="string" calcext:value-type="string">
            <text:p>Librairie python spécialisé sur l'analyse des métadonnées de fichier images et/ou vidéos. Il permet notamment l'analyse des méta données EXIF, CODECS, la durée, les tags ID3 et peut aller jusqu'à vérifier l'authenticitié d'un document. Pour moi son intérêt réside dans sa capacité à extraire des métadonnées depuis des vidéos. </text:p>
          </table:table-cell>
          <table:table-cell table:number-columns-repeated="16377"/>
        </table:table-row>
        <table:table-row table:style-name="ro3">
          <table:table-cell office:value-type="string" calcext:value-type="string">
            <text:p>Open source</text:p>
          </table:table-cell>
          <table:table-cell office:value-type="string" calcext:value-type="string">
            <text:p>PyMediaInfo</text:p>
          </table:table-cell>
          <table:table-cell/>
          <table:table-cell office:value-type="string" calcext:value-type="string">
            <text:p>Indexation</text:p>
          </table:table-cell>
          <table:table-cell table:style-name="ce5" office:value-type="string" calcext:value-type="string">
            <text:p><text:a xlink:href="https://pypi.org/project/pymediainfo/" xlink:type="simple">https://pypi.org/project/pymediainfo/</text:a></text:p>
          </table:table-cell>
          <table:table-cell/>
          <table:table-cell office:value-type="string" calcext:value-type="string">
            <text:p>Librairie python d'interfaçage avec l'outil MediaInfo, elle permet d'utiliser le logiciel MediaInfo en python afin d'analyser chaque piste composants un fichiers vidéos. Ainsi, seront automatiquement extrait : Codecs, ratioo, FPS, si des délais existent entre audio et vidéo.</text:p>
          </table:table-cell>
          <table:table-cell table:number-columns-repeated="16377"/>
        </table:table-row>
        <table:table-row table:style-name="ro3">
          <table:table-cell office:value-type="string" calcext:value-type="string">
            <text:p>Open source</text:p>
          </table:table-cell>
          <table:table-cell office:value-type="string" calcext:value-type="string">
            <text:p>PyExifTool</text:p>
          </table:table-cell>
          <table:table-cell/>
          <table:table-cell office:value-type="string" calcext:value-type="string">
            <text:p>Indexation </text:p>
          </table:table-cell>
          <table:table-cell table:style-name="ce5" office:value-type="string" calcext:value-type="string">
            <text:p><text:a xlink:href="https://pypi.org/project/PyExifTool/" xlink:type="simple">https://pypi.org/project/PyExifTool/</text:a></text:p>
          </table:table-cell>
          <table:table-cell table:style-name="ce5" office:value-type="string" calcext:value-type="string">
            <text:p><text:a xlink:href="https://github.com/smarnach/pyexiftool" xlink:type="simple">https://github.com/smarnach/pyexiftool</text:a></text:p>
          </table:table-cell>
          <table:table-cell office:value-type="string" calcext:value-type="string">
            <text:p>Librairie python qui permet l'accès à des données enregistrées par des caméras professionnelles : géolocalisation, réglages de capteurs, autre réglages techniques. Ces donnnées sont souvent mise dans les vidéos produites par l'utilisation de ces caméras, mais peu exploitable. </text:p>
          </table:table-cell>
          <table:table-cell table:number-columns-repeated="16377"/>
        </table:table-row>
        <table:table-row table:style-name="ro3">
          <table:table-cell office:value-type="string" calcext:value-type="string">
            <text:p>Open source</text:p>
          </table:table-cell>
          <table:table-cell office:value-type="string" calcext:value-type="string">
            <text:p>FairMot</text:p>
          </table:table-cell>
          <table:table-cell table:number-columns-repeated="2"/>
          <table:table-cell table:style-name="ce5" office:value-type="string" calcext:value-type="string">
            <text:p><text:a xlink:href="https://github.com/ifzhang/FairMOT" xlink:type="simple">https://github.com/ifzhang/FairMOT</text:a></text:p>
          </table:table-cell>
          <table:table-cell/>
          <table:table-cell table:style-name="ce4" office:value-type="string" calcext:value-type="string">
            <text:p><text:span text:style-name="T1">Projet/librairie python qui permet le tracking de cible mutliples dans une vidéo et de les identifier </text:span><text:span text:style-name="T2">(Au sens de leurs donner une identité informatique propre afin de ne pas les confondres avec un autre humain sur l'image par exemple. Mais pas d'identification de Nom/Prénom)</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eg2Track-Sam2</text:p>
          </table:table-cell>
          <table:table-cell/>
          <table:table-cell office:value-type="string" calcext:value-type="string">
            <text:p>Indexation</text:p>
          </table:table-cell>
          <table:table-cell table:style-name="ce5" office:value-type="string" calcext:value-type="string">
            <text:p><text:a xlink:href="https://github.com/hcmr-lab/Seg2Track-SAM2" xlink:type="simple">https://github.com/hcmr-lab/Seg2Track-SAM2</text:a></text:p>
          </table:table-cell>
          <table:table-cell/>
          <table:table-cell table:style-name="ce4" office:value-type="string" calcext:value-type="string">
            <text:p><text:span text:style-name="T1">Projet qui combine deux technologies en un seul </text:span><text:span text:style-name="T2">framework </text:span><text:span text:style-name="T3">afin de faire du suivis d'entités/cibles multiples dans les vidéos avec une certaine fiabilitée dans la duré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etVLAD</text:p>
          </table:table-cell>
          <table:table-cell/>
          <table:table-cell office:value-type="string" calcext:value-type="string">
            <text:p>Indexation</text:p>
          </table:table-cell>
          <table:table-cell table:style-name="ce5" office:value-type="string" calcext:value-type="string">
            <text:p><text:a xlink:href="https://github.com/relja/netvlad" xlink:type="simple">https://github.com/relja/netvlad</text:a></text:p>
          </table:table-cell>
          <table:table-cell/>
          <table:table-cell office:value-type="string" calcext:value-type="string">
            <text:p>Projet de référence dans la reconnaissance de lieux à partir d'une image. Se base sur la reconnaissance architecturale.</text:p>
          </table:table-cell>
          <table:table-cell table:number-columns-repeated="16377"/>
        </table:table-row>
        <table:table-row table:style-name="ro3">
          <table:table-cell office:value-type="string" calcext:value-type="string">
            <text:p>Open source</text:p>
          </table:table-cell>
          <table:table-cell office:value-type="string" calcext:value-type="string">
            <text:p>GeM</text:p>
          </table:table-cell>
          <table:table-cell/>
          <table:table-cell office:value-type="string" calcext:value-type="string">
            <text:p>Indexation </text:p>
          </table:table-cell>
          <table:table-cell table:style-name="ce5" office:value-type="string" calcext:value-type="string">
            <text:p><text:a xlink:href="https://amaarora.github.io/posts/2020-08-30-gempool.html" xlink:type="simple">https://amaarora.github.io/posts/2020-08-30-gempool.html</text:a></text:p>
          </table:table-cell>
          <table:table-cell table:style-name="ce5" office:value-type="string" calcext:value-type="string">
            <text:p><text:a xlink:href="https://github.com/Strand2013/GemPooling_Pytorch" xlink:type="simple">https://github.com/Strand2013/GemPooling_Pytorch</text:a></text:p>
          </table:table-cell>
          <table:table-cell office:value-type="string" calcext:value-type="string">
            <text:p>Outil permettant de consolider les capacités de détection architecturale d'un outil IA comme NetVLAD. Permet l'identification des architectures sous différents angles, différentes luminositées etc. </text:p>
          </table:table-cell>
          <table:table-cell table:number-columns-repeated="16377"/>
        </table:table-row>
        <table:table-row table:style-name="ro3">
          <table:table-cell office:value-type="string" calcext:value-type="string">
            <text:p>Open source</text:p>
          </table:table-cell>
          <table:table-cell office:value-type="string" calcext:value-type="string">
            <text:p>PIGEON</text:p>
          </table:table-cell>
          <table:table-cell/>
          <table:table-cell office:value-type="string" calcext:value-type="string">
            <text:p>Indexation </text:p>
          </table:table-cell>
          <table:table-cell table:style-name="ce5" office:value-type="string" calcext:value-type="string">
            <text:p><text:a xlink:href="https://lukashaas.github.io/PIGEON-CVPR24/" xlink:type="simple">https://lukashaas.github.io/PIGEON-CVPR24/</text:a></text:p>
          </table:table-cell>
          <table:table-cell/>
          <table:table-cell office:value-type="string" calcext:value-type="string">
            <text:p>Projet IA afin d'estimer une localisation géographique précise à partir de textes et d'images. Entraîné sur le jeu Géoguesseur, il peut être limiter à cela. </text:p>
          </table:table-cell>
          <table:table-cell table:number-columns-repeated="16377"/>
        </table:table-row>
        <table:table-row table:style-name="ro3">
          <table:table-cell office:value-type="string" calcext:value-type="string">
            <text:p>propriétaire</text:p>
          </table:table-cell>
          <table:table-cell office:value-type="string" calcext:value-type="string">
            <text:p>Moments-Lab</text:p>
          </table:table-cell>
          <table:table-cell/>
          <table:table-cell office:value-type="string" calcext:value-type="string">
            <text:p>Indexation </text:p>
          </table:table-cell>
          <table:table-cell table:style-name="ce5" office:value-type="string" calcext:value-type="string">
            <text:p><text:a xlink:href="https://www.momentslab.com/fr-fr?utm_term=moments%20lab&amp;utm_campaign=Brand+-+FR&amp;utm_source=adwords&amp;utm_medium=ppc&amp;hsa_acc=4827473291&amp;hsa_cam=22197998353&amp;hsa_grp=182915194308&amp;hsa_ad=731722018943&amp;hsa_src=g&amp;hsa_tgt=kwd-2310062076638&amp;hsa_kw=moments%20lab&amp;hsa_" xlink:type="simple">https://www.momentslab.com/fr-fr?utm_term=moments%20lab&amp;utm_campaign=Brand+-+FR&amp;utm_source=adwords&amp;utm_medium=ppc&amp;hsa_acc=4827473291&amp;hsa_cam=22197998353&amp;hsa_grp=182915194308&amp;hsa_ad=731722018943&amp;hsa_src=g&amp;hsa_tgt=kwd-2310062076638&amp;hsa_kw=moments%20lab&amp;hsa_mt=p&amp;hsa_net=adwords&amp;hsa_ver=3&amp;gad_source=1&amp;gad_campaignid=22197998353&amp;gbraid=0AAAAAooBSsvjALCnMNBov5Xir7IfUewFt&amp;gclid=EAIaIQobChMIqovYmoe7lAMVkkhBAh1MOwB8EAAYASAAEgLW__D_BwE</text:a></text:p>
          </table:table-cell>
          <table:table-cell/>
          <table:table-cell office:value-type="string" calcext:value-type="string">
            <text:p>Outil utilisé par TF1, l'AFP et quelques clubs de foot afin d'indexer les archive audiovisuelles. IA Multimodale qui détecte les visages, les logos, les lieux, les actions et indexe l'ensemble de ces élément afin de permettre des recherches en langages naturels. </text:p>
          </table:table-cell>
          <table:table-cell table:number-columns-repeated="16377"/>
        </table:table-row>
        <table:table-row table:style-name="ro4">
          <table:table-cell office:value-type="string" calcext:value-type="string">
            <text:p>Open source</text:p>
          </table:table-cell>
          <table:table-cell office:value-type="string" calcext:value-type="string">
            <text:p>AI4Media</text:p>
          </table:table-cell>
          <table:table-cell/>
          <table:table-cell office:value-type="string" calcext:value-type="string">
            <text:p>Indexation </text:p>
          </table:table-cell>
          <table:table-cell table:style-name="ce5" office:value-type="string" calcext:value-type="string">
            <text:p><text:a xlink:href="https://www.ai4media.eu/" xlink:type="simple">https://www.ai4media.eu/</text:a></text:p>
          </table:table-cell>
          <table:table-cell table:style-name="ce5" office:value-type="string" calcext:value-type="string">
            <text:p><text:a xlink:href="https://www.ai4media.eu/software/" xlink:type="simple">https://www.ai4media.eu/software/</text:a></text:p>
          </table:table-cell>
          <table:table-cell table:style-name="ce4" office:value-type="string" calcext:value-type="string">
            <text:p><text:span text:style-name="T1">Projet Européen issus d'un consortium qui développe un certains nombre d'outils basé sur l'IA pour l'analyses et l'indexations des médias et vidéos. Propose énormément de ressources différentes : des articles scientifiques et des ressources techniques allant de programme pour fiabiliser le </text:span><text:span text:style-name="T2">deep learning</text:span><text:span text:style-name="T3"> pour l'analyse par IA de documents audiovisuels à des IA déjà employables </text:span><text:span text:style-name="T2">(deuxième lien)</text:span><text:span text:style-name="T3">. Ils abordent toutes les thématiques : de l'utilisation de l'IA pour la reconnnaissance d'objet, à la segmentation d'objet et de séquences en passant par l'indexation automatisée via des Thésauru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MeMAD</text:p>
          </table:table-cell>
          <table:table-cell/>
          <table:table-cell office:value-type="string" calcext:value-type="string">
            <text:p>Indexation </text:p>
          </table:table-cell>
          <table:table-cell table:style-name="ce5" office:value-type="string" calcext:value-type="string">
            <text:p><text:a xlink:href="https://github.com/MeMAD-project/mmca" xlink:type="simple">https://github.com/MeMAD-project/mmca</text:a></text:p>
          </table:table-cell>
          <table:table-cell/>
          <table:table-cell office:value-type="string" calcext:value-type="string">
            <text:p>Projet académique qui a produit un certains nombres d'outils basé sur l'IA pour l'analyse multimodales d'images animées. Ils par exemple développé un module pour l'indexation contrôlé par Thésaurus à partir de la reconnaissance d'objets. Les différents outils sont accessibles sur ce github.</text:p>
          </table:table-cell>
          <table:table-cell table:number-columns-repeated="16377"/>
        </table:table-row>
        <table:table-row table:style-name="ro3">
          <table:table-cell office:value-type="string" calcext:value-type="string">
            <text:p>Open source</text:p>
          </table:table-cell>
          <table:table-cell office:value-type="string" calcext:value-type="string">
            <text:p>Movie-Credit-Detect</text:p>
          </table:table-cell>
          <table:table-cell/>
          <table:table-cell office:value-type="string" calcext:value-type="string">
            <text:p>Indexation </text:p>
          </table:table-cell>
          <table:table-cell table:style-name="ce5" office:value-type="string" calcext:value-type="string">
            <text:p><text:a xlink:href="https://github.com/hurdlea/Movie-Credits-Detect" xlink:type="simple">https://github.com/hurdlea/Movie-Credits-Detect</text:a></text:p>
          </table:table-cell>
          <table:table-cell/>
          <table:table-cell table:style-name="ce4" office:value-type="string" calcext:value-type="string">
            <text:p><text:span text:style-name="T1">Projet open source qui se base sur la librairie OpenCV afin de détecter les génériques/crédits de chaque films. Chaque image ressemblant à un générique est isolé. </text:span><text:span text:style-name="T2">Pour avoir utilisé OoenCV de cette même manière, je pense que c'est une solution qui peut être efficace mais trop sensible aux variation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Automated-text-recognition</text:p>
          </table:table-cell>
          <table:table-cell/>
          <table:table-cell office:value-type="string" calcext:value-type="string">
            <text:p>Indexation </text:p>
          </table:table-cell>
          <table:table-cell table:style-name="ce5" office:value-type="string" calcext:value-type="string">
            <text:p><text:a xlink:href="https://github.com/Ajaneeshwar/Automated-text-recognition" xlink:type="simple">https://github.com/Ajaneeshwar/Automated-text-recognition</text:a></text:p>
          </table:table-cell>
          <table:table-cell/>
          <table:table-cell table:style-name="ce4" office:value-type="string" calcext:value-type="string">
            <text:p><text:span text:style-name="T1">Projet open source qui propose un </text:span><text:span text:style-name="T2">pipeline</text:span><text:span text:style-name="T3"> afin d'appliquer un OCR sur un flux vidéos afin d'en extraire des noms et autres informations notamment présentent sur les génériques. Ne semble pas demander de prétraitement comme une pré identification des génériques : on lui donne le fichier vidéo, et il reconnaît seul les génériques et le texte qui est porté.</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CaptiOCR</text:p>
          </table:table-cell>
          <table:table-cell/>
          <table:table-cell office:value-type="string" calcext:value-type="string">
            <text:p>Indexation </text:p>
          </table:table-cell>
          <table:table-cell table:style-name="ce5" office:value-type="string" calcext:value-type="string">
            <text:p><text:a xlink:href="https://www.captiocr.com/" xlink:type="simple">https://www.captiocr.com/</text:a></text:p>
          </table:table-cell>
          <table:table-cell/>
          <table:table-cell table:style-name="ce4" office:value-type="string" calcext:value-type="string">
            <text:p><text:span text:style-name="T1">Projet open source imaginé à l'origine pour pouvoir extraire en temps réel, lors de meeting notamment, des sous titres. On définit une région d'application sur notre écran, ou ROI pour </text:span><text:span text:style-name="T2">region of interest</text:span><text:span text:style-name="T3">, et il s'appliquera sur cette zone. Ce projet peut être modifié pour s'appliquer à toute une image et uniquement sur les images de générique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LIP-2</text:p>
          </table:table-cell>
          <table:table-cell/>
          <table:table-cell office:value-type="string" calcext:value-type="string">
            <text:p>Indexation </text:p>
          </table:table-cell>
          <table:table-cell table:style-name="ce5" office:value-type="string" calcext:value-type="string">
            <text:p><text:a xlink:href="https://huggingface.co/docs/transformers/model_doc/blip-2" xlink:type="simple">https://huggingface.co/docs/transformers/model_doc/blip-2</text:a></text:p>
          </table:table-cell>
          <table:table-cell/>
          <table:table-cell table:style-name="ce4" office:value-type="string" calcext:value-type="string">
            <text:p><text:span text:style-name="T1">Projet open source pour l'</text:span><text:span text:style-name="T2">image captionning</text:span><text:span text:style-name="T3">. Modèle de pré entraînement pour l'analyse d'image vidéo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lexSQL</text:p>
          </table:table-cell>
          <table:table-cell/>
          <table:table-cell office:value-type="string" calcext:value-type="string">
            <text:p>NLP</text:p>
          </table:table-cell>
          <table:table-cell table:style-name="ce5" office:value-type="string" calcext:value-type="string">
            <text:p><text:a xlink:href="https://github.com/StringNLPLAB/FlexSQL" xlink:type="simple">https://github.com/StringNLPLAB/FlexSQL</text:a></text:p>
          </table:table-cell>
          <table:table-cell/>
          <table:table-cell table:style-name="ce4" office:value-type="string" calcext:value-type="string">
            <text:p><text:span text:style-name="T1">FlexSQL est un agent SQL qui a pour objectif de permettre à un pipeline </text:span><text:span text:style-name="T2">text-to-sql </text:span><text:span text:style-name="T3">une interraction plus fluide et plus grande avc la base de données afin de générer des requêtes correctes. L'idée est que grâce à cet agent, le pipeline puisse se baser sur de multiples vérifications à différents moment de la réflexion du LLM afin de repérer les erreurs et les corriger au fur et à mesur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INER-SQL</text:p>
          </table:table-cell>
          <table:table-cell/>
          <table:table-cell office:value-type="string" calcext:value-type="string">
            <text:p>NLP</text:p>
          </table:table-cell>
          <table:table-cell table:style-name="ce5" office:value-type="string" calcext:value-type="string">
            <text:p><text:a xlink:href="https://github.com/thanhdath/finer-sql" xlink:type="simple">https://github.com/thanhdath/finer-sql</text:a></text:p>
          </table:table-cell>
          <table:table-cell/>
          <table:table-cell office:value-type="string" calcext:value-type="string">
            <text:p>Framework de renforcement des petits modèle de langues, ou SLMs. L'idée est qu'un SLMs consomme moins et prends moins d'espace qu'un LLM, ce qui est très avantageux pour grand nombre d'acteurs, mais en contrepartie ils offrent des capacités de raisonnement moindre. FINER-SQL vise à optimiser les SLMs pour offrir de meilleure performances et se rapprocher des performances des LLMs.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StructEval </text:p>
          </table:table-cell>
          <table:table-cell/>
          <table:table-cell office:value-type="string" calcext:value-type="string">
            <text:p>NLP</text:p>
          </table:table-cell>
          <table:table-cell table:style-name="ce5" office:value-type="string" calcext:value-type="string">
            <text:p><text:a xlink:href="https://anonymous.4open.science/r/StructEval-2435/README.md" xlink:type="simple">https://anonymous.4open.science/r/StructEval-2435/README.md</text:a></text:p>
          </table:table-cell>
          <table:table-cell/>
          <table:table-cell office:value-type="string" calcext:value-type="string">
            <text:p>Framework pour l'évaluation des requêtes SQL générées, leurs fiabilisations et homogénéisations. Alternative ou complément à l'outil précédent. </text:p>
          </table:table-cell>
          <table:table-cell table:number-columns-repeated="16377"/>
        </table:table-row>
        <table:table-row table:style-name="ro4">
          <table:table-cell office:value-type="string" calcext:value-type="string">
            <text:p>Propriétaire</text:p>
          </table:table-cell>
          <table:table-cell office:value-type="string" calcext:value-type="string">
            <text:p>Sinequa</text:p>
          </table:table-cell>
          <table:table-cell office:value-type="string" calcext:value-type="string">
            <text:p>Sinequa Entreprise AI search</text:p>
          </table:table-cell>
          <table:table-cell office:value-type="string" calcext:value-type="string">
            <text:p>NLP</text:p>
          </table:table-cell>
          <table:table-cell table:style-name="ce5" office:value-type="string" calcext:value-type="string">
            <text:p><text:a xlink:href="https://www.sinequa.com/product/workplace-search/" xlink:type="simple">https://www.sinequa.com/product/workplace-search/</text:a></text:p>
          </table:table-cell>
          <table:table-cell/>
          <table:table-cell office:value-type="string" calcext:value-type="string">
            <text:p>Produit proposant un outil IA se basant sur les connaissance et conntenus interne à une entreprise afifn d'être interrogeabl. L'idée est de pouvoir interroger une barre de recherche augmentée à l'IA afin d'avoir : un résumé de la recherche effectué et les résultats les plus pertinants après recherche full text. Je ne sais pas dans quel cadre cela s'applque ? </text:p>
          </table:table-cell>
          <table:table-cell table:number-columns-repeated="16377"/>
        </table:table-row>
        <table:table-row table:style-name="ro3">
          <table:table-cell office:value-type="string" calcext:value-type="string">
            <text:p>Propriétaire</text:p>
          </table:table-cell>
          <table:table-cell table:number-columns-repeated="2" office:value-type="string" calcext:value-type="string">
            <text:p>Queryloop</text:p>
          </table:table-cell>
          <table:table-cell office:value-type="string" calcext:value-type="string">
            <text:p>NLP</text:p>
          </table:table-cell>
          <table:table-cell table:style-name="ce5" office:value-type="string" calcext:value-type="string">
            <text:p><text:a xlink:href="https://www.queryloop.ai/" xlink:type="simple">https://www.queryloop.ai/</text:a></text:p>
          </table:table-cell>
          <table:table-cell/>
          <table:table-cell table:style-name="ce4" office:value-type="string" calcext:value-type="string">
            <text:p><text:span text:style-name="T1">J'ai un peu de mal à comprendre cet outil, mais il semblerait que ce soit une entreprise proposant une IA spécialisé dans la création de Workflow automatisé à appliqué sur des données. L'idée est de pouvoir lui donner un dataset et de lui expliquer ce qu'on souhaite faire, queryloop élaborera un worflow complet avec proposition d'outils </text:span><text:span text:style-name="T2">(LLMs) </text:span><text:span text:style-name="T3">à intégrer.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l2query</text:p>
          </table:table-cell>
          <table:table-cell/>
          <table:table-cell office:value-type="string" calcext:value-type="string">
            <text:p>NLP-NoSQL</text:p>
          </table:table-cell>
          <table:table-cell table:style-name="ce5" office:value-type="string" calcext:value-type="string">
            <text:p><text:a xlink:href="https://github.com/Chirayu-Tripathi/nl2query" xlink:type="simple">https://github.com/Chirayu-Tripathi/nl2query</text:a></text:p>
          </table:table-cell>
          <table:table-cell/>
          <table:table-cell office:value-type="string" calcext:value-type="string">
            <text:p>Projet open source permettant d'appliquer du NLP à une question en langage naturel dans le but de créer une requête Pandas, MongoDB, Kusto ou encoore Cypher. Utilisable en python directement, dans le dossier il y a un mode d'emploie pour chaque type d'utilisation souhaitée.</text:p>
          </table:table-cell>
          <table:table-cell table:number-columns-repeated="16377"/>
        </table:table-row>
        <table:table-row table:style-name="ro3">
          <table:table-cell office:value-type="string" calcext:value-type="string">
            <text:p>Open source</text:p>
          </table:table-cell>
          <table:table-cell office:value-type="string" calcext:value-type="string">
            <text:p>NL2MONGODB</text:p>
          </table:table-cell>
          <table:table-cell/>
          <table:table-cell office:value-type="string" calcext:value-type="string">
            <text:p>NLP-NoSQL</text:p>
          </table:table-cell>
          <table:table-cell table:style-name="ce5" office:value-type="string" calcext:value-type="string">
            <text:p><text:a xlink:href="https://github.com/wissem18/NL2MongoDB" xlink:type="simple">https://github.com/wissem18/NL2MongoDB</text:a></text:p>
          </table:table-cell>
          <table:table-cell/>
          <table:table-cell office:value-type="string" calcext:value-type="string">
            <text:p>Projet open source qui se base sur la librairie StreamLit ainsi que LangChain et ChatGPT afin de transformer une requête utilisateur en langage naturel. L'utilisation de ChatGPT se fait par API ce qui n'est pas souhaitable pour la protection des données, mais sur des données ouvertes ou simplement non sensible cela peut être un bon test. Cela pemettrais de comprendre comment cela fonctionne, les points d'attentions et de difficultés à avoir. </text:p>
          </table:table-cell>
          <table:table-cell table:number-columns-repeated="16377"/>
        </table:table-row>
        <table:table-row table:style-name="ro3">
          <table:table-cell office:value-type="string" calcext:value-type="string">
            <text:p>Open Source</text:p>
          </table:table-cell>
          <table:table-cell office:value-type="string" calcext:value-type="string">
            <text:p>Semantic search with MongoDB and LLM Frameworks</text:p>
          </table:table-cell>
          <table:table-cell/>
          <table:table-cell office:value-type="string" calcext:value-type="string">
            <text:p>NLP-NoSQL</text:p>
          </table:table-cell>
          <table:table-cell table:style-name="ce5" office:value-type="string" calcext:value-type="string">
            <text:p><text:a xlink:href="https://github.com/mongodb-developer/quickstart-rag-python" xlink:type="simple">https://github.com/mongodb-developer/quickstart-rag-python</text:a></text:p>
          </table:table-cell>
          <table:table-cell/>
          <table:table-cell office:value-type="string" calcext:value-type="string">
            <text:p>Projet open source qui utilise l'API de ChatGPT, il se base sur l'utilisation de deux agents IA, LangChain et LlamaIndex, ainsi que GPT afin de générer des requête No-SQL à partir de requête utilisateurs sur des bases de données. Il est intéressant de voir que ce projet utilise GPT pour la génération de la requête, mais ce sont LangChain et LlamaIndex qui sont véritablement responsable de la recherche et de son succès. </text:p>
          </table:table-cell>
          <table:table-cell table:number-columns-repeated="16377"/>
        </table:table-row>
        <table:table-row table:style-name="ro3">
          <table:table-cell office:value-type="string" calcext:value-type="string">
            <text:p>Open Source</text:p>
          </table:table-cell>
          <table:table-cell office:value-type="string" calcext:value-type="string">
            <text:p>Mosmql</text:p>
          </table:table-cell>
          <table:table-cell/>
          <table:table-cell office:value-type="string" calcext:value-type="string">
            <text:p>NLP-NoSQL</text:p>
          </table:table-cell>
          <table:table-cell table:style-name="ce5" office:value-type="string" calcext:value-type="string">
            <text:p><text:a xlink:href="https://github.com/MOSTAFAEZZAT/mosmql" xlink:type="simple">https://github.com/MOSTAFAEZZAT/mosmql</text:a></text:p>
          </table:table-cell>
          <table:table-cell/>
          <table:table-cell table:style-name="ce4" office:value-type="string" calcext:value-type="string">
            <text:p><text:span text:style-name="T1">Projet open source également basé sur l'API de ChatGPT. Il propose également d'interroger en langage naturel une base de donnée No-SQL, mais je n'ai pas plus de précision sur le </text:span><text:span text:style-name="T2">framework </text:span><text:span text:style-name="T3">ou </text:span><text:span text:style-name="T2">pipeline</text:span><text:span text:style-name="T3"> mis en place. </text:span></text:p>
          </table:table-cell>
          <table:table-cell table:number-columns-repeated="16377"/>
        </table:table-row>
        <table:table-row table:style-name="ro5" table:number-rows-repeated="1048506">
          <table:table-cell table:number-columns-repeated="16384"/>
        </table:table-row>
        <table:table-row table:style-name="ro5">
          <table:table-cell table:number-columns-repeated="16384"/>
        </table:table-row>
      </table:table>
      <table:table table:name="Articles de recherche" table:style-name="ta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16377" table:default-cell-style-name="ce1"/>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table table:name="articles_lecture" table:style-name="ta3">
        <office:forms form:automatic-focus="false" form:apply-design-mode="false"/>
        <table:table-column table:style-name="co16" table:default-cell-style-name="ce1"/>
        <table:table-column table:style-name="co12" table:default-cell-style-name="ce1"/>
        <table:table-column table:style-name="co13" table:default-cell-style-name="ce1"/>
        <table:table-column table:style-name="co17" table:default-cell-style-name="ce11"/>
        <table:table-column table:style-name="co18" table:default-cell-style-name="ce11"/>
        <table:table-column table:style-name="co19" table:default-cell-style-name="ce11"/>
        <table:table-column table:style-name="co20" table:default-cell-style-name="ce1"/>
        <table:table-column table:style-name="co21" table:default-cell-style-name="ce11"/>
        <table:table-column table:style-name="co18" table:default-cell-style-name="ce11"/>
        <table:table-column table:style-name="co19" table:default-cell-style-name="ce1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21" table:default-cell-style-name="ce11"/>
        <table:table-column table:style-name="co18" table:default-cell-style-name="ce11"/>
        <table:table-column table:style-name="co19" table:default-cell-style-name="ce11"/>
        <table:table-column table:style-name="co22" table:default-cell-style-name="ce11"/>
        <table:table-column table:style-name="co1" table:number-columns-repeated="1636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Lien</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2"/>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office:value-type="string" calcext:value-type="string">
            <text:p>ajouté dans zotero</text:p>
          </table:table-cell>
          <table:table-cell table:number-columns-repeated="16365"/>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number-columns-repeated="3"/>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table:number-columns-repeated="3"/>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1"/>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number-columns-repeated="3"/>
          <table:table-cell table:style-name="ce5" office:value-type="string" calcext:value-type="string">
            <text:p><text:a xlink:href="https://www.beeldengeluid.nl/en/research/blog/ai-audiovisual-archives" xlink:type="simple">https://www.beeldengeluid.nl/en/research/blog/ai-audiovisual-archives</text:a></text:p>
          </table:table-cell>
          <table:table-cell table:number-columns-repeated="3"/>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1"/>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number-columns-repeated="4"/>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table:number-columns-repeated="3"/>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2"/>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number-columns-repeated="4"/>
          <table:table-cell table:style-name="ce5" office:value-type="string" calcext:value-type="string">
            <text:p><text:a xlink:href="https://shs.cairn.info/magazine-archimag-2025-hs81-page-8?lang=fr" xlink:type="simple">https://shs.cairn.info/magazine-archimag-2025-hs81-page-8?lang=fr</text:a></text:p>
          </table:table-cell>
          <table:table-cell table:number-columns-repeated="3"/>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3"/>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office:value-type="string" calcext:value-type="string">
            <text:p>lu</text:p>
          </table:table-cell>
          <table:table-cell/>
          <table:table-cell table:style-name="ce12" office:value-type="string" calcext:value-type="string">
            <text:p>Indexation</text:p>
            <text:p>Experience utilisateur </text:p>
            <text:p>IA cinema</text:p>
            <text:p>Ntions IA</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table:number-columns-repeated="3"/>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1"/>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office:value-type="string" calcext:value-type="string">
            <text:p>lu</text:p>
          </table:table-cell>
          <table:table-cell/>
          <table:table-cell table:style-name="ce12" office:value-type="string" calcext:value-type="string">
            <text:p>Notions IA</text:p>
            <text:p>IA cinema</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table:number-columns-repeated="3"/>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2"/>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number-columns-repeated="3"/>
          <table:table-cell table:style-name="ce5" office:value-type="string" calcext:value-type="string">
            <text:p><text:a xlink:href="https://arxiv.org/pdf/2507.08768" xlink:type="simple">https://arxiv.org/pdf/2507.08768 </text:a></text:p>
          </table:table-cell>
          <table:table-cell office:value-type="string" calcext:value-type="string">
            <text:p>lu</text:p>
          </table:table-cell>
          <table:table-cell/>
          <table:table-cell office:value-type="string" calcext:value-type="string">
            <text:p>notions_indexation.tex/ notions_IA/ problématique</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2"/>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4"/>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oui</text:p>
          </table:table-cell>
          <table:table-cell table:number-columns-repeated="16365"/>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office:value-type="string" calcext:value-type="string">
            <text:p>lu</text:p>
          </table:table-cell>
          <table:table-cell/>
          <table:table-cell office:value-type="string" calcext:value-type="string">
            <text:p>IA_cinema/ notions_indexation</text:p>
          </table:table-cell>
          <table:table-cell table:style-name="ce5" office:value-type="string" calcext:value-type="string">
            <text:p><text:a xlink:href="https://arxiv.org/pdf/2503.21848v1" xlink:type="simple">https://arxiv.org/pdf/2503.21848v1</text:a></text:p>
          </table:table-cell>
          <table:table-cell office:value-type="string" calcext:value-type="string">
            <text:p>lu</text:p>
          </table:table-cell>
          <table:table-cell/>
          <table:table-cell office:value-type="string" calcext:value-type="string">
            <text:p>IA_cinem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3"/>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IA_cinema</text:p>
          </table:table-cell>
          <table:table-cell table:style-name="ce5" office:value-type="string" calcext:value-type="string">
            <text:p><text:a xlink:href="https://arxiv.org/pdf/2103.15691" xlink:type="simple">https://arxiv.org/pdf/2103.15691</text:a></text:p>
          </table:table-cell>
          <table:table-cell table:number-columns-repeated="3"/>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3"/>
        </table:table-row>
        <table:table-row table:style-name="ro3">
          <table:table-cell office:value-type="string" calcext:value-type="string">
            <text:p>Le traitement des sources historiques par la vision artificielle : l'exemple des manuscrits d'astronomie de tradition ptoléméenne</text:p>
          </table:table-cell>
          <table:table-cell table:number-columns-repeated="2"/>
          <table:table-cell office:value-type="string" calcext:value-type="string">
            <text:p>en cours, p66</text:p>
          </table:table-cell>
          <table:table-cell/>
          <table:table-cell office:value-type="string" calcext:value-type="string">
            <text:p>IA notions/ IA cinema</text:p>
          </table:table-cell>
          <table:table-cell table:style-name="ce5"/>
          <table:table-cell table:number-columns-repeated="16377"/>
        </table:table-row>
        <table:table-row table:style-name="ro2">
          <table:table-cell office:value-type="string" calcext:value-type="string">
            <text:p>Computational and Experimental Approaches to Visual Aesthetics</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frontiersin.org/journals/computational-neuroscience/articles/10.3389/fncom.2017.00102/full" xlink:type="simple">https://www.frontiersin.org/journals/computational-neuroscience/articles/10.3389/fncom.2017.00102/full </text:a></text:p>
          </table:table-cell>
          <table:table-cell table:number-columns-repeated="16377"/>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office:value-type="string" calcext:value-type="string">
            <text:p>lu</text:p>
          </table:table-cell>
          <table:table-cell table:number-columns-repeated="2"/>
          <table:table-cell table:style-name="ce5" office:value-type="string" calcext:value-type="string">
            <text:p><text:a xlink:href="https://arxiv.org/pdf/2308.00210" xlink:type="simple">https://arxiv.org/pdf/2308.00210</text:a></text:p>
          </table:table-cell>
          <table:table-cell table:number-columns-repeated="3"/>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3"/>
        </table:table-row>
        <table:table-row table:style-name="ro3">
          <table:table-cell office:value-type="string" calcext:value-type="string">
            <text:p>Deep Clustering for Unsupervised Learning of Visual Featur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link.springer.com/chapter/10.1007/978-3-030-01264-9_9" xlink:type="simple">https://link.springer.com/chapter/10.1007/978-3-030-01264-9_9 </text:a></text:p>
          </table:table-cell>
          <table:table-cell table:number-columns-repeated="16377"/>
        </table:table-row>
        <table:table-row table:style-name="ro3">
          <table:table-cell office:value-type="string" calcext:value-type="string">
            <text:p>Supervised versus unsupervised learning: What's the differenc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ibm.com/think/topics/supervised-vs-unsupervised-learning" xlink:type="simple">https://www.ibm.com/think/topics/supervised-vs-unsupervised-learning </text:a></text:p>
          </table:table-cell>
          <table:table-cell table:number-columns-repeated="16377"/>
        </table:table-row>
        <table:table-row table:style-name="ro4">
          <table:table-cell office:value-type="string" calcext:value-type="string">
            <text:p>A Comprehensive Review of Image Line Segment Detection and Description: Taxonomies, Comparisons, and Challeng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arxiv.org/abs/2305.00264" xlink:type="simple">https://arxiv.org/abs/2305.00264 </text:a></text:p>
          </table:table-cell>
          <table:table-cell table:number-columns-repeated="16377"/>
        </table:table-row>
        <table:table-row table:style-name="ro3">
          <table:table-cell office:value-type="string" calcext:value-type="string">
            <text:p>Explorer des corpus d’images. L’IA au service du patrimoin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bnf.hypotheses.org/2809" xlink:type="simple">https://bnf.hypotheses.org/2809 </text:a></text:p>
          </table:table-cell>
          <table:table-cell table:number-columns-repeated="16377"/>
        </table:table-row>
        <table:table-row table:style-name="ro2">
          <table:table-cell table:style-name="ce10" office:value-type="string" calcext:value-type="string">
            <text:p>DigInPix: Visual Named-Entities Identification in Images and Videos</text:p>
          </table:table-cell>
          <table:table-cell table:number-columns-repeated="2"/>
          <table:table-cell office:value-type="string" calcext:value-type="string">
            <text:p>lu</text:p>
          </table:table-cell>
          <table:table-cell/>
          <table:table-cell office:value-type="string" calcext:value-type="string">
            <text:p>IA cinéma</text:p>
          </table:table-cell>
          <table:table-cell table:style-name="ce5" office:value-type="string" calcext:value-type="string">
            <text:p><text:a xlink:href="https://inria.hal.science/hal-01182780v1/document" xlink:type="simple">https://inria.hal.science/hal-01182780v1/document</text:a></text:p>
          </table:table-cell>
          <table:table-cell table:number-columns-repeated="16377"/>
        </table:table-row>
        <table:table-row table:style-name="ro2">
          <table:table-cell table:style-name="ce10" office:value-type="string" calcext:value-type="string">
            <text:p>Amalia.js : an Open-Source Metadata Driven HTML5 Multimedia Player</text:p>
          </table:table-cell>
          <table:table-cell table:number-columns-repeated="2"/>
          <table:table-cell office:value-type="string" calcext:value-type="string">
            <text:p>lu</text:p>
          </table:table-cell>
          <table:table-cell/>
          <table:table-cell office:value-type="string" calcext:value-type="string">
            <text:p>expérience utilisateur </text:p>
          </table:table-cell>
          <table:table-cell table:style-name="ce5" office:value-type="string" calcext:value-type="string">
            <text:p><text:a xlink:href="https://www.herve.name/research/nherve_amalia_js.pdf" xlink:type="simple">https://www.herve.name/research/nherve_amalia_js.pdf</text:a></text:p>
          </table:table-cell>
          <table:table-cell table:number-columns-repeated="16377"/>
        </table:table-row>
        <table:table-row table:style-name="ro3">
          <table:table-cell office:value-type="string" calcext:value-type="string">
            <text:p>Unsupervised Layered Image Decomposition into Object Prototypes</text:p>
            <text:p/>
          </table:table-cell>
          <table:table-cell table:number-columns-repeated="5"/>
          <table:table-cell table:style-name="ce5" office:value-type="string" calcext:value-type="string">
            <text:p><text:a xlink:href="https://arxiv.org/abs/2104.14575" xlink:type="simple">https://arxiv.org/abs/2104.14575 </text:a></text:p>
          </table:table-cell>
          <table:table-cell table:number-columns-repeated="16377"/>
        </table:table-row>
        <table:table-row table:style-name="ro3">
          <table:table-cell office:value-type="string" calcext:value-type="string">
            <text:p>Image-to-Image Retrieval by Learning Similarity between Scene Graphs</text:p>
            <text:p/>
          </table:table-cell>
          <table:table-cell table:number-columns-repeated="5"/>
          <table:table-cell table:style-name="ce5" office:value-type="string" calcext:value-type="string">
            <text:p><text:a xlink:href="https://arxiv.org/abs/2012.14700" xlink:type="simple">https://arxiv.org/abs/2012.14700 </text:a></text:p>
          </table:table-cell>
          <table:table-cell table:number-columns-repeated="16377"/>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Segment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table:number-columns-repeated="3"/>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3"/>
        </table:table-row>
        <table:table-row table:style-name="ro16">
          <table:table-cell office:value-type="string" calcext:value-type="string">
            <text:p>DFFNet: An IoT-perceptive dual feature fusion network for general real-time semantic segmentation</text:p>
            <text:p/>
          </table:table-cell>
          <table:table-cell table:number-columns-repeated="5"/>
          <table:table-cell table:style-name="ce5" office:value-type="string" calcext:value-type="string">
            <text:p><text:a xlink:href="https://www.sciencedirect.com/science/article/abs/pii/S0020025521001389" xlink:type="simple">https://www.sciencedirect.com/science/article/abs/pii/S0020025521001389</text:a></text:p>
          </table:table-cell>
          <table:table-cell table:number-columns-repeated="16377"/>
        </table:table-row>
        <table:table-row table:style-name="ro17">
          <table:table-cell office:value-type="string" calcext:value-type="string">
            <text:p>High-order paired-ASPP for deep semantic segmentation networks☆</text:p>
            <text:p/>
          </table:table-cell>
          <table:table-cell table:number-columns-repeated="5"/>
          <table:table-cell table:style-name="ce5" office:value-type="string" calcext:value-type="string">
            <text:p><text:a xlink:href="https://www.sciencedirect.com/science/article/abs/pii/S0020025523009490" xlink:type="simple">https://www.sciencedirect.com/science/article/abs/pii/S0020025523009490</text:a></text:p>
          </table:table-cell>
          <table:table-cell table:number-columns-repeated="16377"/>
        </table:table-row>
        <table:table-row table:style-name="ro6">
          <table:table-cell office:value-type="string" calcext:value-type="string">
            <text:p>Semantic object classes in video: A high-definition ground truth database</text:p>
            <text:p/>
            <text:p/>
          </table:table-cell>
          <table:table-cell table:number-columns-repeated="2"/>
          <table:table-cell office:value-type="string" calcext:value-type="string">
            <text:p>lu </text:p>
          </table:table-cell>
          <table:table-cell table:number-columns-repeated="2"/>
          <table:table-cell table:style-name="ce5" office:value-type="string" calcext:value-type="string">
            <text:p><text:a xlink:href="https://www.sciencedirect.com/science/article/abs/pii/S0167865508001220" xlink:type="simple">https://www.sciencedirect.com/science/article/abs/pii/S0167865508001220</text:a> </text:p>
          </table:table-cell>
          <table:table-cell table:number-columns-repeated="16377"/>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office:value-type="string" calcext:value-type="string">
            <text:p>lu juste l’intro</text:p>
          </table:table-cell>
          <table:table-cell/>
          <table:table-cell office:value-type="string" calcext:value-type="string">
            <text:p>Segmentation </text:p>
          </table:table-cell>
          <table:table-cell table:style-name="ce5" office:value-type="string" calcext:value-type="string">
            <text:p><text:a xlink:href="https://link.springer.com/article/10.1007/s11042-020-10450-2" xlink:type="simple">https://link.springer.com/article/10.1007/s11042-020-10450-2</text:a></text:p>
          </table:table-cell>
          <table:table-cell table:number-columns-repeated="3"/>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3"/>
        </table:table-row>
        <table:table-row table:style-name="ro18">
          <table:table-cell office:value-type="string" calcext:value-type="string">
            <text:p><text:span text:style-name="T7">A survey on deep learning technique for video segmentation</text:span></text:p>
            <text:p/>
          </table:table-cell>
          <table:table-cell table:number-columns-repeated="2"/>
          <table:table-cell office:value-type="string" calcext:value-type="string">
            <text:p>lu</text:p>
          </table:table-cell>
          <table:table-cell/>
          <table:table-cell office:value-type="string" calcext:value-type="string">
            <text:p>Segmentation </text:p>
          </table:table-cell>
          <table:table-cell table:style-name="ce5"/>
          <table:table-cell table:number-columns-repeated="16377"/>
        </table:table-row>
        <table:table-row table:style-name="ro2">
          <table:table-cell office:value-type="string" calcext:value-type="string">
            <text:p>Chapitrage et circulation dns un corpus d’archives audiovisuelles</text:p>
          </table:table-cell>
          <table:table-cell table:number-columns-repeated="5"/>
          <table:table-cell table:style-name="ce5" office:value-type="string" calcext:value-type="string">
            <text:p><text:a xlink:href="https://rushs.cnrs.fr/wp-content/uploads/2020/11/3-Chapitrage-et-circulation-dans-un-corpus-darchives-audiovisuelles.pdf" xlink:type="simple">https://rushs.cnrs.fr/wp-content/uploads/2020/11/3-Chapitrage-et-circulation-dans-un-corpus-darchives-audiovisuelles.pdf</text:a></text:p>
          </table:table-cell>
          <table:table-cell table:number-columns-repeated="16377"/>
        </table:table-row>
        <table:table-row table:style-name="ro2">
          <table:table-cell office:value-type="string" calcext:value-type="string">
            <text:p>“Archives audiovisuelles et recherche”: l’Indexation collective</text:p>
          </table:table-cell>
          <table:table-cell table:number-columns-repeated="5"/>
          <table:table-cell table:style-name="ce5" office:value-type="string" calcext:value-type="string">
            <text:p><text:a xlink:href="https://arcmc.hypotheses.org/tag/archives-audiovisuelles" xlink:type="simple">https://arcmc.hypotheses.org/tag/archives-audiovisuelles</text:a></text:p>
          </table:table-cell>
          <table:table-cell table:number-columns-repeated="16377"/>
        </table:table-row>
        <table:table-row table:style-name="ro16">
          <table:table-cell office:value-type="string" calcext:value-type="string">
            <text:p>Modélisation linguistique pour l'indexation automatique de documents audiovisuels</text:p>
            <text:p/>
          </table:table-cell>
          <table:table-cell table:number-columns-repeated="5"/>
          <table:table-cell table:style-name="ce5" office:value-type="string" calcext:value-type="string">
            <text:p><text:a xlink:href="https://theses.fr/2003PA112226" xlink:type="simple">https://theses.fr/2003PA112226</text:a></text:p>
          </table:table-cell>
          <table:table-cell table:number-columns-repeated="16377"/>
        </table:table-row>
        <table:table-row table:style-name="ro17">
          <table:table-cell office:value-type="string" calcext:value-type="string">
            <text:p>Annalogica : transcription multimédia professionnelle</text:p>
            <text:p/>
          </table:table-cell>
          <table:table-cell table:number-columns-repeated="5"/>
          <table:table-cell table:style-name="ce5"/>
          <table:table-cell table:number-columns-repeated="16377"/>
        </table:table-row>
        <table:table-row table:style-name="ro16">
          <table:table-cell office:value-type="string" calcext:value-type="string">
            <text:p><text:span text:style-name="T8">Chapitre 4. Analyse automatique de l’image et du son pour l’enrichissement de contenus audiovisuels</text:span></text:p>
            <text:p/>
          </table:table-cell>
          <table:table-cell table:number-columns-repeated="5"/>
          <table:table-cell table:style-name="ce5" office:value-type="string" calcext:value-type="string">
            <text:p><text:a xlink:href="https://shs.cairn.info/big-data--9782804189150-page-61?lang=fr" xlink:type="simple">https://shs.cairn.info/big-data--9782804189150-page-61?lang=fr</text:a></text:p>
          </table:table-cell>
          <table:table-cell table:number-columns-repeated="16377"/>
        </table:table-row>
        <table:table-row table:style-name="ro16">
          <table:table-cell office:value-type="string" calcext:value-type="string">
            <text:p>Analyse automatique de film - Des séquences d'images aux séquences d'actions.</text:p>
            <text:p/>
          </table:table-cell>
          <table:table-cell table:number-columns-repeated="5"/>
          <table:table-cell table:style-name="ce5" office:value-type="string" calcext:value-type="string">
            <text:p><text:a xlink:href="https://www.researchgate.net/publication/41117180_Analyse_automatique_de_film_-_Des_sequences_d'images_aux_sequences_d'actions" xlink:type="simple">https://www.researchgate.net/publication/41117180_Analyse_automatique_de_film_-_Des_sequences_d'images_aux_sequences_d'actions</text:a></text:p>
          </table:table-cell>
          <table:table-cell table:number-columns-repeated="16377"/>
        </table:table-row>
        <table:table-row table:style-name="ro17">
          <table:table-cell office:value-type="string" calcext:value-type="string">
            <text:p>Segmentation en plans</text:p>
            <text:p/>
          </table:table-cell>
          <table:table-cell table:number-columns-repeated="5"/>
          <table:table-cell table:style-name="ce5" office:value-type="string" calcext:value-type="string">
            <text:p><text:a xlink:href="https://fr.wikipedia.org/wiki/Segmentation_en_plans" xlink:type="simple">https://fr.wikipedia.org/wiki/Segmentation_en_plans</text:a></text:p>
          </table:table-cell>
          <table:table-cell table:number-columns-repeated="16377"/>
        </table:table-row>
        <table:table-row table:style-name="ro17">
          <table:table-cell office:value-type="string" calcext:value-type="string">
            <text:p><text:span text:style-name="T8">Annalysis Media : analyse audiovisuelle</text:span></text:p>
            <text:p/>
          </table:table-cell>
          <table:table-cell table:number-columns-repeated="5"/>
          <table:table-cell table:style-name="ce5"/>
          <table:table-cell table:number-columns-repeated="16377"/>
        </table:table-row>
        <table:table-row table:style-name="ro5">
          <table:table-cell table:style-name="ce21" office:value-type="string" calcext:value-type="string">
            <text:p>Clockwork convnets for video semantic segmentation</text:p>
          </table:table-cell>
          <table:table-cell table:number-columns-repeated="5"/>
          <table:table-cell table:style-name="ce5"/>
          <table:table-cell table:number-columns-repeated="16377"/>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table:number-columns-repeated="3"/>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3"/>
        </table:table-row>
        <table:table-row table:style-name="ro3">
          <table:table-cell office:value-type="string" calcext:value-type="string">
            <text:p>Accel: a corrective fusion network for efficient semantic segmentation on video</text:p>
          </table:table-cell>
          <table:table-cell table:number-columns-repeated="5"/>
          <table:table-cell table:style-name="ce5"/>
          <table:table-cell table:number-columns-repeated="16377"/>
        </table:table-row>
        <table:table-row table:style-name="ro18">
          <table:table-cell office:value-type="string" calcext:value-type="string">
            <text:p><text:span text:style-name="T7">Low-latency video semantic segmentation</text:span></text:p>
            <text:p/>
          </table:table-cell>
          <table:table-cell table:number-columns-repeated="5"/>
          <table:table-cell table:style-name="ce5"/>
          <table:table-cell table:number-columns-repeated="16377"/>
        </table:table-row>
        <table:table-row table:style-name="ro3">
          <table:table-cell office:value-type="string" calcext:value-type="string">
            <text:p>Budget-aware deep semantic video segmentation</text:p>
            <text:p/>
          </table:table-cell>
          <table:table-cell table:number-columns-repeated="5"/>
          <table:table-cell table:style-name="ce5"/>
          <table:table-cell table:number-columns-repeated="16377"/>
        </table:table-row>
        <table:table-row table:style-name="ro3">
          <table:table-cell office:value-type="string" calcext:value-type="string">
            <text:p>Video understanding-based random hand gesture authentication</text:p>
            <text:p/>
          </table:table-cell>
          <table:table-cell table:number-columns-repeated="5"/>
          <table:table-cell table:style-name="ce5"/>
          <table:table-cell table:number-columns-repeated="16377"/>
        </table:table-row>
        <table:table-row table:style-name="ro17">
          <table:table-cell office:value-type="string" calcext:value-type="string">
            <text:p>Flownet: learning optical flow with convolutional networks</text:p>
            <text:p/>
          </table:table-cell>
          <table:table-cell table:number-columns-repeated="5"/>
          <table:table-cell table:style-name="ce5"/>
          <table:table-cell table:number-columns-repeated="16377"/>
        </table:table-row>
        <table:table-row table:style-name="ro4">
          <table:table-cell office:value-type="string" calcext:value-type="string">
            <text:p>Csanet for video semantic segmentation with inter-frame mutual learning</text:p>
            <text:p/>
          </table:table-cell>
          <table:table-cell table:number-columns-repeated="5"/>
          <table:table-cell table:style-name="ce5"/>
          <table:table-cell table:number-columns-repeated="16377"/>
        </table:table-row>
        <table:table-row table:style-name="ro17">
          <table:table-cell office:value-type="string" calcext:value-type="string">
            <text:p>Efficient uncertainty estimation for semantic segmentation in videos</text:p>
            <text:p/>
          </table:table-cell>
          <table:table-cell table:number-columns-repeated="5"/>
          <table:table-cell table:style-name="ce5"/>
          <table:table-cell table:number-columns-repeated="16377"/>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number-columns-repeated="3"/>
          <table:table-cell table:style-name="ce5" office:value-type="string" calcext:value-type="string">
            <text:p><text:a xlink:href="https://arxiv.org/pdf/1412.4470" xlink:type="simple">https://arxiv.org/pdf/1412.4470</text:a></text:p>
          </table:table-cell>
          <table:table-cell table:number-columns-repeated="3"/>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3"/>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number-columns-repeated="3"/>
          <table:table-cell table:style-name="ce5" office:value-type="string" calcext:value-type="string">
            <text:p><text:a xlink:href="https://arxiv.org/pdf/2603.10285" xlink:type="simple">https://arxiv.org/pdf/2603.10285</text:a></text:p>
          </table:table-cell>
          <table:table-cell table:number-columns-repeated="3"/>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1"/>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5" office:value-type="string" calcext:value-type="string">
            <text:p><text:a xlink:href="https://publications-prairial.fr/arabesques/index.php?id=605" xlink:type="simple">https://publications-prairial.fr/arabesques/index.php?id=605</text:a></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4"/>
          <table:table-cell office:value-type="string" calcext:value-type="string">
            <text:p>lu</text:p>
          </table:table-cell>
          <table:table-cell/>
          <table:table-cell office:value-type="string" calcext:value-type="string">
            <text:p>notions_indexation.tex/Indexation documentaire</text:p>
          </table:table-cell>
          <table:table-cell office:value-type="string" calcext:value-type="string">
            <text:p>oui</text:p>
          </table:table-cell>
          <table:table-cell table:number-columns-repeated="16365"/>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number-columns-repeated="3"/>
          <table:table-cell table:style-name="ce5" office:value-type="string" calcext:value-type="string">
            <text:p><text:a xlink:href="https://arxiv.org/pdf/2410.02713" xlink:type="simple">https://arxiv.org/pdf/2410.02713</text:a></text:p>
          </table:table-cell>
          <table:table-cell table:number-columns-repeated="3"/>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0"/>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number-columns-repeated="3"/>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69"/>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number-columns-repeated="3"/>
          <table:table-cell table:style-name="ce5" office:value-type="string" calcext:value-type="string">
            <text:p><text:a xlink:href="https://arxiv.org/pdf/1702.03790" xlink:type="simple">https://arxiv.org/pdf/1702.03790</text:a></text:p>
          </table:table-cell>
          <table:table-cell table:number-columns-repeated="3"/>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0"/>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number-columns-repeated="3"/>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0"/>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number-columns-repeated="3"/>
          <table:table-cell table:style-name="ce5" office:value-type="string" calcext:value-type="string">
            <text:p><text:a xlink:href="https://library.imaging.org/archiving/articles/22/1/21" xlink:type="simple">https://library.imaging.org/archiving/articles/22/1/21 </text:a></text:p>
          </table:table-cell>
          <table:table-cell table:number-columns-repeated="3"/>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0"/>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number-columns-repeated="3"/>
          <table:table-cell table:style-name="ce5" office:value-type="string" calcext:value-type="string">
            <text:p><text:a xlink:href="https://fiatifta.org/awards-editions/awards-2019/" xlink:type="simple">https://fiatifta.org/awards-editions/awards-2019/</text:a></text:p>
          </table:table-cell>
          <table:table-cell table:number-columns-repeated="3"/>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3"/>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number-columns-repeated="3"/>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number-columns-repeated="3"/>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1"/>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number-columns-repeated="3"/>
          <table:table-cell table:style-name="ce5" office:value-type="string" calcext:value-type="string">
            <text:p><text:a xlink:href="https://data.ina.fr/traitements-ia" xlink:type="simple">https://data.ina.fr/traitements-ia</text:a></text:p>
          </table:table-cell>
          <table:table-cell table:number-columns-repeated="3"/>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3"/>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number-columns-repeated="3"/>
          <table:table-cell table:style-name="ce5" office:value-type="string" calcext:value-type="string">
            <text:p><text:a xlink:href="https://inria.hal.science/hal-02889805/document" xlink:type="simple">https://inria.hal.science/hal-02889805/document</text:a></text:p>
          </table:table-cell>
          <table:table-cell table:number-columns-repeated="3"/>
          <table:table-cell table:style-name="ce8" office:value-type="string" calcext:value-type="string">
            <text:p>Article sur le modèle de langage camemBERT entrainé en français. </text:p>
          </table:table-cell>
          <table:table-cell table:number-columns-repeated="16373"/>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number-columns-repeated="3"/>
          <table:table-cell table:style-name="ce5" office:value-type="string" calcext:value-type="string">
            <text:p><text:a xlink:href="https://deltic.fr/indexation-documents/" xlink:type="simple">https://deltic.fr/indexation-documents/</text:a></text:p>
          </table:table-cell>
          <table:table-cell table:number-columns-repeated="3"/>
          <table:table-cell office:value-type="string" calcext:value-type="string">
            <text:p>Article général qui présente les grands principe de l'indexation de documents et le challenge que l'automatisation de ce processus représente. </text:p>
          </table:table-cell>
          <table:table-cell table:number-columns-repeated="16373"/>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number-columns-repeated="3"/>
          <table:table-cell table:style-name="ce5" office:value-type="string" calcext:value-type="string">
            <text:p><text:a xlink:href="https://hal.science/tel-01137526v1" xlink:type="simple">https://hal.science/tel-01137526v1</text:a></text:p>
          </table:table-cell>
          <table:table-cell table:number-columns-repeated="3"/>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3"/>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number-columns-repeated="3"/>
          <table:table-cell table:style-name="ce5" office:value-type="string" calcext:value-type="string">
            <text:p><text:a xlink:href="https://hal.science/hal-04610717v1" xlink:type="simple">https://hal.science/hal-04610717v1</text:a></text:p>
          </table:table-cell>
          <table:table-cell table:number-columns-repeated="3"/>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1"/>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natural-language-processing" xlink:type="simple">https://www.ibm.com/fr-fr/think/topics/natural-language-processing</text:a></text:p>
          </table:table-cell>
          <table:table-cell table:number-columns-repeated="3"/>
          <table:table-cell office:value-type="string" calcext:value-type="string">
            <text:p>Article de IBM permettant de présenter et de comprendre les bases du NLP. </text:p>
          </table:table-cell>
          <table:table-cell table:number-columns-repeated="16373"/>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number-columns-repeated="3"/>
          <table:table-cell table:style-name="ce5" office:value-type="string" calcext:value-type="string">
            <text:p><text:a xlink:href="https://trec.nist.gov/pubs/trec33/papers/Overview_avs_vtt_actev.pdf" xlink:type="simple">https://trec.nist.gov/pubs/trec33/papers/Overview_avs_vtt_actev.pdf</text:a></text:p>
          </table:table-cell>
          <table:table-cell table:number-columns-repeated="3"/>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3"/>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number-columns-repeated="3"/>
          <table:table-cell table:style-name="ce5" office:value-type="string" calcext:value-type="string">
            <text:p><text:a xlink:href="https://hal.science/hal-05341025v1" xlink:type="simple">https://hal.science/hal-05341025v1</text:a></text:p>
          </table:table-cell>
          <table:table-cell table:number-columns-repeated="3"/>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3"/>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523999v1" xlink:type="simple">https://hal.science/hal-05523999v1</text:a></text:p>
          </table:table-cell>
          <table:table-cell table:number-columns-repeated="3"/>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3"/>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number-columns-repeated="3"/>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number-columns-repeated="3"/>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2"/>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number-columns-repeated="3"/>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number-columns-repeated="3"/>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1"/>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034648v1" xlink:type="simple">https://hal.science/hal-05034648v1</text:a></text:p>
          </table:table-cell>
          <table:table-cell table:number-columns-repeated="3"/>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2"/>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number-columns-repeated="3"/>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number-columns-repeated="3"/>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2"/>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number-columns-repeated="3"/>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3"/>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number-columns-repeated="3"/>
          <table:table-cell table:style-name="ce5" office:value-type="string" calcext:value-type="string">
            <text:p><text:a xlink:href="https://arxivv.org/abs/2310.10190" xlink:type="simple">https://arxivv.org/abs/2310.10190</text:a></text:p>
          </table:table-cell>
          <table:table-cell table:number-columns-repeated="3"/>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2"/>
        </table:table-row>
        <table:table-row table:style-name="ro4">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4192" xlink:type="simple">https://inalelab.hypotheses.org/4192</text:a></text:p>
          </table:table-cell>
          <table:table-cell table:number-columns-repeated="3"/>
          <table:table-cell office:value-type="string" calcext:value-type="string">
            <text:p>Article surtout utile pour sa large bibliographie vers d'autres projets, avancées et concepts dans l'application d'IA au monde des images animés.</text:p>
          </table:table-cell>
          <table:table-cell table:number-columns-repeated="16373"/>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642" xlink:type="simple">https://inalelab.hypotheses.org/642</text:a></text:p>
          </table:table-cell>
          <table:table-cell table:number-columns-repeated="3"/>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3"/>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number-columns-repeated="3"/>
          <table:table-cell table:style-name="ce5" office:value-type="string" calcext:value-type="string">
            <text:p><text:a xlink:href="https://arxiv.org/abs/1910.07179" xlink:type="simple">https://arxiv.org/abs/1910.07179 </text:a></text:p>
          </table:table-cell>
          <table:table-cell table:number-columns-repeated="3"/>
          <table:table-cell office:value-type="string" calcext:value-type="string">
            <text:p>Article d'approfondissement de la technologie BERT pour la génération de SQL à partir de texte. </text:p>
          </table:table-cell>
          <table:table-cell table:number-columns-repeated="16373"/>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4765262" xlink:type="simple">https://dumas.ccsd.cnrs.fr/dumas-04765262</text:a></text:p>
          </table:table-cell>
          <table:table-cell table:number-columns-repeated="3"/>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1"/>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number-columns-repeated="3"/>
          <table:table-cell table:style-name="ce5" office:value-type="string" calcext:value-type="string">
            <text:p><text:a xlink:href="https://hal.science/hal-02970302" xlink:type="simple">https://hal.science/hal-02970302</text:a></text:p>
          </table:table-cell>
          <table:table-cell table:number-columns-repeated="3"/>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1"/>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number-columns-repeated="3"/>
          <table:table-cell table:style-name="ce5" office:value-type="string" calcext:value-type="string">
            <text:p><text:a xlink:href="https://shs.cairn.info/revue-reseaux-2014-6-page-25" xlink:type="simple">https://shs.cairn.info/revue-reseaux-2014-6-page-25</text:a></text:p>
          </table:table-cell>
          <table:table-cell table:number-columns-repeated="3"/>
          <table:table-cell office:value-type="string" calcext:value-type="string">
            <text:p>Article de 2014 qui propose des pistes de réflexions quant à l'évolution et l'utilisatioon du NLP </text:p>
          </table:table-cell>
          <table:table-cell table:number-columns-repeated="16373"/>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number-columns-repeated="3"/>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table:number-columns-repeated="3"/>
          <table:table-cell office:value-type="string" calcext:value-type="string">
            <text:p>Article WEB qui présent l'intérêt, et la réalisation technique, de combiner un modèle YOLO et SAM2 pour la segmentation de vidéos. </text:p>
          </table:table-cell>
          <table:table-cell table:number-columns-repeated="16373"/>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intelligent-search" xlink:type="simple">https://www.ibm.com/fr-fr/think/topics/intelligent-search</text:a></text:p>
          </table:table-cell>
          <table:table-cell table:number-columns-repeated="3"/>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1"/>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number-columns-repeated="3"/>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table:number-columns-repeated="3"/>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1"/>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number-columns-repeated="3"/>
          <table:table-cell table:style-name="ce5" office:value-type="string" calcext:value-type="string">
            <text:p><text:a xlink:href="https://arxiv.org/abs/2408.00714" xlink:type="simple">https://arxiv.org/abs/2408.00714</text:a></text:p>
          </table:table-cell>
          <table:table-cell table:number-columns-repeated="3"/>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2"/>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number-columns-repeated="3"/>
          <table:table-cell table:style-name="ce5" office:value-type="string" calcext:value-type="string">
            <text:p><text:a xlink:href="https://arxiv.org/abs/2507.22792" xlink:type="simple">https://arxiv.org/abs/2507.22792</text:a></text:p>
          </table:table-cell>
          <table:table-cell table:number-columns-repeated="3"/>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2"/>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number-columns-repeated="3"/>
          <table:table-cell table:style-name="ce5" office:value-type="string" calcext:value-type="string">
            <text:p><text:a xlink:href="https://cinergie.unibo.it/article/view/13082" xlink:type="simple">https://cinergie.unibo.it/article/view/13082</text:a></text:p>
          </table:table-cell>
          <table:table-cell table:number-columns-repeated="3"/>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2"/>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number-columns-repeated="3"/>
          <table:table-cell table:style-name="ce5" office:value-type="string" calcext:value-type="string">
            <text:p><text:a xlink:href="https://arxiv.org/abs/2004.01888" xlink:type="simple">https://arxiv.org/abs/2004.01888</text:a></text:p>
          </table:table-cell>
          <table:table-cell table:number-columns-repeated="3"/>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3"/>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number-columns-repeated="3"/>
          <table:table-cell table:style-name="ce5" office:value-type="string" calcext:value-type="string">
            <text:p><text:a xlink:href="https://arxiv.org/abs/2509.11772" xlink:type="simple">https://arxiv.org/abs/2509.11772</text:a></text:p>
          </table:table-cell>
          <table:table-cell table:number-columns-repeated="3"/>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3"/>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number-columns-repeated="3"/>
          <table:table-cell table:style-name="ce5" office:value-type="string" calcext:value-type="string">
            <text:p><text:a xlink:href="https://arxiv.org/abs/2212.04114" xlink:type="simple">https://arxiv.org/abs/2212.04114</text:a></text:p>
          </table:table-cell>
          <table:table-cell table:number-columns-repeated="3"/>
          <table:table-cell office:value-type="string" calcext:value-type="string">
            <text:p>Article de présentation du concept de GeM afin de fiabiliser la reconnaissance de l'architecture afin d'identifier un lieu. </text:p>
          </table:table-cell>
          <table:table-cell table:number-columns-repeated="16373"/>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number-columns-repeated="3"/>
          <table:table-cell table:style-name="ce5" office:value-type="string" calcext:value-type="string">
            <text:p><text:a xlink:href="https://arxiv.org/abs/2307.05845" xlink:type="simple">https://arxiv.org/abs/2307.05845</text:a></text:p>
          </table:table-cell>
          <table:table-cell table:number-columns-repeated="3"/>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2"/>
        </table:table-row>
        <table:table-row table:style-name="ro1">
          <table:table-cell/>
          <table:table-cell table:style-name="ce4"/>
          <table:table-cell table:number-columns-repeated="4"/>
          <table:table-cell table:style-name="ce5"/>
          <table:table-cell table:number-columns-repeated="16377"/>
        </table:table-row>
        <table:table-row table:style-name="ro3">
          <table:table-cell office:value-type="string" calcext:value-type="string">
            <text:p>Europeana enrichies its data with the AAT</text:p>
          </table:table-cell>
          <table:table-cell table:number-columns-repeated="5"/>
          <table:table-cell table:style-name="ce5" office:value-type="string" calcext:value-type="string">
            <text:p><text:a xlink:href="https://pro.europeana.eu/page/europeana-aat" xlink:type="simple">https://pro.europeana.eu/page/europeana-aat</text:a></text:p>
          </table:table-cell>
          <table:table-cell table:number-columns-repeated="3"/>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3"/>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number-columns-repeated="3"/>
          <table:table-cell table:style-name="ce5" office:value-type="string" calcext:value-type="string">
            <text:p><text:a xlink:href="https://memoriav.ch/fr/actualite/preparer-les-archives-pour-lere-de-lia" xlink:type="simple">https://memoriav.ch/fr/actualite/preparer-les-archives-pour-lere-de-lia</text:a></text:p>
          </table:table-cell>
          <table:table-cell table:number-columns-repeated="3"/>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3"/>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number-columns-repeated="3"/>
          <table:table-cell table:style-name="ce5" office:value-type="string" calcext:value-type="string">
            <text:p><text:a xlink:href="https://arxiv.org/abs/1810.04805" xlink:type="simple">https://arxiv.org/abs/1810.04805 </text:a></text:p>
          </table:table-cell>
          <table:table-cell table:number-columns-repeated="3"/>
          <table:table-cell office:value-type="string" calcext:value-type="string">
            <text:p>Article de présentation du projet BERT et de ses avancées. il s'attarde surtout sur l'entraînement du modèle, le besoin et l'objectif final. </text:p>
          </table:table-cell>
          <table:table-cell table:number-columns-repeated="16373"/>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number-columns-repeated="3"/>
          <table:table-cell table:style-name="ce5" office:value-type="string" calcext:value-type="string">
            <text:p><text:a xlink:href="https://arxiv.org/abs/2005.08314" xlink:type="simple">https://arxiv.org/abs/2005.08314</text:a></text:p>
          </table:table-cell>
          <table:table-cell table:number-columns-repeated="3"/>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3"/>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number-columns-repeated="3"/>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number-columns-repeated="3"/>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3"/>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number-columns-repeated="3"/>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number-columns-repeated="3"/>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2"/>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number-columns-repeated="3"/>
          <table:table-cell table:style-name="ce5" office:value-type="string" calcext:value-type="string">
            <text:p><text:a xlink:href="https://arxiv.org/pdf/2509.01304" xlink:type="simple">https://arxiv.org/pdf/2509.01304</text:a></text:p>
          </table:table-cell>
          <table:table-cell table:number-columns-repeated="3"/>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3"/>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number-columns-repeated="3"/>
          <table:table-cell table:style-name="ce5" office:value-type="string" calcext:value-type="string">
            <text:p><text:a xlink:href="https://revues.imist.ma/index.php/JIS/article/view/54261/29964" xlink:type="simple">https://revues.imist.ma/index.php/JIS/article/view/54261/29964</text:a></text:p>
          </table:table-cell>
          <table:table-cell table:number-columns-repeated="3"/>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3"/>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number-columns-repeated="3"/>
          <table:table-cell table:style-name="ce5" office:value-type="string" calcext:value-type="string">
            <text:p><text:a xlink:href="https://irjss.com/index.php/journal/article/view/26" xlink:type="simple">https://irjss.com/index.php/journal/article/view/26</text:a></text:p>
          </table:table-cell>
          <table:table-cell table:number-columns-repeated="3"/>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3"/>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number-columns-repeated="3"/>
          <table:table-cell table:style-name="ce5" office:value-type="string" calcext:value-type="string">
            <text:p><text:a xlink:href="https://pmc.ncbi.nlm.nih.gov/articles/PMC13091622/" xlink:type="simple">https://pmc.ncbi.nlm.nih.gov/articles/PMC13091622/</text:a></text:p>
          </table:table-cell>
          <table:table-cell table:number-columns-repeated="3"/>
          <table:table-cell office:value-type="string" calcext:value-type="string">
            <text:p>Article qui expose les limites de l'indexation par IA, notamment l'indexation totalement automatisée.</text:p>
          </table:table-cell>
          <table:table-cell table:number-columns-repeated="16373"/>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number-columns-repeated="3"/>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table:number-columns-repeated="3"/>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3"/>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number-columns-repeated="3"/>
          <table:table-cell table:style-name="ce5" office:value-type="string" calcext:value-type="string">
            <text:p><text:a xlink:href="https://arxiv.org/abs/2504.09738" xlink:type="simple">https://arxiv.org/abs/2504.09738</text:a></text:p>
          </table:table-cell>
          <table:table-cell table:number-columns-repeated="3"/>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3"/>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number-columns-repeated="3"/>
          <table:table-cell table:style-name="ce5" office:value-type="string" calcext:value-type="string">
            <text:p><text:a xlink:href="https://fast.io/resources/ocr-metadata-extraction-scanned-documents/" xlink:type="simple">https://fast.io/resources/ocr-metadata-extraction-scanned-documents/</text:a></text:p>
          </table:table-cell>
          <table:table-cell table:number-columns-repeated="3"/>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1"/>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number-columns-repeated="3"/>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table:number-columns-repeated="3"/>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3"/>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number-columns-repeated="3"/>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number-columns-repeated="3"/>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2"/>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number-columns-repeated="3"/>
          <table:table-cell table:style-name="ce5" office:value-type="string" calcext:value-type="string">
            <text:p><text:a xlink:href="https://arxiv.org/abs/2301.12597" xlink:type="simple">https://arxiv.org/abs/2301.12597</text:a></text:p>
          </table:table-cell>
          <table:table-cell table:number-columns-repeated="3"/>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3"/>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number-columns-repeated="3"/>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table:number-columns-repeated="3"/>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1"/>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number-columns-repeated="3"/>
          <table:table-cell table:style-name="ce5" office:value-type="string" calcext:value-type="string">
            <text:p><text:a xlink:href="https://link.springer.com/article/10.1007/s00521-025-11449-2" xlink:type="simple">https://link.springer.com/article/10.1007/s00521-025-11449-2</text:a></text:p>
          </table:table-cell>
          <table:table-cell table:number-columns-repeated="3"/>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3"/>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number-columns-repeated="3"/>
          <table:table-cell table:style-name="ce5" office:value-type="string" calcext:value-type="string">
            <text:p><text:a xlink:href="https://arxiv.org/abs/2605.09295" xlink:type="simple">https://arxiv.org/abs/2605.09295</text:a></text:p>
          </table:table-cell>
          <table:table-cell table:number-columns-repeated="3"/>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3"/>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number-columns-repeated="3"/>
          <table:table-cell table:style-name="ce5" office:value-type="string" calcext:value-type="string">
            <text:p><text:a xlink:href="https://arxiv.org/abs/2605.03465" xlink:type="simple">https://arxiv.org/abs/2605.03465</text:a></text:p>
          </table:table-cell>
          <table:table-cell table:number-columns-repeated="3"/>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3"/>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number-columns-repeated="3"/>
          <table:table-cell table:style-name="ce5" office:value-type="string" calcext:value-type="string">
            <text:p><text:a xlink:href="https://arxiv.org/abs/2605.02815" xlink:type="simple">https://arxiv.org/abs/2605.02815</text:a></text:p>
          </table:table-cell>
          <table:table-cell table:number-columns-repeated="3"/>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3"/>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number-columns-repeated="3"/>
          <table:table-cell table:style-name="ce5" office:value-type="string" calcext:value-type="string">
            <text:p><text:a xlink:href="https://arxiv.org/abs/2604.06736" xlink:type="simple">https://arxiv.org/abs/2604.06736</text:a></text:p>
          </table:table-cell>
          <table:table-cell table:number-columns-repeated="3"/>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3"/>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number-columns-repeated="3"/>
          <table:table-cell table:style-name="ce5" office:value-type="string" calcext:value-type="string">
            <text:p><text:a xlink:href="https://arxiv.org/abs/2603.20576" xlink:type="simple">https://arxiv.org/abs/2603.20576</text:a></text:p>
          </table:table-cell>
          <table:table-cell table:number-columns-repeated="3"/>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3"/>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number-columns-repeated="3"/>
          <table:table-cell table:style-name="ce5" office:value-type="string" calcext:value-type="string">
            <text:p><text:a xlink:href="https://arxiv.org/abs/2604.13045" xlink:type="simple">https://arxiv.org/abs/2604.13045</text:a></text:p>
          </table:table-cell>
          <table:table-cell table:number-columns-repeated="3"/>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3"/>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number-columns-repeated="3"/>
          <table:table-cell table:style-name="ce5" office:value-type="string" calcext:value-type="string">
            <text:p><text:a xlink:href="https://arxiv.org/html/2502.11201v1" xlink:type="simple">https://arxiv.org/html/2502.11201v1</text:a></text:p>
          </table:table-cell>
          <table:table-cell table:number-columns-repeated="3"/>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2"/>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number-columns-repeated="3"/>
          <table:table-cell table:style-name="ce5" office:value-type="string" calcext:value-type="string">
            <text:p><text:a xlink:href="https://docs.queryloop.ai/features/text-to-nosql/" xlink:type="simple">https://docs.queryloop.ai/features/text-to-nosql/</text:a></text:p>
          </table:table-cell>
          <table:table-cell table:number-columns-repeated="3"/>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2"/>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number-columns-repeated="3"/>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number-columns-repeated="3"/>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3"/>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number-columns-repeated="3"/>
          <table:table-cell table:style-name="ce5" office:value-type="string" calcext:value-type="string">
            <text:p><text:a xlink:href="https://ieeexplore.ieee.org/document/10825998" xlink:type="simple">https://ieeexplore.ieee.org/document/10825998</text:a></text:p>
          </table:table-cell>
          <table:table-cell table:number-columns-repeated="3"/>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3"/>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number-columns-repeated="3"/>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number-columns-repeated="3"/>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3"/>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link.springer.com/chapter/10.1007/978-3-032-18857-1_45" xlink:type="simple">https://link.springer.com/chapter/10.1007/978-3-032-18857-1_45</text:a></text:p>
          </table:table-cell>
          <table:table-cell table:number-columns-repeated="3"/>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3"/>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number-columns-repeated="3"/>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number-columns-repeated="3"/>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3"/>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papers.ssrn.com/sol3/papers.cfm?abstract_id=3436631" xlink:type="simple">https://papers.ssrn.com/sol3/papers.cfm?abstract_id=3436631</text:a></text:p>
          </table:table-cell>
          <table:table-cell table:number-columns-repeated="3"/>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3"/>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number-columns-repeated="3"/>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number-columns-repeated="3"/>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3"/>
        </table:table-row>
        <table:table-row table:style-name="ro5" table:number-rows-repeated="1048453">
          <table:table-cell table:number-columns-repeated="16384"/>
        </table:table-row>
        <table:table-row table:style-name="ro5">
          <table:table-cell table:number-columns-repeated="16384"/>
        </table:table-row>
      </table:table>
      <table:table table:name="NLP" table:style-name="ta4">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 table:number-columns-repeated="1637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link_20_1" style:display-name="Hyperlink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loext:opacity="1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2"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3" style:family="text">
      <style:text-properties fo:color="#000000" loext:opacity="100%" style:text-outline="false" style:text-line-through-style="none" style:text-line-through-type="none" style:text-position="0% 100%" style:font-name="Apto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0">00/00/0000</text:date>, <text:time style:data-style-name="N2" text:time-value="08:37:14.3757555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ts_20_" style:display-name="PageStyle_Projets "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20_de_20_recherche" style:display-name="PageStyle_Articles de recherch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NLP" style:display-name="PageStyle_NLP"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5f_lecture" style:display-name="PageStyle_articles_lectur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08:57:52</meta:creation-date>
    <dc:language>en-US</dc:language>
    <dc:date>2026-06-20T15:56:00.977949038</dc:date>
    <meta:editing-cycles>9</meta:editing-cycles>
    <meta:editing-duration>P4DT59M20S</meta:editing-duration>
    <meta:generator>LibreOffice/24.2.7.2$Linux_X86_64 LibreOffice_project/420$Build-2</meta:generator>
    <meta:document-statistic meta:table-count="4" meta:cell-count="1896" meta:object-count="0"/>
    <meta:user-defined meta:name="AppVersion">15.0000</meta:user-defined>
    <meta:user-defined meta:name="ContentTypeId">0x01010027F978398CE11B4B82B846683B37D1F4</meta:user-defined>
    <meta:user-defined meta:name="MSIP_Label_d46567e7-166b-4744-b80e-3f320535890a_ActionId">068132fe-9bdb-42fd-aa0e-ff243dc23136</meta:user-defined>
    <meta:user-defined meta:name="MSIP_Label_d46567e7-166b-4744-b80e-3f320535890a_ContentBits">2</meta:user-defined>
    <meta:user-defined meta:name="MSIP_Label_d46567e7-166b-4744-b80e-3f320535890a_Enabled" meta:value-type="string">true</meta:user-defined>
    <meta:user-defined meta:name="MSIP_Label_d46567e7-166b-4744-b80e-3f320535890a_Method" meta:value-type="string">Privileged</meta:user-defined>
    <meta:user-defined meta:name="MSIP_Label_d46567e7-166b-4744-b80e-3f320535890a_Name" meta:value-type="string">C2</meta:user-defined>
    <meta:user-defined meta:name="MSIP_Label_d46567e7-166b-4744-b80e-3f320535890a_SetDate" meta:value-type="string">2026-05-06T09:09:21Z</meta:user-defined>
    <meta:user-defined meta:name="MSIP_Label_d46567e7-166b-4744-b80e-3f320535890a_SiteId" meta:value-type="string">a6d5a5dc-4238-44bc-960a-b6120f0138c8</meta:user-defined>
    <meta:user-defined meta:name="MSIP_Label_d46567e7-166b-4744-b80e-3f320535890a_Tag" meta:value-type="string">10, 0, 1, 2</meta:user-defined>
    <meta:user-defined meta:name="MediaServiceImageTags" meta:value-type="string"/>
  </office:meta>
</office:document-meta>
</file>