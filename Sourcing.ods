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swiss" style:font-pitch="variable"/>
    <style:font-face style:name="Calibri" svg:font-family="Calibri" style:font-family-generic="swiss"/>
    <style:font-face style:name="Calibri1" svg:font-family="Calibri"/>
    <style:font-face style:name="Calibri2" svg:font-family="Calibri"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7047in"/>
    </style:style>
    <style:style style:name="co2" style:family="table-column">
      <style:table-column-properties fo:break-before="auto" style:column-width="4.6689in"/>
    </style:style>
    <style:style style:name="co3" style:family="table-column">
      <style:table-column-properties fo:break-before="auto" style:column-width="1.2555in"/>
    </style:style>
    <style:style style:name="co4" style:family="table-column">
      <style:table-column-properties fo:break-before="auto" style:column-width="0.8035in"/>
    </style:style>
    <style:style style:name="co5" style:family="table-column">
      <style:table-column-properties fo:break-before="auto" style:column-width="10.3516in"/>
    </style:style>
    <style:style style:name="co6" style:family="table-column">
      <style:table-column-properties fo:break-before="auto" style:column-width="3.8543in"/>
    </style:style>
    <style:style style:name="co7" style:family="table-column">
      <style:table-column-properties fo:break-before="auto" style:column-width="16.3083in"/>
    </style:style>
    <style:style style:name="co8" style:family="table-column">
      <style:table-column-properties fo:break-before="auto" style:column-width="5.7929in"/>
    </style:style>
    <style:style style:name="co9" style:family="table-column">
      <style:table-column-properties fo:break-before="auto" style:column-width="1.3984in"/>
    </style:style>
    <style:style style:name="co10" style:family="table-column">
      <style:table-column-properties fo:break-before="auto" style:column-width="1.8165in"/>
    </style:style>
    <style:style style:name="co11" style:family="table-column">
      <style:table-column-properties fo:break-before="auto" style:column-width="4.998in"/>
    </style:style>
    <style:style style:name="co12" style:family="table-column">
      <style:table-column-properties fo:break-before="auto" style:column-width="1.2335in"/>
    </style:style>
    <style:style style:name="co13" style:family="table-column">
      <style:table-column-properties fo:break-before="auto" style:column-width="1.1783in"/>
    </style:style>
    <style:style style:name="co14" style:family="table-column">
      <style:table-column-properties fo:break-before="auto" style:column-width="4.9555in"/>
    </style:style>
    <style:style style:name="co15" style:family="table-column">
      <style:table-column-properties fo:break-before="auto" style:column-width="10.2409in"/>
    </style:style>
    <style:style style:name="co16" style:family="table-column">
      <style:table-column-properties fo:break-before="auto" style:column-width="4.6862in"/>
    </style:style>
    <style:style style:name="co17" style:family="table-column">
      <style:table-column-properties fo:break-before="auto" style:column-width="0.6382in"/>
    </style:style>
    <style:style style:name="co18" style:family="table-column">
      <style:table-column-properties fo:break-before="auto" style:column-width="0.6736in"/>
    </style:style>
    <style:style style:name="co19" style:family="table-column">
      <style:table-column-properties fo:break-before="auto" style:column-width="5.0827in"/>
    </style:style>
    <style:style style:name="co20" style:family="table-column">
      <style:table-column-properties fo:break-before="auto" style:column-width="7.5382in"/>
    </style:style>
    <style:style style:name="co21" style:family="table-column">
      <style:table-column-properties fo:break-before="auto" style:column-width="1.2937in"/>
    </style:style>
    <style:style style:name="ro1" style:family="table-row">
      <style:table-row-properties style:row-height="0.2083in" fo:break-before="auto" style:use-optimal-row-height="true"/>
    </style:style>
    <style:style style:name="ro2" style:family="table-row">
      <style:table-row-properties style:row-height="0.3937in" fo:break-before="auto" style:use-optimal-row-height="true"/>
    </style:style>
    <style:style style:name="ro3" style:family="table-row">
      <style:table-row-properties style:row-height="0.5799in" fo:break-before="auto" style:use-optimal-row-height="true"/>
    </style:style>
    <style:style style:name="ro4" style:family="table-row">
      <style:table-row-properties style:row-height="0.7665in" fo:break-before="auto" style:use-optimal-row-height="true"/>
    </style:style>
    <style:style style:name="ro5" style:family="table-row">
      <style:table-row-properties style:row-height="1.1398in" fo:break-before="auto" style:use-optimal-row-height="true"/>
    </style:style>
    <style:style style:name="ro6" style:family="table-row">
      <style:table-row-properties style:row-height="1.5134in" fo:break-before="auto" style:use-optimal-row-height="true"/>
    </style:style>
    <style:style style:name="ro7" style:family="table-row">
      <style:table-row-properties style:row-height="0.9535in" fo:break-before="auto" style:use-optimal-row-height="true"/>
    </style:style>
    <style:style style:name="ro8" style:family="table-row">
      <style:table-row-properties style:row-height="1.3264in" fo:break-before="auto" style:use-optimal-row-height="true"/>
    </style:style>
    <style:style style:name="ro9" style:family="table-row">
      <style:table-row-properties style:row-height="2.2591in" fo:break-before="auto" style:use-optimal-row-height="true"/>
    </style:style>
    <style:style style:name="ro10" style:family="table-row">
      <style:table-row-properties style:row-height="1.6992in" fo:break-before="auto" style:use-optimal-row-height="true"/>
    </style:style>
    <style:style style:name="ro11" style:family="table-row">
      <style:table-row-properties style:row-height="1.8862in" fo:break-before="auto" style:use-optimal-row-height="true"/>
    </style:style>
    <style:style style:name="ro12" style:family="table-row">
      <style:table-row-properties style:row-height="2.8189in" fo:break-before="auto" style:use-optimal-row-height="true"/>
    </style:style>
    <style:style style:name="ro13" style:family="table-row">
      <style:table-row-properties style:row-height="2.0728in" fo:break-before="auto" style:use-optimal-row-height="true"/>
    </style:style>
    <style:style style:name="ta1" style:family="table" style:master-page-name="PageStyle_5f_Projets_20_">
      <style:table-properties table:display="true" style:writing-mode="lr-tb"/>
    </style:style>
    <style:style style:name="ta2" style:family="table" style:master-page-name="PageStyle_5f_Articles_20_de_20_recherche">
      <style:table-properties table:display="true" style:writing-mode="lr-tb"/>
    </style:style>
    <style:style style:name="ta3" style:family="table" style:master-page-name="PageStyle_5f_articles_5f_lecture">
      <style:table-properties table:display="true" style:writing-mode="lr-tb"/>
    </style:style>
    <style:style style:name="ta4" style:family="table" style:master-page-name="PageStyle_5f_NLP">
      <style:table-properties table:display="true" style:writing-mode="lr-tb"/>
    </style:style>
    <style:style style:name="ce1"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2"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3"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4"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Hyperlink_20_1" style:data-style-name="N0">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loext:char-complex-color loext:theme-type="hyperlink" loext:color-type="theme"/>
      </style:text-properties>
    </style:style>
    <style:style style:name="ce6"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7" style:family="table-cell" style:parent-style-name="Default"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8" style:family="table-cell" style:parent-style-name="Hyperlink_20_1" style:data-style-name="N0">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563c1"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hyperlink" loext:color-type="theme"/>
      </style:text-properties>
    </style:style>
    <style:style style:name="ce9" style:family="table-cell" style:parent-style-name="Hyperlink_20_1" style:data-style-name="N0">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563c1" style:text-outline="false" style:text-line-through-style="none" style:text-line-through-type="none" style:font-name="Calibri1"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font-name="Liberation Serif" fo:font-size="10pt" style:font-name-asian="DejaVu Sans" style:font-size-asian="10pt" style:font-name-complex="Noto Sans Arabic UI" style:font-size-complex="10pt"/>
    </style:style>
    <style:style style:name="ce1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2"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T1" style:family="text">
      <style:text-properties fo:color="#000000" style:font-name="Calibri1"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2" style:family="text">
      <style:text-properties fo:color="#000000" style:font-name="Calibri1" fo:font-size="11pt" fo:font-weight="normal" style:text-underline-style="none" style:text-underline-color="font-color" style:text-line-through-type="none" style:text-outline="false" fo:text-shadow="none" style:text-position="0% 100%" style:font-size-asian="11pt" style:font-size-complex="11pt" style:font-weight-asian="normal" style:font-weight-complex="normal" fo:font-style="italic" style:font-style-asian="italic" style:font-style-complex="italic"/>
    </style:style>
    <style:style style:name="T3" style:family="text">
      <style:text-properties fo:color="#000000" style:font-name="Calibri1" fo:font-size="11pt" fo:font-weight="normal" style:text-underline-style="none" style:text-underline-color="font-color" style:text-line-through-type="none" style:text-outline="false" fo:text-shadow="none" style:text-position="0% 100%" style:font-size-asian="11pt" style:font-size-complex="11pt" style:font-weight-asian="normal" style:font-weight-complex="normal" fo:font-style="normal" style:font-style-asian="normal" style:font-style-complex="normal"/>
    </style:style>
    <style:style style:name="T4" style:family="text">
      <style:text-properties fo:color="#0563c1" style:font-name="Calibri1" fo:font-size="11pt" fo:font-weight="normal" style:text-underline-style="solid" style:text-underline-width="auto"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5" style:family="text">
      <style:text-properties fo:color="#0563c1" style:font-name="Calibri1" fo:font-size="11pt" fo:font-weight="normal" style:text-underline-style="solid" style:text-underline-width="auto" style:text-underline-color="font-color" style:text-line-through-type="none" style:text-outline="false" fo:text-shadow="none" style:text-position="0% 100%" style:font-size-asian="11pt" style:font-size-complex="11pt" style:font-weight-asian="normal" style:font-weight-complex="normal" fo:font-style="italic" style:font-style-asian="italic" style:font-style-complex="italic"/>
    </style:style>
    <style:style style:name="T6" style:family="text">
      <style:text-properties fo:color="#0563c1" style:font-name="Calibri1" fo:font-size="11pt" fo:font-weight="normal" style:text-underline-style="solid" style:text-underline-width="auto" style:text-underline-color="font-color" style:text-line-through-type="none" style:text-outline="false" fo:text-shadow="none" style:text-position="0% 100%" style:font-size-asian="11pt" style:font-size-complex="11pt" style:font-weight-asian="normal" style:font-weight-complex="normal" fo:font-style="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rojets "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 table:number-columns-repeated="16374" table:default-cell-style-name="ce1"/>
        <table:table-row table:style-name="ro1" table:number-rows-repeated="2">
          <table:table-cell table:number-columns-repeated="16384"/>
        </table:table-row>
        <table:table-row table:style-name="ro1">
          <table:table-cell table:style-name="ce2" office:value-type="string" calcext:value-type="string">
            <text:p>Type</text:p>
          </table:table-cell>
          <table:table-cell table:style-name="ce3" office:value-type="string" calcext:value-type="string">
            <text:p>Titre</text:p>
          </table:table-cell>
          <table:table-cell table:style-name="ce2" office:value-type="string" calcext:value-type="string">
            <text:p>Auteur</text:p>
          </table:table-cell>
          <table:table-cell table:style-name="ce3" office:value-type="string" calcext:value-type="string">
            <text:p>Sujet</text:p>
          </table:table-cell>
          <table:table-cell table:style-name="ce3" office:value-type="string" calcext:value-type="string">
            <text:p>Lien</text:p>
          </table:table-cell>
          <table:table-cell table:style-name="ce3" office:value-type="string" calcext:value-type="string">
            <text:p>Autre lien</text:p>
          </table:table-cell>
          <table:table-cell table:style-name="ce3" office:value-type="string" calcext:value-type="string">
            <text:p>Résumé</text:p>
          </table:table-cell>
          <table:table-cell table:style-name="ce3" office:value-type="string" calcext:value-type="string">
            <text:p>Outils cités</text:p>
          </table:table-cell>
          <table:table-cell table:style-name="ce3" office:value-type="string" calcext:value-type="string">
            <text:p>Technologies citées</text:p>
          </table:table-cell>
          <table:table-cell table:number-columns-repeated="16375"/>
        </table:table-row>
        <table:table-row table:style-name="ro2">
          <table:table-cell office:value-type="string" calcext:value-type="string">
            <text:p>Open source</text:p>
          </table:table-cell>
          <table:table-cell office:value-type="string" calcext:value-type="string">
            <text:p>Vitrivr</text:p>
          </table:table-cell>
          <table:table-cell office:value-type="string" calcext:value-type="string">
            <text:p>University of Basel</text:p>
          </table:table-cell>
          <table:table-cell office:value-type="string" calcext:value-type="string">
            <text:p>Indexation/NLP</text:p>
          </table:table-cell>
          <table:table-cell table:style-name="ce5" office:value-type="string" calcext:value-type="string">
            <text:p><text:a xlink:href="https://vitrivr.org/vitrivr.html" xlink:type="simple">https://vitrivr.org/vitrivr.html</text:a></text:p>
          </table:table-cell>
          <table:table-cell table:style-name="ce5"/>
          <table:table-cell office:value-type="string" calcext:value-type="string">
            <text:p>outil open source de recherche par image dans des collections vidéo. Il propose une architecture en trois éléments : shot segmentation, feature extraction, query processing. </text:p>
            <text:p>Modes de recherche que l’outil permet : query by sketch, query by example, query by text, recherche multimodale. </text:p>
          </table:table-cell>
          <table:table-cell table:number-columns-repeated="16377"/>
        </table:table-row>
        <table:table-row table:style-name="ro2">
          <table:table-cell office:value-type="string" calcext:value-type="string">
            <text:p>Open source</text:p>
          </table:table-cell>
          <table:table-cell office:value-type="string" calcext:value-type="string">
            <text:p>INA speech segmenter</text:p>
          </table:table-cell>
          <table:table-cell office:value-type="string" calcext:value-type="string">
            <text:p>INA</text:p>
          </table:table-cell>
          <table:table-cell office:value-type="string" calcext:value-type="string">
            <text:p>Indexation</text:p>
          </table:table-cell>
          <table:table-cell table:style-name="ce5" office:value-type="string" calcext:value-type="string">
            <text:p><text:a xlink:href="https://github.com/ina-foss/inaSpeechSegmenter" xlink:type="simple">https://github.com/ina-foss/inaSpeechSegmenter</text:a></text:p>
          </table:table-cell>
          <table:table-cell table:style-name="ce5"/>
          <table:table-cell office:value-type="string" calcext:value-type="string">
            <text:p>outil de segmentation audio : parole, musique, bruit développé par l’INA </text:p>
          </table:table-cell>
          <table:table-cell table:number-columns-repeated="16377"/>
        </table:table-row>
        <table:table-row table:style-name="ro2">
          <table:table-cell office:value-type="string" calcext:value-type="string">
            <text:p>Open source</text:p>
          </table:table-cell>
          <table:table-cell office:value-type="string" calcext:value-type="string">
            <text:p>INA face analyzer</text:p>
          </table:table-cell>
          <table:table-cell office:value-type="string" calcext:value-type="string">
            <text:p>INA</text:p>
          </table:table-cell>
          <table:table-cell office:value-type="string" calcext:value-type="string">
            <text:p>Indexation</text:p>
          </table:table-cell>
          <table:table-cell table:style-name="ce5" office:value-type="string" calcext:value-type="string">
            <text:p><text:a xlink:href="https://github.com/ina-foss/inaFaceAnalyzer" xlink:type="simple">https://github.com/ina-foss/inaFaceAnalyzer</text:a></text:p>
          </table:table-cell>
          <table:table-cell table:style-name="ce5"/>
          <table:table-cell office:value-type="string" calcext:value-type="string">
            <text:p>librairie python d’analyse de visages dans des images et vidéos, prédit l’âge et le sexe à partir de l’analyse d’un visage  </text:p>
          </table:table-cell>
          <table:table-cell table:number-columns-repeated="16377"/>
        </table:table-row>
        <table:table-row table:style-name="ro2">
          <table:table-cell office:value-type="string" calcext:value-type="string">
            <text:p>Open source</text:p>
          </table:table-cell>
          <table:table-cell office:value-type="string" calcext:value-type="string">
            <text:p>Whisper</text:p>
          </table:table-cell>
          <table:table-cell office:value-type="string" calcext:value-type="string">
            <text:p>OPENAI</text:p>
          </table:table-cell>
          <table:table-cell office:value-type="string" calcext:value-type="string">
            <text:p>Indexation</text:p>
          </table:table-cell>
          <table:table-cell table:style-name="ce5" office:value-type="string" calcext:value-type="string">
            <text:p><text:a xlink:href="https://github.com/openai/whisper" xlink:type="simple">https://github.com/openai/whisper</text:a></text:p>
          </table:table-cell>
          <table:table-cell table:style-name="ce5"/>
          <table:table-cell office:value-type="string" calcext:value-type="string">
            <text:p>modèle de reconnaisance de voix entraîné par OpenAI : reconnaissance de langue, traduction, </text:p>
          </table:table-cell>
          <table:table-cell table:number-columns-repeated="16377"/>
        </table:table-row>
        <table:table-row table:style-name="ro2">
          <table:table-cell office:value-type="string" calcext:value-type="string">
            <text:p>Open source</text:p>
          </table:table-cell>
          <table:table-cell office:value-type="string" calcext:value-type="string">
            <text:p>spaCY</text:p>
          </table:table-cell>
          <table:table-cell/>
          <table:table-cell office:value-type="string" calcext:value-type="string">
            <text:p>NLP</text:p>
          </table:table-cell>
          <table:table-cell table:style-name="ce5" office:value-type="string" calcext:value-type="string">
            <text:p><text:a xlink:href="https://github.com/explosion/spaCy" xlink:type="simple">https://github.com/explosion/spaCy</text:a></text:p>
          </table:table-cell>
          <table:table-cell table:style-name="ce5"/>
          <table:table-cell office:value-type="string" calcext:value-type="string">
            <text:p>Bibliothèque python de reconnaissance automatique des langues. Permet la tokenisation et la reconnaissance d'entités nommées. </text:p>
          </table:table-cell>
          <table:table-cell table:number-columns-repeated="16377"/>
        </table:table-row>
        <table:table-row table:style-name="ro2">
          <table:table-cell office:value-type="string" calcext:value-type="string">
            <text:p>Propriétaire</text:p>
          </table:table-cell>
          <table:table-cell office:value-type="string" calcext:value-type="string">
            <text:p>Amplify seiri</text:p>
          </table:table-cell>
          <table:table-cell/>
          <table:table-cell office:value-type="string" calcext:value-type="string">
            <text:p>Indexation</text:p>
          </table:table-cell>
          <table:table-cell table:style-name="ce5" office:value-type="string" calcext:value-type="string">
            <text:p><text:a xlink:href="https://www.amplifysoft.io/en/products/seiri-your-ai-assistant-for-extracting-metadata-and-cataloging-media-content/" xlink:type="simple">https://www.amplifysoft.io/en/products/seiri-your-ai-assistant-for-extracting-metadata-and-cataloging-media-content/</text:a></text:p>
          </table:table-cell>
          <table:table-cell table:style-name="ce5"/>
          <table:table-cell office:value-type="string" calcext:value-type="string">
            <text:p>plateforme d'extraction de métadonnées depuis des contenus audio et vidéo : NER avancée, OCR, reconnaissance faciale, transcription automatique de la parole en texte, reconnaissance de logos, reconnaissance de types de scènes, description d'images, segmentation sémantique, résumés de contenu, contenu, classification, storyboard par images clés, IA générative, modèles multimodaux et multilingues</text:p>
          </table:table-cell>
          <table:table-cell table:number-columns-repeated="16377"/>
        </table:table-row>
        <table:table-row table:style-name="ro2">
          <table:table-cell office:value-type="string" calcext:value-type="string">
            <text:p>Open source</text:p>
          </table:table-cell>
          <table:table-cell office:value-type="string" calcext:value-type="string">
            <text:p>Video-LLava</text:p>
          </table:table-cell>
          <table:table-cell/>
          <table:table-cell office:value-type="string" calcext:value-type="string">
            <text:p>Indexation</text:p>
          </table:table-cell>
          <table:table-cell table:style-name="ce5" office:value-type="string" calcext:value-type="string">
            <text:p><text:a xlink:href="https://github.com/PKU-YuanGroup/Video-LLaVA" xlink:type="simple">https://github.com/PKU-YuanGroup/Video-LLaVA</text:a></text:p>
          </table:table-cell>
          <table:table-cell table:style-name="ce5"/>
          <table:table-cell office:value-type="string" calcext:value-type="string">
            <text:p>Modèle IA qui permet de comprendre uniformément vidéos et images, répond à des questions à partir des vidéos, peut générer du texte et des schémas à partir de contenus vidéos. </text:p>
          </table:table-cell>
          <table:table-cell table:number-columns-repeated="16377"/>
        </table:table-row>
        <table:table-row table:style-name="ro2">
          <table:table-cell office:value-type="string" calcext:value-type="string">
            <text:p>Propriétaire</text:p>
          </table:table-cell>
          <table:table-cell office:value-type="string" calcext:value-type="string">
            <text:p>reelmind</text:p>
          </table:table-cell>
          <table:table-cell/>
          <table:table-cell office:value-type="string" calcext:value-type="string">
            <text:p>Indexation</text:p>
          </table:table-cell>
          <table:table-cell table:style-name="ce5" office:value-type="string" calcext:value-type="string">
            <text:p><text:a xlink:href="https://reelmind.ai/blog/automated-video-scene-detection-ai-for-seamless-editing" xlink:type="simple">https://reelmind.ai/blog/automated-video-scene-detection-ai-for-seamless-editing</text:a></text:p>
          </table:table-cell>
          <table:table-cell table:style-name="ce5"/>
          <table:table-cell office:value-type="string" calcext:value-type="string">
            <text:p>outil IA créé pour la création de contenu notamment et pour le montage vidéo. Detection de coupes et de transitions, groupe les scènes selon le contenu (dialogue, action, payasage)</text:p>
          </table:table-cell>
          <table:table-cell table:number-columns-repeated="16377"/>
        </table:table-row>
        <table:table-row table:style-name="ro2">
          <table:table-cell office:value-type="string" calcext:value-type="string">
            <text:p>Propriétaire</text:p>
          </table:table-cell>
          <table:table-cell office:value-type="string" calcext:value-type="string">
            <text:p>ResNet-152</text:p>
          </table:table-cell>
          <table:table-cell office:value-type="string" calcext:value-type="string">
            <text:p>Microsoft</text:p>
          </table:table-cell>
          <table:table-cell office:value-type="string" calcext:value-type="string">
            <text:p>Indexation</text:p>
          </table:table-cell>
          <table:table-cell table:style-name="ce5" office:value-type="string" calcext:value-type="string">
            <text:p><text:a xlink:href="https://resources.wolframcloud.com/NeuralNetRepository/resources/ResNet-152-Trained-on-ImageNet-Competition-Data/" xlink:type="simple">https://resources.wolframcloud.com/NeuralNetRepository/resources/ResNet-152-Trained-on-ImageNet-Competition-Data/</text:a></text:p>
          </table:table-cell>
          <table:table-cell table:style-name="ce5"/>
          <table:table-cell office:value-type="string" calcext:value-type="string">
            <text:p>outil de reconnaissance d'objets dans l'image. </text:p>
          </table:table-cell>
          <table:table-cell table:number-columns-repeated="16377"/>
        </table:table-row>
        <table:table-row table:style-name="ro2">
          <table:table-cell office:value-type="string" calcext:value-type="string">
            <text:p>Propriétaire</text:p>
          </table:table-cell>
          <table:table-cell office:value-type="string" calcext:value-type="string">
            <text:p>Archipanion </text:p>
          </table:table-cell>
          <table:table-cell/>
          <table:table-cell office:value-type="string" calcext:value-type="string">
            <text:p>NLP</text:p>
          </table:table-cell>
          <table:table-cell table:style-name="ce5" office:value-type="string" calcext:value-type="string">
            <text:p><text:a xlink:href="https://www.archipanion.com/fr/" xlink:type="simple">https://www.archipanion.com/fr/</text:a></text:p>
          </table:table-cell>
          <table:table-cell table:style-name="ce5"/>
          <table:table-cell office:value-type="string" calcext:value-type="string">
            <text:p>Outil IA propriétaire dédié aux collections patrimoniales qui propose de l'extraction automatique de métadonnées, de la recherche visuelle, de la recherche en langage naturel. Exemple d'application ici : https://archipanion.amorce.eu/fr </text:p>
          </table:table-cell>
          <table:table-cell table:number-columns-repeated="16377"/>
        </table:table-row>
        <table:table-row table:style-name="ro2">
          <table:table-cell office:value-type="string" calcext:value-type="string">
            <text:p>Open source</text:p>
          </table:table-cell>
          <table:table-cell office:value-type="string" calcext:value-type="string">
            <text:p>Tesseract</text:p>
          </table:table-cell>
          <table:table-cell/>
          <table:table-cell office:value-type="string" calcext:value-type="string">
            <text:p>NLP</text:p>
          </table:table-cell>
          <table:table-cell table:style-name="ce5" office:value-type="string" calcext:value-type="string">
            <text:p><text:a xlink:href="https://github.com/tesseract-ocr/tesseract" xlink:type="simple">https://github.com/tesseract-ocr/tesseract</text:a></text:p>
          </table:table-cell>
          <table:table-cell table:style-name="ce5"/>
          <table:table-cell office:value-type="string" calcext:value-type="string">
            <text:p>Outil open source de reconnaissance optique de caractères </text:p>
          </table:table-cell>
          <table:table-cell table:number-columns-repeated="16377"/>
        </table:table-row>
        <table:table-row table:style-name="ro2">
          <table:table-cell office:value-type="string" calcext:value-type="string">
            <text:p>Open source</text:p>
          </table:table-cell>
          <table:table-cell office:value-type="string" calcext:value-type="string">
            <text:p>2SDS</text:p>
          </table:table-cell>
          <table:table-cell/>
          <table:table-cell office:value-type="string" calcext:value-type="string">
            <text:p>Indexation</text:p>
          </table:table-cell>
          <table:table-cell table:style-name="ce5" office:value-type="string" calcext:value-type="string">
            <text:p><text:a xlink:href="https://github.com/miraclefactory/2sds" xlink:type="simple">https://github.com/miraclefactory/2sds</text:a></text:p>
          </table:table-cell>
          <table:table-cell table:style-name="ce5"/>
          <table:table-cell office:value-type="string" calcext:value-type="string">
            <text:p>Algorithme de segmentation temporelle pour l'analyse de flux video.</text:p>
          </table:table-cell>
          <table:table-cell table:number-columns-repeated="16377"/>
        </table:table-row>
        <table:table-row table:style-name="ro2">
          <table:table-cell office:value-type="string" calcext:value-type="string">
            <text:p>Open source</text:p>
          </table:table-cell>
          <table:table-cell office:value-type="string" calcext:value-type="string">
            <text:p>ViViT</text:p>
          </table:table-cell>
          <table:table-cell/>
          <table:table-cell office:value-type="string" calcext:value-type="string">
            <text:p>Indexation</text:p>
          </table:table-cell>
          <table:table-cell table:style-name="ce5" office:value-type="string" calcext:value-type="string">
            <text:p><text:a xlink:href="https://github.com/rishikksh20/ViViT-pytorch" xlink:type="simple">https://github.com/rishikksh20/ViViT-pytorch</text:a></text:p>
          </table:table-cell>
          <table:table-cell table:style-name="ce5"/>
          <table:table-cell office:value-type="string" calcext:value-type="string">
            <text:p>Video Vision Transformer : Modèle d'IA basé sur les transformers pour analyser des vidéos. Il est utilisé pour des tâches de vision vidéo pour la reconnaissance d'actions, compréhension de scènes, classification de vidéos. Ce modèle utilise les transformers et non le CNN. </text:p>
          </table:table-cell>
          <table:table-cell table:number-columns-repeated="16377"/>
        </table:table-row>
        <table:table-row table:style-name="ro2">
          <table:table-cell office:value-type="string" calcext:value-type="string">
            <text:p>Propriétiare</text:p>
          </table:table-cell>
          <table:table-cell office:value-type="string" calcext:value-type="string">
            <text:p>Video AI</text:p>
          </table:table-cell>
          <table:table-cell office:value-type="string" calcext:value-type="string">
            <text:p>Google</text:p>
          </table:table-cell>
          <table:table-cell office:value-type="string" calcext:value-type="string">
            <text:p>Indexation</text:p>
          </table:table-cell>
          <table:table-cell table:style-name="ce5" office:value-type="string" calcext:value-type="string">
            <text:p><text:a xlink:href="https://cloud.google.com/video-intelligence?utm_source=google&amp;utm_medium=cpc&amp;utm_campaign=Cloud-SS-DR-GCP-1713666-GCP-DR-EMEA-FR-fr-Google-BKWS-BRO-na&amp;utm_content=c-Hybrid+%7C+BKWS+-+BRO+%7C+Txt+-+AIML-AR+and+Video+APIs-Video+AI-490391486144&amp;utm_term=goog" xlink:type="simple">https://cloud.google.com/video-intelligence?utm_source=google&amp;utm_medium=cpc&amp;utm_campaign=Cloud-SS-DR-GCP-1713666-GCP-DR-EMEA-FR-fr-Google-BKWS-BRO-na&amp;utm_content=c-Hybrid+%7C+BKWS+-+BRO+%7C+Txt+-+AIML-AR+and+Video+APIs-Video+AI-490391486144&amp;utm_term=google+cloud+video+intelligence&amp;gclsrc=aw.ds&amp;gad_source=1&amp;gad_campaignid=23620115464&amp;gclid=EAIaIQobChMI__X1h63ClAMVqptoCR3R_zBhEAAYASAAEgJ7YfD_BwE</text:a></text:p>
          </table:table-cell>
          <table:table-cell table:style-name="ce5"/>
          <table:table-cell office:value-type="string" calcext:value-type="string">
            <text:p>Video AI est une API créée par Google basée sur des modèles de machine learning qui peuvent reconnaitre des lieux, objets et actions. Permet aussi d'annoter des vidéos, des séquences, des plans et des images. </text:p>
          </table:table-cell>
          <table:table-cell table:number-columns-repeated="16377"/>
        </table:table-row>
        <table:table-row table:style-name="ro2">
          <table:table-cell office:value-type="string" calcext:value-type="string">
            <text:p>Propriétaire</text:p>
          </table:table-cell>
          <table:table-cell office:value-type="string" calcext:value-type="string">
            <text:p>Azure AI video indexer </text:p>
          </table:table-cell>
          <table:table-cell office:value-type="string" calcext:value-type="string">
            <text:p>Microsoft</text:p>
          </table:table-cell>
          <table:table-cell office:value-type="string" calcext:value-type="string">
            <text:p>Indexation</text:p>
          </table:table-cell>
          <table:table-cell table:style-name="ce5" office:value-type="string" calcext:value-type="string">
            <text:p><text:a xlink:href="https://learn.microsoft.com/en-us/azure/azure-video-indexer/video-indexer-overview" xlink:type="simple">https://learn.microsoft.com/en-us/azure/azure-video-indexer/video-indexer-overview</text:a></text:p>
          </table:table-cell>
          <table:table-cell table:style-name="ce5"/>
          <table:table-cell office:value-type="string" calcext:value-type="string">
            <text:p>Azure video indexer est un modèle d'IA qui extrait des métadonnées de l'image et du son</text:p>
          </table:table-cell>
          <table:table-cell table:number-columns-repeated="16377"/>
        </table:table-row>
        <table:table-row table:style-name="ro2">
          <table:table-cell office:value-type="string" calcext:value-type="string">
            <text:p>Open source</text:p>
          </table:table-cell>
          <table:table-cell office:value-type="string" calcext:value-type="string">
            <text:p>Media Pipe</text:p>
          </table:table-cell>
          <table:table-cell office:value-type="string" calcext:value-type="string">
            <text:p>Google</text:p>
          </table:table-cell>
          <table:table-cell office:value-type="string" calcext:value-type="string">
            <text:p>Indexation</text:p>
          </table:table-cell>
          <table:table-cell table:style-name="ce5" office:value-type="string" calcext:value-type="string">
            <text:p><text:a xlink:href="https://github.com/michaelgallacher/opencv-pipeline" xlink:type="simple">https://github.com/michaelgallacher/opencv-pipeline</text:a></text:p>
          </table:table-cell>
          <table:table-cell table:style-name="ce5"/>
          <table:table-cell office:value-type="string" calcext:value-type="string">
            <text:p>MediaPipe est une pipeline qui inclut des modèles tels que la détection d'objets, la calssification d'image, la segmentation d'images, la segmentation interactive, détection de visages, détecteur de langue, classification audio. </text:p>
          </table:table-cell>
          <table:table-cell table:number-columns-repeated="16377"/>
        </table:table-row>
        <table:table-row table:style-name="ro2">
          <table:table-cell office:value-type="string" calcext:value-type="string">
            <text:p>Open source</text:p>
          </table:table-cell>
          <table:table-cell office:value-type="string" calcext:value-type="string">
            <text:p>Moe-VRD</text:p>
          </table:table-cell>
          <table:table-cell/>
          <table:table-cell office:value-type="string" calcext:value-type="string">
            <text:p>Indexation</text:p>
          </table:table-cell>
          <table:table-cell table:style-name="ce5" office:value-type="string" calcext:value-type="string">
            <text:p><text:a xlink:href="https://github.com/shibshib/Moe-VRD" xlink:type="simple">https://github.com/shibshib/Moe-VRD</text:a></text:p>
          </table:table-cell>
          <table:table-cell table:style-name="ce5"/>
          <table:table-cell office:value-type="string" calcext:value-type="string">
            <text:p>Moe-VRD est un modèle d'IA qui détecte les relations entre objets dans des séquences vidéo et permet donc de générer des métadonénes de type sujet, relation, objet. </text:p>
          </table:table-cell>
          <table:table-cell table:number-columns-repeated="16377"/>
        </table:table-row>
        <table:table-row table:style-name="ro2">
          <table:table-cell office:value-type="string" calcext:value-type="string">
            <text:p>Open source</text:p>
          </table:table-cell>
          <table:table-cell office:value-type="string" calcext:value-type="string">
            <text:p>CVAT</text:p>
          </table:table-cell>
          <table:table-cell/>
          <table:table-cell office:value-type="string" calcext:value-type="string">
            <text:p>Indexation</text:p>
          </table:table-cell>
          <table:table-cell table:style-name="ce5" office:value-type="string" calcext:value-type="string">
            <text:p><text:a xlink:href="https://github.com/cvat-ai/cvat" xlink:type="simple">https://github.com/cvat-ai/cvat</text:a></text:p>
          </table:table-cell>
          <table:table-cell table:style-name="ce5"/>
          <table:table-cell office:value-type="string" calcext:value-type="string">
            <text:p>Plateforme open source d'annotation des données qui permet aussi le suivi des objets sur plusieurs plans (object tracking). </text:p>
          </table:table-cell>
          <table:table-cell table:number-columns-repeated="16377"/>
        </table:table-row>
        <table:table-row table:style-name="ro1">
          <table:table-cell/>
          <table:table-cell office:value-type="string" calcext:value-type="string">
            <text:p>camemBERT</text:p>
          </table:table-cell>
          <table:table-cell/>
          <table:table-cell office:value-type="string" calcext:value-type="string">
            <text:p>NLP</text:p>
          </table:table-cell>
          <table:table-cell table:style-name="ce5" office:value-type="string" calcext:value-type="string">
            <text:p><text:a xlink:href="https://medium.com/@vitalshchutski/french-nlp-entamez-le-camembert-avec-les-librairies-fast-bert-et-transformers-14e65f84c148" xlink:type="simple">https://medium.com/@vitalshchutski/french-nlp-entamez-le-camembert-avec-les-librairies-fast-bert-et-transformers-14e65f84c148</text:a></text:p>
          </table:table-cell>
          <table:table-cell table:style-name="ce5"/>
          <table:table-cell office:value-type="string" calcext:value-type="string">
            <text:p>Copie du modèle de langage BERT créé par Google, repris et entraîné avec des données françaises. </text:p>
          </table:table-cell>
          <table:table-cell table:number-columns-repeated="16377"/>
        </table:table-row>
        <table:table-row table:style-name="ro2">
          <table:table-cell office:value-type="string" calcext:value-type="string">
            <text:p>Open source</text:p>
          </table:table-cell>
          <table:table-cell office:value-type="string" calcext:value-type="string">
            <text:p>VANA AI</text:p>
          </table:table-cell>
          <table:table-cell/>
          <table:table-cell office:value-type="string" calcext:value-type="string">
            <text:p>NLP</text:p>
          </table:table-cell>
          <table:table-cell table:style-name="ce5" office:value-type="string" calcext:value-type="string">
            <text:p><text:a xlink:href="https://vanna.ai/" xlink:type="simple">https://vanna.ai/ </text:a></text:p>
          </table:table-cell>
          <table:table-cell table:style-name="ce5"/>
          <table:table-cell office:value-type="string" calcext:value-type="string">
            <text:p>VANA AI est un pipeline Python basé sur l'usage de NLP, LLM et RAG afin de transformer une requête en langage naturel en une requête SQL utilisable. </text:p>
          </table:table-cell>
          <table:table-cell/>
          <table:table-cell office:value-type="string" calcext:value-type="string">
            <text:p>NLP / LLM / RAG</text:p>
          </table:table-cell>
          <table:table-cell table:number-columns-repeated="16375"/>
        </table:table-row>
        <table:table-row table:style-name="ro2">
          <table:table-cell office:value-type="string" calcext:value-type="string">
            <text:p>Open source</text:p>
          </table:table-cell>
          <table:table-cell office:value-type="string" calcext:value-type="string">
            <text:p>LangChain SQL Agent</text:p>
          </table:table-cell>
          <table:table-cell/>
          <table:table-cell office:value-type="string" calcext:value-type="string">
            <text:p>NLP</text:p>
          </table:table-cell>
          <table:table-cell table:style-name="ce5" office:value-type="string" calcext:value-type="string">
            <text:p><text:a xlink:href="https://docs.langchain.com/" xlink:type="simple">https://docs.langchain.com/</text:a></text:p>
          </table:table-cell>
          <table:table-cell table:style-name="ce5"/>
          <table:table-cell table:style-name="ce4" office:value-type="string" calcext:value-type="string">
            <text:p><text:span text:style-name="T1">LangChain SQL Agent est un </text:span><text:span text:style-name="T2">Framework</text:span><text:span text:style-name="T3"> permettant de fiabiliser la génération de requête SQL. C'est un vérificateur de syntaxe SQL.</text:span></text:p>
          </table:table-cell>
          <table:table-cell table:number-columns-repeated="16377"/>
        </table:table-row>
        <table:table-row table:style-name="ro2">
          <table:table-cell office:value-type="string" calcext:value-type="string">
            <text:p>Propriétaire</text:p>
          </table:table-cell>
          <table:table-cell office:value-type="string" calcext:value-type="string">
            <text:p>Oracle Autonomous Database Select AI</text:p>
          </table:table-cell>
          <table:table-cell office:value-type="string" calcext:value-type="string">
            <text:p>Oracle</text:p>
          </table:table-cell>
          <table:table-cell office:value-type="string" calcext:value-type="string">
            <text:p>NLP</text:p>
          </table:table-cell>
          <table:table-cell table:style-name="ce5" office:value-type="string" calcext:value-type="string">
            <text:p><text:a xlink:href="https://www.oracle.com/fr/artificial-intelligence/generate-sql-queries-with-ai/" xlink:type="simple">https://www.oracle.com/fr/artificial-intelligence/generate-sql-queries-with-ai/</text:a></text:p>
          </table:table-cell>
          <table:table-cell table:style-name="ce5"/>
          <table:table-cell table:style-name="ce4" office:value-type="string" calcext:value-type="string">
            <text:p><text:span text:style-name="T1">Oracle est un Systsème de gestion de base de donnée qui a déjà intégré un pipeline </text:span><text:span text:style-name="T2">text-to-SQL</text:span><text:span text:style-name="T3"> dans leurs bases de donnnées.</text:span></text:p>
          </table:table-cell>
          <table:table-cell table:number-columns-repeated="16377"/>
        </table:table-row>
        <table:table-row table:style-name="ro2">
          <table:table-cell office:value-type="string" calcext:value-type="string">
            <text:p>Open source</text:p>
          </table:table-cell>
          <table:table-cell office:value-type="string" calcext:value-type="string">
            <text:p>BERT</text:p>
          </table:table-cell>
          <table:table-cell/>
          <table:table-cell office:value-type="string" calcext:value-type="string">
            <text:p>NLP</text:p>
          </table:table-cell>
          <table:table-cell table:style-name="ce5" office:value-type="string" calcext:value-type="string">
            <text:p><text:a xlink:href="https://github.com/tokelde/BERT_Easy_Implementation" xlink:type="simple">https://github.com/tokelde/BERT_Easy_Implementation</text:a></text:p>
          </table:table-cell>
          <table:table-cell table:style-name="ce5"/>
          <table:table-cell table:style-name="ce4" office:value-type="string" calcext:value-type="string">
            <text:p><text:span text:style-name="T1">Projet pionnier sur la génération de requête SQL à partir de requête utilisateur grâce aux NLP. Grande avancée dans l'utilisation des NLP avec la création des </text:span><text:span text:style-name="T2">Transformers.</text:span></text:p>
          </table:table-cell>
          <table:table-cell table:number-columns-repeated="16377"/>
        </table:table-row>
        <table:table-row table:style-name="ro2">
          <table:table-cell office:value-type="string" calcext:value-type="string">
            <text:p>Open source</text:p>
          </table:table-cell>
          <table:table-cell office:value-type="string" calcext:value-type="string">
            <text:p>TaBERT</text:p>
          </table:table-cell>
          <table:table-cell/>
          <table:table-cell office:value-type="string" calcext:value-type="string">
            <text:p>NLP</text:p>
          </table:table-cell>
          <table:table-cell table:style-name="ce5" office:value-type="string" calcext:value-type="string">
            <text:p><text:a xlink:href="https://github.com/facebookresearch/TaBERT" xlink:type="simple">https://github.com/facebookresearch/TaBERT</text:a></text:p>
          </table:table-cell>
          <table:table-cell table:style-name="ce5"/>
          <table:table-cell office:value-type="string" calcext:value-type="string">
            <text:p>Prolongement du projet BERT, TaBERT vise à fiabiliser BERT en permettant la compréhension d'une base SQL déjà formée. </text:p>
          </table:table-cell>
          <table:table-cell table:number-columns-repeated="16377"/>
        </table:table-row>
        <table:table-row table:style-name="ro2">
          <table:table-cell office:value-type="string" calcext:value-type="string">
            <text:p>Open source</text:p>
          </table:table-cell>
          <table:table-cell office:value-type="string" calcext:value-type="string">
            <text:p>SQLova</text:p>
          </table:table-cell>
          <table:table-cell/>
          <table:table-cell office:value-type="string" calcext:value-type="string">
            <text:p>NLP</text:p>
          </table:table-cell>
          <table:table-cell table:style-name="ce5" office:value-type="string" calcext:value-type="string">
            <text:p><text:a xlink:href="https://github.com/naver/sqlova" xlink:type="simple">https://github.com/naver/sqlova</text:a></text:p>
          </table:table-cell>
          <table:table-cell table:style-name="ce5"/>
          <table:table-cell office:value-type="string" calcext:value-type="string">
            <text:p>SQLova est un projet Github open source qui applique les concepts de base de BERT et TaBERT.</text:p>
          </table:table-cell>
          <table:table-cell table:number-columns-repeated="16377"/>
        </table:table-row>
        <table:table-row table:style-name="ro2">
          <table:table-cell office:value-type="string" calcext:value-type="string">
            <text:p>Open source</text:p>
          </table:table-cell>
          <table:table-cell office:value-type="string" calcext:value-type="string">
            <text:p>NLP-SQL-BERT</text:p>
          </table:table-cell>
          <table:table-cell/>
          <table:table-cell office:value-type="string" calcext:value-type="string">
            <text:p>NLP</text:p>
          </table:table-cell>
          <table:table-cell table:style-name="ce5" office:value-type="string" calcext:value-type="string">
            <text:p><text:a xlink:href="https://github.com/sonalkum/NLP-SQL-BERT" xlink:type="simple">https://github.com/sonalkum/NLP-SQL-BERT</text:a></text:p>
          </table:table-cell>
          <table:table-cell table:style-name="ce5"/>
          <table:table-cell office:value-type="string" calcext:value-type="string">
            <text:p>NLP-SQL-BERT est un projet Github open source qui applique les concepts de base de BERT et TaBERT.</text:p>
          </table:table-cell>
          <table:table-cell table:number-columns-repeated="16377"/>
        </table:table-row>
        <table:table-row table:style-name="ro1">
          <table:table-cell/>
          <table:table-cell office:value-type="string" calcext:value-type="string">
            <text:p>V7 auto track</text:p>
          </table:table-cell>
          <table:table-cell/>
          <table:table-cell office:value-type="string" calcext:value-type="string">
            <text:p>indexation</text:p>
          </table:table-cell>
          <table:table-cell table:style-name="ce5" office:value-type="string" calcext:value-type="string">
            <text:p><text:a xlink:href="https://www.v7darwin.com/blog/auto-track-motion-in-videos" xlink:type="simple">https://www.v7darwin.com/blog/auto-track-motion-in-videos </text:a></text:p>
          </table:table-cell>
          <table:table-cell table:style-name="ce5"/>
          <table:table-cell office:value-type="string" calcext:value-type="string">
            <text:p>How to segment objects in video and video annotation</text:p>
          </table:table-cell>
          <table:table-cell table:number-columns-repeated="16377"/>
        </table:table-row>
        <table:table-row table:style-name="ro2">
          <table:table-cell office:value-type="string" calcext:value-type="string">
            <text:p>Open source</text:p>
          </table:table-cell>
          <table:table-cell office:value-type="string" calcext:value-type="string">
            <text:p>PySceneDetect</text:p>
          </table:table-cell>
          <table:table-cell office:value-type="string" calcext:value-type="string">
            <text:p>YuanGroup</text:p>
          </table:table-cell>
          <table:table-cell office:value-type="string" calcext:value-type="string">
            <text:p>Indexation </text:p>
          </table:table-cell>
          <table:table-cell table:style-name="ce5" office:value-type="string" calcext:value-type="string">
            <text:p><text:a xlink:href="https://scenedetect.com/" xlink:type="simple">https://scenedetect.com</text:a></text:p>
          </table:table-cell>
          <table:table-cell table:style-name="ce5" office:value-type="string" calcext:value-type="string">
            <text:p><text:a xlink:href="https://github.com/breakthrough/pyscenedetect" xlink:type="simple">https://github.com/breakthrough/pyscenedetect </text:a></text:p>
          </table:table-cell>
          <table:table-cell office:value-type="string" calcext:value-type="string">
            <text:p>PyScene Detect est un projet open Source qui vise à séquencer des images animés à chaque changement de plan. <text:s/></text:p>
          </table:table-cell>
          <table:table-cell table:number-columns-repeated="16377"/>
        </table:table-row>
        <table:table-row table:style-name="ro3">
          <table:table-cell office:value-type="string" calcext:value-type="string">
            <text:p>Propriétaire gratuit ?</text:p>
          </table:table-cell>
          <table:table-cell table:style-name="ce4" office:value-type="string" calcext:value-type="string">
            <text:p><text:span text:style-name="T1">NVIDIA Data Loading Library </text:span><text:span text:style-name="T2">(DALI)</text:span></text:p>
          </table:table-cell>
          <table:table-cell office:value-type="string" calcext:value-type="string">
            <text:p>NVIDIA</text:p>
          </table:table-cell>
          <table:table-cell office:value-type="string" calcext:value-type="string">
            <text:p>Indexation </text:p>
          </table:table-cell>
          <table:table-cell table:style-name="ce5" office:value-type="string" calcext:value-type="string">
            <text:p><text:a xlink:href="https://developer.nvidia.com/dali" xlink:type="simple">https://developer.nvidia.com/dali</text:a></text:p>
          </table:table-cell>
          <table:table-cell table:style-name="ce5"/>
          <table:table-cell office:value-type="string" calcext:value-type="string">
            <text:p>Projet porté par NVIDIA, société spécialisée dans les GPUs, qui vise à prétraiter les images animés afin de faciliter leurs traitement par IA. L'idée est de fiabiliser la détection des scènes, des changements de plans, des bruits, formes, etc par un pré traitement fait pour l'IA. </text:p>
          </table:table-cell>
          <table:table-cell table:number-columns-repeated="16377"/>
        </table:table-row>
        <table:table-row table:style-name="ro2">
          <table:table-cell office:value-type="string" calcext:value-type="string">
            <text:p>Open source</text:p>
          </table:table-cell>
          <table:table-cell office:value-type="string" calcext:value-type="string">
            <text:p>TransNetV2</text:p>
          </table:table-cell>
          <table:table-cell/>
          <table:table-cell office:value-type="string" calcext:value-type="string">
            <text:p>Indexation </text:p>
          </table:table-cell>
          <table:table-cell table:style-name="ce5" office:value-type="string" calcext:value-type="string">
            <text:p><text:a xlink:href="https://github.com/soCzech/TransNetV2" xlink:type="simple">https://github.com/soCzech/TransNetV2</text:a></text:p>
          </table:table-cell>
          <table:table-cell table:style-name="ce5"/>
          <table:table-cell office:value-type="string" calcext:value-type="string">
            <text:p>Réseaux neuronaux développé pour la détection de changement de plan et de transitions dans une image animée.</text:p>
          </table:table-cell>
          <table:table-cell table:number-columns-repeated="16377"/>
        </table:table-row>
        <table:table-row table:style-name="ro2">
          <table:table-cell office:value-type="string" calcext:value-type="string">
            <text:p>Open source</text:p>
          </table:table-cell>
          <table:table-cell office:value-type="string" calcext:value-type="string">
            <text:p>PyAV</text:p>
          </table:table-cell>
          <table:table-cell/>
          <table:table-cell office:value-type="string" calcext:value-type="string">
            <text:p>Indexation </text:p>
          </table:table-cell>
          <table:table-cell table:style-name="ce5" office:value-type="string" calcext:value-type="string">
            <text:p><text:a xlink:href="https://github.com/pyav-org/pyav" xlink:type="simple">https://github.com/pyav-org/pyav</text:a></text:p>
          </table:table-cell>
          <table:table-cell table:style-name="ce5"/>
          <table:table-cell table:style-name="ce4" office:value-type="string" calcext:value-type="string">
            <text:p><text:span text:style-name="T1">Projet Open Source permettant l'utilisation de FFMPEG </text:span><text:span text:style-name="T2">(bibliothèque écrite en langage C particulièrement puissante pour le traitement de vidéo) </text:span><text:span text:style-name="T3">en Python afin de permettre le séquençage, la division de vidéos, etc. </text:span></text:p>
          </table:table-cell>
          <table:table-cell table:number-columns-repeated="16377"/>
        </table:table-row>
        <table:table-row table:style-name="ro2">
          <table:table-cell office:value-type="string" calcext:value-type="string">
            <text:p>Open source</text:p>
          </table:table-cell>
          <table:table-cell office:value-type="string" calcext:value-type="string">
            <text:p>SAM2</text:p>
          </table:table-cell>
          <table:table-cell/>
          <table:table-cell office:value-type="string" calcext:value-type="string">
            <text:p>Indexation </text:p>
          </table:table-cell>
          <table:table-cell table:style-name="ce5" office:value-type="string" calcext:value-type="string">
            <text:p><text:a xlink:href="https://github.com/facebookresearch/sam2" xlink:type="simple">https://github.com/facebookresearch/sam2</text:a></text:p>
          </table:table-cell>
          <table:table-cell table:style-name="ce5"/>
          <table:table-cell office:value-type="string" calcext:value-type="string">
            <text:p>Projet Open Source qui permet de segmenter des vidéos et image àà l'échelle des entités visibles. Une fois une entité identifié, segmenté, SAM2 prend en charge le suivis de ces mouvements. </text:p>
          </table:table-cell>
          <table:table-cell table:number-columns-repeated="16377"/>
        </table:table-row>
        <table:table-row table:style-name="ro2">
          <table:table-cell office:value-type="string" calcext:value-type="string">
            <text:p>Open source</text:p>
          </table:table-cell>
          <table:table-cell office:value-type="string" calcext:value-type="string">
            <text:p>YOLO</text:p>
          </table:table-cell>
          <table:table-cell/>
          <table:table-cell office:value-type="string" calcext:value-type="string">
            <text:p>Indexation </text:p>
          </table:table-cell>
          <table:table-cell table:style-name="ce5" office:value-type="string" calcext:value-type="string">
            <text:p><text:a xlink:href="https://github.com/ultralytics/ultralytics" xlink:type="simple">https://github.com/ultralytics/ultralytics</text:a></text:p>
          </table:table-cell>
          <table:table-cell table:style-name="ce5"/>
          <table:table-cell office:value-type="string" calcext:value-type="string">
            <text:p>YOLO est un projet Open Source de réseau neuronnaux pouur la détection de formes dans les images et vidéos et leurs labellisation. Particulièrement utile si combiné avec SAM2 pour de la fiabilisation de résultats. </text:p>
          </table:table-cell>
          <table:table-cell table:number-columns-repeated="16377"/>
        </table:table-row>
        <table:table-row table:style-name="ro2">
          <table:table-cell office:value-type="string" calcext:value-type="string">
            <text:p>Open source</text:p>
          </table:table-cell>
          <table:table-cell office:value-type="string" calcext:value-type="string">
            <text:p>FaceNet</text:p>
          </table:table-cell>
          <table:table-cell/>
          <table:table-cell office:value-type="string" calcext:value-type="string">
            <text:p>Indexation </text:p>
          </table:table-cell>
          <table:table-cell table:style-name="ce5" office:value-type="string" calcext:value-type="string">
            <text:p><text:a xlink:href="https://github.com/davidsandberg/facenet/blob/master" xlink:type="simple">https://github.com/davidsandberg/facenet/blob/master</text:a></text:p>
          </table:table-cell>
          <table:table-cell table:style-name="ce5"/>
          <table:table-cell office:value-type="string" calcext:value-type="string">
            <text:p>FaceNet est un projet OpenSource spécialisé dans la reconnaissance faciale. En s'appuyant sur une base vectorielle, cet outil serait capable d'identifier des personnalités dans des images. On pourrait l'appliquer à de la vidéo en le combinant avec YOLO et SAM2. </text:p>
          </table:table-cell>
          <table:table-cell table:number-columns-repeated="16377"/>
        </table:table-row>
        <table:table-row table:style-name="ro2">
          <table:table-cell office:value-type="string" calcext:value-type="string">
            <text:p>Propriétaire</text:p>
          </table:table-cell>
          <table:table-cell office:value-type="string" calcext:value-type="string">
            <text:p>Text2SQL</text:p>
          </table:table-cell>
          <table:table-cell/>
          <table:table-cell office:value-type="string" calcext:value-type="string">
            <text:p>NLP</text:p>
          </table:table-cell>
          <table:table-cell table:style-name="ce5" office:value-type="string" calcext:value-type="string">
            <text:p><text:a xlink:href="https://www.text2sql.ai/" xlink:type="simple">https://www.text2sql.ai/</text:a></text:p>
          </table:table-cell>
          <table:table-cell/>
          <table:table-cell office:value-type="string" calcext:value-type="string">
            <text:p>Outil IA qui permet la génération de requête SQL à partir de requête utilisateur. Lien vers l'outil. </text:p>
          </table:table-cell>
          <table:table-cell table:number-columns-repeated="16377"/>
        </table:table-row>
        <table:table-row table:style-name="ro2">
          <table:table-cell office:value-type="string" calcext:value-type="string">
            <text:p>Open source</text:p>
          </table:table-cell>
          <table:table-cell office:value-type="string" calcext:value-type="string">
            <text:p>NLTK</text:p>
          </table:table-cell>
          <table:table-cell/>
          <table:table-cell office:value-type="string" calcext:value-type="string">
            <text:p>NLP</text:p>
          </table:table-cell>
          <table:table-cell table:style-name="ce5" office:value-type="string" calcext:value-type="string">
            <text:p><text:a xlink:href="https://github.com/nltk/nltk" xlink:type="simple">https://github.com/nltk/nltk</text:a></text:p>
          </table:table-cell>
          <table:table-cell/>
          <table:table-cell office:value-type="string" calcext:value-type="string">
            <text:p>Librairie python de NLP. Elle se distingue de SPACY pour son aspect plus modulable, étant plus une boîte à outil qu'un pipeline, par son aspect plus complets permettant plus de type de traitement, et sa souplesse. Elle est cependant plus difficile d''utilisation et plus lente </text:p>
          </table:table-cell>
          <table:table-cell table:number-columns-repeated="2" office:value-type="string" calcext:value-type="string">
            <text:p>Python</text:p>
          </table:table-cell>
          <table:table-cell table:number-columns-repeated="16375"/>
        </table:table-row>
        <table:table-row table:style-name="ro2">
          <table:table-cell office:value-type="string" calcext:value-type="string">
            <text:p>Open source</text:p>
          </table:table-cell>
          <table:table-cell office:value-type="string" calcext:value-type="string">
            <text:p>FFMPEG</text:p>
          </table:table-cell>
          <table:table-cell/>
          <table:table-cell office:value-type="string" calcext:value-type="string">
            <text:p>Indexation </text:p>
          </table:table-cell>
          <table:table-cell table:style-name="ce5" office:value-type="string" calcext:value-type="string">
            <text:p><text:a xlink:href="https://www.ffmpeg.org/" xlink:type="simple">https://www.ffmpeg.org/</text:a></text:p>
          </table:table-cell>
          <table:table-cell/>
          <table:table-cell office:value-type="string" calcext:value-type="string">
            <text:p>Outil écrit en C qui permet la manipulation des images et vidéos. Ce n'est pas un outil d'IA, mais beaucoup des outils cités et trouvés s'appuient sur cette bibliothèque</text:p>
          </table:table-cell>
          <table:table-cell table:number-columns-repeated="16377"/>
        </table:table-row>
        <table:table-row table:style-name="ro2">
          <table:table-cell office:value-type="string" calcext:value-type="string">
            <text:p>Open source</text:p>
          </table:table-cell>
          <table:table-cell office:value-type="string" calcext:value-type="string">
            <text:p>Spatialyze</text:p>
          </table:table-cell>
          <table:table-cell/>
          <table:table-cell office:value-type="string" calcext:value-type="string">
            <text:p>Indexation</text:p>
          </table:table-cell>
          <table:table-cell table:style-name="ce5" office:value-type="string" calcext:value-type="string">
            <text:p><text:a xlink:href="https://github.com/apperception-db/spatialyze" xlink:type="simple">https://github.com/apperception-db/spatialyze</text:a></text:p>
          </table:table-cell>
          <table:table-cell/>
          <table:table-cell office:value-type="string" calcext:value-type="string">
            <text:p>Framework qui permet la géolocalisation de vidéos par l'extraction de métadonnées géospatiale. </text:p>
          </table:table-cell>
          <table:table-cell table:number-columns-repeated="16377"/>
        </table:table-row>
        <table:table-row table:style-name="ro2">
          <table:table-cell office:value-type="string" calcext:value-type="string">
            <text:p>Propriétaire</text:p>
          </table:table-cell>
          <table:table-cell office:value-type="string" calcext:value-type="string">
            <text:p>Videntifier</text:p>
          </table:table-cell>
          <table:table-cell/>
          <table:table-cell office:value-type="string" calcext:value-type="string">
            <text:p>Indexation </text:p>
          </table:table-cell>
          <table:table-cell table:style-name="ce5" office:value-type="string" calcext:value-type="string">
            <text:p><text:a xlink:href="https://videntifier.com/" xlink:type="simple">https://videntifier.com/</text:a></text:p>
          </table:table-cell>
          <table:table-cell/>
          <table:table-cell office:value-type="string" calcext:value-type="string">
            <text:p>Solution propriétaire spécialisée dans l'identification de vidéos dans l'objectif de la protection de la propriété intelectuelle. L'idée générale est de pouvoir analyser chaque vidéo et de lui donner une emprunte propre qui garanti son unicité. </text:p>
          </table:table-cell>
          <table:table-cell table:number-columns-repeated="16377"/>
        </table:table-row>
        <table:table-row table:style-name="ro2">
          <table:table-cell office:value-type="string" calcext:value-type="string">
            <text:p>Propriétaire</text:p>
          </table:table-cell>
          <table:table-cell office:value-type="string" calcext:value-type="string">
            <text:p>Axle AI</text:p>
          </table:table-cell>
          <table:table-cell office:value-type="string" calcext:value-type="string">
            <text:p>Axle</text:p>
          </table:table-cell>
          <table:table-cell office:value-type="string" calcext:value-type="string">
            <text:p>Indexation</text:p>
          </table:table-cell>
          <table:table-cell table:style-name="ce5" office:value-type="string" calcext:value-type="string">
            <text:p><text:a xlink:href="https://www.axle.ai/" xlink:type="simple">https://www.axle.ai</text:a></text:p>
          </table:table-cell>
          <table:table-cell/>
          <table:table-cell table:style-name="ce4" office:value-type="string" calcext:value-type="string">
            <text:p><text:span text:style-name="T1">Solution propriétaire spécialisée dans la recherche sémantique </text:span><text:span text:style-name="T2">(donc par le sens)</text:span><text:span text:style-name="T3"> dans des vidéos. Compréhension sémantique de scènes, </text:span><text:span text:style-name="T2">tagging</text:span><text:span text:style-name="T3"> automatique de scènes, d'entités et d'objets et analyse des bruits et dialogues. C'est une solution Cloud. </text:span></text:p>
          </table:table-cell>
          <table:table-cell table:number-columns-repeated="16377"/>
        </table:table-row>
        <table:table-row table:style-name="ro2">
          <table:table-cell office:value-type="string" calcext:value-type="string">
            <text:p>Propriétaire</text:p>
          </table:table-cell>
          <table:table-cell office:value-type="string" calcext:value-type="string">
            <text:p>AWS</text:p>
          </table:table-cell>
          <table:table-cell office:value-type="string" calcext:value-type="string">
            <text:p>Amazon</text:p>
          </table:table-cell>
          <table:table-cell office:value-type="string" calcext:value-type="string">
            <text:p>Indexation</text:p>
          </table:table-cell>
          <table:table-cell table:style-name="ce5" office:value-type="string" calcext:value-type="string">
            <text:p><text:a xlink:href="https://aws.amazon.com/fr/rekognition" xlink:type="simple">https://aws.amazon.com/fr/rekognition </text:a></text:p>
          </table:table-cell>
          <table:table-cell/>
          <table:table-cell office:value-type="string" calcext:value-type="string">
            <text:p>Solution propriétaire multi-usage. AWS permet : la détection de segments dans les vidéos et leurs séquençages automatiquement, la reconnaissance faciale, la reconnaissance de célébrités, l'étiquetage de scène, d'objets, d'entités et cela de manière personnalisée. Prend également en charge la comparaison des visages, la détection de texte et l'analyse d'un visage. </text:p>
          </table:table-cell>
          <table:table-cell table:number-columns-repeated="16377"/>
        </table:table-row>
        <table:table-row table:style-name="ro2">
          <table:table-cell office:value-type="string" calcext:value-type="string">
            <text:p>Propriétaire</text:p>
          </table:table-cell>
          <table:table-cell office:value-type="string" calcext:value-type="string">
            <text:p>VideoLingo</text:p>
          </table:table-cell>
          <table:table-cell office:value-type="string" calcext:value-type="string">
            <text:p>Netflix ?</text:p>
          </table:table-cell>
          <table:table-cell office:value-type="string" calcext:value-type="string">
            <text:p>Indexation</text:p>
          </table:table-cell>
          <table:table-cell table:style-name="ce5" office:value-type="string" calcext:value-type="string">
            <text:p><text:a xlink:href="https://github.com/Huanshere/VideoLingo" xlink:type="simple">https://github.com/Huanshere/VideoLingo</text:a></text:p>
          </table:table-cell>
          <table:table-cell table:style-name="ce5" office:value-type="string" calcext:value-type="string">
            <text:p><text:a xlink:href="https://videolingo.io/en" xlink:type="simple">https://videolingo.io/en</text:a></text:p>
          </table:table-cell>
          <table:table-cell office:value-type="string" calcext:value-type="string">
            <text:p>Solution propriétaire utilisée par Netflix afin de générer des sous titres automatiquement. Il prend en charge l'analyse vidéos et la compréhension orale afin d'extraire du sens et traduire.</text:p>
          </table:table-cell>
          <table:table-cell office:value-type="string" calcext:value-type="string">
            <text:p>WhisperX</text:p>
          </table:table-cell>
          <table:table-cell office:value-type="string" calcext:value-type="string">
            <text:p>NLP </text:p>
          </table:table-cell>
          <table:table-cell table:number-columns-repeated="16375"/>
        </table:table-row>
        <table:table-row table:style-name="ro2">
          <table:table-cell office:value-type="string" calcext:value-type="string">
            <text:p>Open source</text:p>
          </table:table-cell>
          <table:table-cell office:value-type="string" calcext:value-type="string">
            <text:p>MetaDetective</text:p>
          </table:table-cell>
          <table:table-cell/>
          <table:table-cell office:value-type="string" calcext:value-type="string">
            <text:p>Indexation </text:p>
          </table:table-cell>
          <table:table-cell table:style-name="ce5" office:value-type="string" calcext:value-type="string">
            <text:p><text:a xlink:href="https://github.com/franckferman/MetaDetective" xlink:type="simple">https://github.com/franckferman/MetaDetective</text:a></text:p>
          </table:table-cell>
          <table:table-cell/>
          <table:table-cell office:value-type="string" calcext:value-type="string">
            <text:p>Librairie python spécialisé sur l'analyse des métadonnées de fichier images et/ou vidéos. Il permet notamment l'analyse des méta données EXIF, CODECS, la durée, les tags ID3 et peut aller jusqu'à vérifier l'authenticitié d'un document. Pour moi son intérêt réside dans sa capacité à extraire des métadonnées depuis des vidéos. </text:p>
          </table:table-cell>
          <table:table-cell table:number-columns-repeated="16377"/>
        </table:table-row>
        <table:table-row table:style-name="ro2">
          <table:table-cell office:value-type="string" calcext:value-type="string">
            <text:p>Open source</text:p>
          </table:table-cell>
          <table:table-cell office:value-type="string" calcext:value-type="string">
            <text:p>PyMediaInfo</text:p>
          </table:table-cell>
          <table:table-cell/>
          <table:table-cell office:value-type="string" calcext:value-type="string">
            <text:p>Indexation</text:p>
          </table:table-cell>
          <table:table-cell table:style-name="ce5" office:value-type="string" calcext:value-type="string">
            <text:p><text:a xlink:href="https://pypi.org/project/pymediainfo/" xlink:type="simple">https://pypi.org/project/pymediainfo/</text:a></text:p>
          </table:table-cell>
          <table:table-cell/>
          <table:table-cell office:value-type="string" calcext:value-type="string">
            <text:p>Librairie python d'interfaçage avec l'outil MediaInfo, elle permet d'utiliser le logiciel MediaInfo en python afin d'analyser chaque piste composants un fichiers vidéos. Ainsi, seront automatiquement extrait : Codecs, ratioo, FPS, si des délais existent entre audio et vidéo.</text:p>
          </table:table-cell>
          <table:table-cell table:number-columns-repeated="16377"/>
        </table:table-row>
        <table:table-row table:style-name="ro2">
          <table:table-cell office:value-type="string" calcext:value-type="string">
            <text:p>Open source</text:p>
          </table:table-cell>
          <table:table-cell office:value-type="string" calcext:value-type="string">
            <text:p>PyExifTool</text:p>
          </table:table-cell>
          <table:table-cell/>
          <table:table-cell office:value-type="string" calcext:value-type="string">
            <text:p>Indexation </text:p>
          </table:table-cell>
          <table:table-cell table:style-name="ce5" office:value-type="string" calcext:value-type="string">
            <text:p><text:a xlink:href="https://pypi.org/project/PyExifTool/" xlink:type="simple">https://pypi.org/project/PyExifTool/</text:a></text:p>
          </table:table-cell>
          <table:table-cell table:style-name="ce5" office:value-type="string" calcext:value-type="string">
            <text:p><text:a xlink:href="https://github.com/smarnach/pyexiftool" xlink:type="simple">https://github.com/smarnach/pyexiftool</text:a></text:p>
          </table:table-cell>
          <table:table-cell office:value-type="string" calcext:value-type="string">
            <text:p>Librairie python qui permet l'accès à des données enregistrées par des caméras professionnelles : géolocalisation, réglages de capteurs, autre réglages techniques. Ces donnnées sont souvent mise dans les vidéos produites par l'utilisation de ces caméras, mais peu exploitable. </text:p>
          </table:table-cell>
          <table:table-cell table:number-columns-repeated="16377"/>
        </table:table-row>
        <table:table-row table:style-name="ro2">
          <table:table-cell office:value-type="string" calcext:value-type="string">
            <text:p>Open source</text:p>
          </table:table-cell>
          <table:table-cell office:value-type="string" calcext:value-type="string">
            <text:p>FairMot</text:p>
          </table:table-cell>
          <table:table-cell table:number-columns-repeated="2"/>
          <table:table-cell table:style-name="ce5" office:value-type="string" calcext:value-type="string">
            <text:p><text:a xlink:href="https://github.com/ifzhang/FairMOT" xlink:type="simple">https://github.com/ifzhang/FairMOT</text:a></text:p>
          </table:table-cell>
          <table:table-cell/>
          <table:table-cell table:style-name="ce4" office:value-type="string" calcext:value-type="string">
            <text:p><text:span text:style-name="T1">Projet/librairie python qui permet le tracking de cible mutliples dans une vidéo et de les identifier </text:span><text:span text:style-name="T2">(Au sens de leurs donner une identité informatique propre afin de ne pas les confondres avec un autre humain sur l'image par exemple. Mais pas d'identification de Nom/Prénom)</text:span></text:p>
          </table:table-cell>
          <table:table-cell table:number-columns-repeated="16377"/>
        </table:table-row>
        <table:table-row table:style-name="ro2">
          <table:table-cell office:value-type="string" calcext:value-type="string">
            <text:p>Open source</text:p>
          </table:table-cell>
          <table:table-cell office:value-type="string" calcext:value-type="string">
            <text:p>Seg2Track-Sam2</text:p>
          </table:table-cell>
          <table:table-cell/>
          <table:table-cell office:value-type="string" calcext:value-type="string">
            <text:p>Indexation</text:p>
          </table:table-cell>
          <table:table-cell table:style-name="ce5" office:value-type="string" calcext:value-type="string">
            <text:p><text:a xlink:href="https://github.com/hcmr-lab/Seg2Track-SAM2" xlink:type="simple">https://github.com/hcmr-lab/Seg2Track-SAM2</text:a></text:p>
          </table:table-cell>
          <table:table-cell/>
          <table:table-cell table:style-name="ce4" office:value-type="string" calcext:value-type="string">
            <text:p><text:span text:style-name="T1">Projet qui combine deux technologies en un seul </text:span><text:span text:style-name="T2">framework </text:span><text:span text:style-name="T3">afin de faire du suivis d'entités/cibles multiples dans les vidéos avec une certaine fiabilitée dans la durée. </text:span></text:p>
          </table:table-cell>
          <table:table-cell table:number-columns-repeated="16377"/>
        </table:table-row>
        <table:table-row table:style-name="ro2">
          <table:table-cell office:value-type="string" calcext:value-type="string">
            <text:p>Open source</text:p>
          </table:table-cell>
          <table:table-cell office:value-type="string" calcext:value-type="string">
            <text:p>NetVLAD</text:p>
          </table:table-cell>
          <table:table-cell/>
          <table:table-cell office:value-type="string" calcext:value-type="string">
            <text:p>Indexation</text:p>
          </table:table-cell>
          <table:table-cell table:style-name="ce5" office:value-type="string" calcext:value-type="string">
            <text:p><text:a xlink:href="https://github.com/relja/netvlad" xlink:type="simple">https://github.com/relja/netvlad</text:a></text:p>
          </table:table-cell>
          <table:table-cell/>
          <table:table-cell office:value-type="string" calcext:value-type="string">
            <text:p>Projet de référence dans la reconnaissance de lieux à partir d'une image. Se base sur la reconnaissance architecturale.</text:p>
          </table:table-cell>
          <table:table-cell table:number-columns-repeated="16377"/>
        </table:table-row>
        <table:table-row table:style-name="ro2">
          <table:table-cell office:value-type="string" calcext:value-type="string">
            <text:p>Open source</text:p>
          </table:table-cell>
          <table:table-cell office:value-type="string" calcext:value-type="string">
            <text:p>GeM</text:p>
          </table:table-cell>
          <table:table-cell/>
          <table:table-cell office:value-type="string" calcext:value-type="string">
            <text:p>Indexation </text:p>
          </table:table-cell>
          <table:table-cell table:style-name="ce5" office:value-type="string" calcext:value-type="string">
            <text:p><text:a xlink:href="https://amaarora.github.io/posts/2020-08-30-gempool.html" xlink:type="simple">https://amaarora.github.io/posts/2020-08-30-gempool.html</text:a></text:p>
          </table:table-cell>
          <table:table-cell table:style-name="ce5" office:value-type="string" calcext:value-type="string">
            <text:p><text:a xlink:href="https://github.com/Strand2013/GemPooling_Pytorch" xlink:type="simple">https://github.com/Strand2013/GemPooling_Pytorch</text:a></text:p>
          </table:table-cell>
          <table:table-cell office:value-type="string" calcext:value-type="string">
            <text:p>Outil permettant de consolider les capacités de détection architecturale d'un outil IA comme NetVLAD. Permet l'identification des architectures sous différents angles, différentes luminositées etc. </text:p>
          </table:table-cell>
          <table:table-cell table:number-columns-repeated="16377"/>
        </table:table-row>
        <table:table-row table:style-name="ro2">
          <table:table-cell office:value-type="string" calcext:value-type="string">
            <text:p>Open source</text:p>
          </table:table-cell>
          <table:table-cell office:value-type="string" calcext:value-type="string">
            <text:p>PIGEON</text:p>
          </table:table-cell>
          <table:table-cell/>
          <table:table-cell office:value-type="string" calcext:value-type="string">
            <text:p>Indexation </text:p>
          </table:table-cell>
          <table:table-cell table:style-name="ce5" office:value-type="string" calcext:value-type="string">
            <text:p><text:a xlink:href="https://lukashaas.github.io/PIGEON-CVPR24/" xlink:type="simple">https://lukashaas.github.io/PIGEON-CVPR24/</text:a></text:p>
          </table:table-cell>
          <table:table-cell/>
          <table:table-cell office:value-type="string" calcext:value-type="string">
            <text:p>Projet IA afin d'estimer une localisation géographique précise à partir de textes et d'images. Entraîné sur le jeu Géoguesseur, il peut être limiter à cela. </text:p>
          </table:table-cell>
          <table:table-cell table:number-columns-repeated="16377"/>
        </table:table-row>
        <table:table-row table:style-name="ro2">
          <table:table-cell office:value-type="string" calcext:value-type="string">
            <text:p>propriétaire</text:p>
          </table:table-cell>
          <table:table-cell office:value-type="string" calcext:value-type="string">
            <text:p>Moments-Lab</text:p>
          </table:table-cell>
          <table:table-cell/>
          <table:table-cell office:value-type="string" calcext:value-type="string">
            <text:p>Indexation </text:p>
          </table:table-cell>
          <table:table-cell table:style-name="ce5" office:value-type="string" calcext:value-type="string">
            <text:p><text:a xlink:href="https://www.momentslab.com/fr-fr?utm_term=moments%20lab&amp;utm_campaign=Brand+-+FR&amp;utm_source=adwords&amp;utm_medium=ppc&amp;hsa_acc=4827473291&amp;hsa_cam=22197998353&amp;hsa_grp=182915194308&amp;hsa_ad=731722018943&amp;hsa_src=g&amp;hsa_tgt=kwd-2310062076638&amp;hsa_kw=moments%20lab&amp;hsa_" xlink:type="simple">https://www.momentslab.com/fr-fr?utm_term=moments%20lab&amp;utm_campaign=Brand+-+FR&amp;utm_source=adwords&amp;utm_medium=ppc&amp;hsa_acc=4827473291&amp;hsa_cam=22197998353&amp;hsa_grp=182915194308&amp;hsa_ad=731722018943&amp;hsa_src=g&amp;hsa_tgt=kwd-2310062076638&amp;hsa_kw=moments%20lab&amp;hsa_mt=p&amp;hsa_net=adwords&amp;hsa_ver=3&amp;gad_source=1&amp;gad_campaignid=22197998353&amp;gbraid=0AAAAAooBSsvjALCnMNBov5Xir7IfUewFt&amp;gclid=EAIaIQobChMIqovYmoe7lAMVkkhBAh1MOwB8EAAYASAAEgLW__D_BwE</text:a></text:p>
          </table:table-cell>
          <table:table-cell/>
          <table:table-cell office:value-type="string" calcext:value-type="string">
            <text:p>Outil utilisé par TF1, l'AFP et quelques clubs de foot afin d'indexer les archive audiovisuelles. IA Multimodale qui détecte les visages, les logos, les lieux, les actions et indexe l'ensemble de ces élément afin de permettre des recherches en langages naturels. </text:p>
          </table:table-cell>
          <table:table-cell table:number-columns-repeated="16377"/>
        </table:table-row>
        <table:table-row table:style-name="ro3">
          <table:table-cell office:value-type="string" calcext:value-type="string">
            <text:p>Open source</text:p>
          </table:table-cell>
          <table:table-cell office:value-type="string" calcext:value-type="string">
            <text:p>AI4Media</text:p>
          </table:table-cell>
          <table:table-cell/>
          <table:table-cell office:value-type="string" calcext:value-type="string">
            <text:p>Indexation </text:p>
          </table:table-cell>
          <table:table-cell table:style-name="ce5" office:value-type="string" calcext:value-type="string">
            <text:p><text:a xlink:href="https://www.ai4media.eu/" xlink:type="simple">https://www.ai4media.eu/</text:a></text:p>
          </table:table-cell>
          <table:table-cell table:style-name="ce5" office:value-type="string" calcext:value-type="string">
            <text:p><text:a xlink:href="https://www.ai4media.eu/software/" xlink:type="simple">https://www.ai4media.eu/software/</text:a></text:p>
          </table:table-cell>
          <table:table-cell table:style-name="ce4" office:value-type="string" calcext:value-type="string">
            <text:p><text:span text:style-name="T1">Projet Européen issus d'un consortium qui développe un certains nombre d'outils basé sur l'IA pour l'analyses et l'indexations des médias et vidéos. Propose énormément de ressources différentes : des articles scientifiques et des ressources techniques allant de programme pour fiabiliser le </text:span><text:span text:style-name="T2">deep learning</text:span><text:span text:style-name="T3"> pour l'analyse par IA de documents audiovisuels à des IA déjà employables </text:span><text:span text:style-name="T2">(deuxième lien)</text:span><text:span text:style-name="T3">. Ils abordent toutes les thématiques : de l'utilisation de l'IA pour la reconnnaissance d'objet, à la segmentation d'objet et de séquences en passant par l'indexation automatisée via des Thésaurus. </text:span></text:p>
          </table:table-cell>
          <table:table-cell table:number-columns-repeated="16377"/>
        </table:table-row>
        <table:table-row table:style-name="ro2">
          <table:table-cell office:value-type="string" calcext:value-type="string">
            <text:p>Open source</text:p>
          </table:table-cell>
          <table:table-cell office:value-type="string" calcext:value-type="string">
            <text:p>MeMAD</text:p>
          </table:table-cell>
          <table:table-cell/>
          <table:table-cell office:value-type="string" calcext:value-type="string">
            <text:p>Indexation </text:p>
          </table:table-cell>
          <table:table-cell table:style-name="ce5" office:value-type="string" calcext:value-type="string">
            <text:p><text:a xlink:href="https://github.com/MeMAD-project/mmca" xlink:type="simple">https://github.com/MeMAD-project/mmca</text:a></text:p>
          </table:table-cell>
          <table:table-cell/>
          <table:table-cell office:value-type="string" calcext:value-type="string">
            <text:p>Projet académique qui a produit un certains nombres d'outils basé sur l'IA pour l'analyse multimodales d'images animées. Ils par exemple développé un module pour l'indexation contrôlé par Thésaurus à partir de la reconnaissance d'objets. Les différents outils sont accessibles sur ce github.</text:p>
          </table:table-cell>
          <table:table-cell table:number-columns-repeated="16377"/>
        </table:table-row>
        <table:table-row table:style-name="ro2">
          <table:table-cell office:value-type="string" calcext:value-type="string">
            <text:p>Open source</text:p>
          </table:table-cell>
          <table:table-cell office:value-type="string" calcext:value-type="string">
            <text:p>Movie-Credit-Detect</text:p>
          </table:table-cell>
          <table:table-cell/>
          <table:table-cell office:value-type="string" calcext:value-type="string">
            <text:p>Indexation </text:p>
          </table:table-cell>
          <table:table-cell table:style-name="ce5" office:value-type="string" calcext:value-type="string">
            <text:p><text:a xlink:href="https://github.com/hurdlea/Movie-Credits-Detect" xlink:type="simple">https://github.com/hurdlea/Movie-Credits-Detect</text:a></text:p>
          </table:table-cell>
          <table:table-cell/>
          <table:table-cell table:style-name="ce4" office:value-type="string" calcext:value-type="string">
            <text:p><text:span text:style-name="T1">Projet open source qui se base sur la librairie OpenCV afin de détecter les génériques/crédits de chaque films. Chaque image ressemblant à un générique est isolé. </text:span><text:span text:style-name="T2">Pour avoir utilisé OoenCV de cette même manière, je pense que c'est une solution qui peut être efficace mais trop sensible aux variations. </text:span></text:p>
          </table:table-cell>
          <table:table-cell table:number-columns-repeated="16377"/>
        </table:table-row>
        <table:table-row table:style-name="ro2">
          <table:table-cell office:value-type="string" calcext:value-type="string">
            <text:p>Open source</text:p>
          </table:table-cell>
          <table:table-cell office:value-type="string" calcext:value-type="string">
            <text:p>Automated-text-recognition</text:p>
          </table:table-cell>
          <table:table-cell/>
          <table:table-cell office:value-type="string" calcext:value-type="string">
            <text:p>Indexation </text:p>
          </table:table-cell>
          <table:table-cell table:style-name="ce5" office:value-type="string" calcext:value-type="string">
            <text:p><text:a xlink:href="https://github.com/Ajaneeshwar/Automated-text-recognition" xlink:type="simple">https://github.com/Ajaneeshwar/Automated-text-recognition</text:a></text:p>
          </table:table-cell>
          <table:table-cell/>
          <table:table-cell table:style-name="ce4" office:value-type="string" calcext:value-type="string">
            <text:p><text:span text:style-name="T1">Projet open source qui propose un </text:span><text:span text:style-name="T2">pipeline</text:span><text:span text:style-name="T3"> afin d'appliquer un OCR sur un flux vidéos afin d'en extraire des noms et autres informations notamment présentent sur les génériques. Ne semble pas demander de prétraitement comme une pré identification des génériques : on lui donne le fichier vidéo, et il reconnaît seul les génériques et le texte qui est porté.</text:span></text:p>
          </table:table-cell>
          <table:table-cell table:number-columns-repeated="16377"/>
        </table:table-row>
        <table:table-row table:style-name="ro2">
          <table:table-cell office:value-type="string" calcext:value-type="string">
            <text:p>Open source</text:p>
          </table:table-cell>
          <table:table-cell office:value-type="string" calcext:value-type="string">
            <text:p>CaptiOCR</text:p>
          </table:table-cell>
          <table:table-cell/>
          <table:table-cell office:value-type="string" calcext:value-type="string">
            <text:p>Indexation </text:p>
          </table:table-cell>
          <table:table-cell table:style-name="ce5" office:value-type="string" calcext:value-type="string">
            <text:p><text:a xlink:href="https://www.captiocr.com/" xlink:type="simple">https://www.captiocr.com/</text:a></text:p>
          </table:table-cell>
          <table:table-cell/>
          <table:table-cell table:style-name="ce4" office:value-type="string" calcext:value-type="string">
            <text:p><text:span text:style-name="T1">Projet open source imaginé à l'origine pour pouvoir extraire en temps réel, lors de meeting notamment, des sous titres. On définit une région d'application sur notre écran, ou ROI pour </text:span><text:span text:style-name="T2">region of interest</text:span><text:span text:style-name="T3">, et il s'appliquera sur cette zone. Ce projet peut être modifié pour s'appliquer à toute une image et uniquement sur les images de génériques. </text:span></text:p>
          </table:table-cell>
          <table:table-cell table:number-columns-repeated="16377"/>
        </table:table-row>
        <table:table-row table:style-name="ro2">
          <table:table-cell office:value-type="string" calcext:value-type="string">
            <text:p>Open Source</text:p>
          </table:table-cell>
          <table:table-cell office:value-type="string" calcext:value-type="string">
            <text:p>BLIP-2</text:p>
          </table:table-cell>
          <table:table-cell/>
          <table:table-cell office:value-type="string" calcext:value-type="string">
            <text:p>Indexation </text:p>
          </table:table-cell>
          <table:table-cell table:style-name="ce5" office:value-type="string" calcext:value-type="string">
            <text:p><text:a xlink:href="https://huggingface.co/docs/transformers/model_doc/blip-2" xlink:type="simple">https://huggingface.co/docs/transformers/model_doc/blip-2</text:a></text:p>
          </table:table-cell>
          <table:table-cell/>
          <table:table-cell table:style-name="ce4" office:value-type="string" calcext:value-type="string">
            <text:p><text:span text:style-name="T1">Projet open source pour l'</text:span><text:span text:style-name="T2">image captionning</text:span><text:span text:style-name="T3">. Modèle de pré entraînement pour l'analyse d'image vidéos.</text:span></text:p>
          </table:table-cell>
          <table:table-cell table:number-columns-repeated="16377"/>
        </table:table-row>
        <table:table-row table:style-name="ro2">
          <table:table-cell office:value-type="string" calcext:value-type="string">
            <text:p>Open Source</text:p>
          </table:table-cell>
          <table:table-cell office:value-type="string" calcext:value-type="string">
            <text:p>FlexSQL</text:p>
          </table:table-cell>
          <table:table-cell/>
          <table:table-cell office:value-type="string" calcext:value-type="string">
            <text:p>NLP</text:p>
          </table:table-cell>
          <table:table-cell table:style-name="ce5" office:value-type="string" calcext:value-type="string">
            <text:p><text:a xlink:href="https://github.com/StringNLPLAB/FlexSQL" xlink:type="simple">https://github.com/StringNLPLAB/FlexSQL</text:a></text:p>
          </table:table-cell>
          <table:table-cell/>
          <table:table-cell table:style-name="ce4" office:value-type="string" calcext:value-type="string">
            <text:p><text:span text:style-name="T1">FlexSQL est un agent SQL qui a pour objectif de permettre à un pipeline </text:span><text:span text:style-name="T2">text-to-sql </text:span><text:span text:style-name="T3">une interraction plus fluide et plus grande avc la base de données afin de générer des requêtes correctes. L'idée est que grâce à cet agent, le pipeline puisse se baser sur de multiples vérifications à différents moment de la réflexion du LLM afin de repérer les erreurs et les corriger au fur et à mesure. </text:span></text:p>
          </table:table-cell>
          <table:table-cell table:number-columns-repeated="16377"/>
        </table:table-row>
        <table:table-row table:style-name="ro2">
          <table:table-cell office:value-type="string" calcext:value-type="string">
            <text:p>Open Source</text:p>
          </table:table-cell>
          <table:table-cell office:value-type="string" calcext:value-type="string">
            <text:p>FINER-SQL</text:p>
          </table:table-cell>
          <table:table-cell/>
          <table:table-cell office:value-type="string" calcext:value-type="string">
            <text:p>NLP</text:p>
          </table:table-cell>
          <table:table-cell table:style-name="ce5" office:value-type="string" calcext:value-type="string">
            <text:p><text:a xlink:href="https://github.com/thanhdath/finer-sql" xlink:type="simple">https://github.com/thanhdath/finer-sql</text:a></text:p>
          </table:table-cell>
          <table:table-cell/>
          <table:table-cell office:value-type="string" calcext:value-type="string">
            <text:p>Framework de renforcement des petits modèle de langues, ou SLMs. L'idée est qu'un SLMs consomme moins et prends moins d'espace qu'un LLM, ce qui est très avantageux pour grand nombre d'acteurs, mais en contrepartie ils offrent des capacités de raisonnement moindre. FINER-SQL vise à optimiser les SLMs pour offrir de meilleure performances et se rapprocher des performances des LLMs. </text:p>
          </table:table-cell>
          <table:table-cell table:number-columns-repeated="16377"/>
        </table:table-row>
        <table:table-row table:style-name="ro2">
          <table:table-cell office:value-type="string" calcext:value-type="string">
            <text:p>Open Source</text:p>
          </table:table-cell>
          <table:table-cell office:value-type="string" calcext:value-type="string">
            <text:p>SQLStructEval </text:p>
          </table:table-cell>
          <table:table-cell/>
          <table:table-cell office:value-type="string" calcext:value-type="string">
            <text:p>NLP</text:p>
          </table:table-cell>
          <table:table-cell table:style-name="ce5" office:value-type="string" calcext:value-type="string">
            <text:p><text:a xlink:href="https://anonymous.4open.science/r/StructEval-2435/README.md" xlink:type="simple">https://anonymous.4open.science/r/StructEval-2435/README.md</text:a></text:p>
          </table:table-cell>
          <table:table-cell/>
          <table:table-cell office:value-type="string" calcext:value-type="string">
            <text:p>Framework pour l'évaluation des requêtes SQL générées, leurs fiabilisations et homogénéisations. Alternative ou complément à l'outil précédent. </text:p>
          </table:table-cell>
          <table:table-cell table:number-columns-repeated="16377"/>
        </table:table-row>
        <table:table-row table:style-name="ro3">
          <table:table-cell office:value-type="string" calcext:value-type="string">
            <text:p>Propriétaire</text:p>
          </table:table-cell>
          <table:table-cell office:value-type="string" calcext:value-type="string">
            <text:p>Sinequa</text:p>
          </table:table-cell>
          <table:table-cell office:value-type="string" calcext:value-type="string">
            <text:p>Sinequa Entreprise AI search</text:p>
          </table:table-cell>
          <table:table-cell office:value-type="string" calcext:value-type="string">
            <text:p>NLP</text:p>
          </table:table-cell>
          <table:table-cell table:style-name="ce5" office:value-type="string" calcext:value-type="string">
            <text:p><text:a xlink:href="https://www.sinequa.com/product/workplace-search/" xlink:type="simple">https://www.sinequa.com/product/workplace-search/</text:a></text:p>
          </table:table-cell>
          <table:table-cell/>
          <table:table-cell office:value-type="string" calcext:value-type="string">
            <text:p>Produit proposant un outil IA se basant sur les connaissance et conntenus interne à une entreprise afifn d'être interrogeabl. L'idée est de pouvoir interroger une barre de recherche augmentée à l'IA afin d'avoir : un résumé de la recherche effectué et les résultats les plus pertinants après recherche full text. Je ne sais pas dans quel cadre cela s'applque ? </text:p>
          </table:table-cell>
          <table:table-cell table:number-columns-repeated="16377"/>
        </table:table-row>
        <table:table-row table:style-name="ro2">
          <table:table-cell office:value-type="string" calcext:value-type="string">
            <text:p>Propriétaire</text:p>
          </table:table-cell>
          <table:table-cell table:number-columns-repeated="2" office:value-type="string" calcext:value-type="string">
            <text:p>Queryloop</text:p>
          </table:table-cell>
          <table:table-cell office:value-type="string" calcext:value-type="string">
            <text:p>NLP</text:p>
          </table:table-cell>
          <table:table-cell table:style-name="ce5" office:value-type="string" calcext:value-type="string">
            <text:p><text:a xlink:href="https://www.queryloop.ai/" xlink:type="simple">https://www.queryloop.ai/</text:a></text:p>
          </table:table-cell>
          <table:table-cell/>
          <table:table-cell table:style-name="ce4" office:value-type="string" calcext:value-type="string">
            <text:p><text:span text:style-name="T1">J'ai un peu de mal à comprendre cet outil, mais il semblerait que ce soit une entreprise proposant une IA spécialisé dans la création de Workflow automatisé à appliqué sur des données. L'idée est de pouvoir lui donner un dataset et de lui expliquer ce qu'on souhaite faire, queryloop élaborera un worflow complet avec proposition d'outils </text:span><text:span text:style-name="T2">(LLMs) </text:span><text:span text:style-name="T3">à intégrer. </text:span></text:p>
          </table:table-cell>
          <table:table-cell table:number-columns-repeated="16377"/>
        </table:table-row>
        <table:table-row table:style-name="ro2">
          <table:table-cell office:value-type="string" calcext:value-type="string">
            <text:p>Open Source</text:p>
          </table:table-cell>
          <table:table-cell office:value-type="string" calcext:value-type="string">
            <text:p>Nl2query</text:p>
          </table:table-cell>
          <table:table-cell/>
          <table:table-cell office:value-type="string" calcext:value-type="string">
            <text:p>NLP-NoSQL</text:p>
          </table:table-cell>
          <table:table-cell table:style-name="ce5" office:value-type="string" calcext:value-type="string">
            <text:p><text:a xlink:href="https://github.com/Chirayu-Tripathi/nl2query" xlink:type="simple">https://github.com/Chirayu-Tripathi/nl2query</text:a></text:p>
          </table:table-cell>
          <table:table-cell/>
          <table:table-cell office:value-type="string" calcext:value-type="string">
            <text:p>Projet open source permettant d'appliquer du NLP à une question en langage naturel dans le but de créer une requête Pandas, MongoDB, Kusto ou encoore Cypher. Utilisable en python directement, dans le dossier il y a un mode d'emploie pour chaque type d'utilisation souhaitée.</text:p>
          </table:table-cell>
          <table:table-cell table:number-columns-repeated="16377"/>
        </table:table-row>
        <table:table-row table:style-name="ro2">
          <table:table-cell office:value-type="string" calcext:value-type="string">
            <text:p>Open source</text:p>
          </table:table-cell>
          <table:table-cell office:value-type="string" calcext:value-type="string">
            <text:p>NL2MONGODB</text:p>
          </table:table-cell>
          <table:table-cell/>
          <table:table-cell office:value-type="string" calcext:value-type="string">
            <text:p>NLP-NoSQL</text:p>
          </table:table-cell>
          <table:table-cell table:style-name="ce5" office:value-type="string" calcext:value-type="string">
            <text:p><text:a xlink:href="https://github.com/wissem18/NL2MongoDB" xlink:type="simple">https://github.com/wissem18/NL2MongoDB</text:a></text:p>
          </table:table-cell>
          <table:table-cell/>
          <table:table-cell office:value-type="string" calcext:value-type="string">
            <text:p>Projet open source qui se base sur la librairie StreamLit ainsi que LangChain et ChatGPT afin de transformer une requête utilisateur en langage naturel. L'utilisation de ChatGPT se fait par API ce qui n'est pas souhaitable pour la protection des données, mais sur des données ouvertes ou simplement non sensible cela peut être un bon test. Cela pemettrais de comprendre comment cela fonctionne, les points d'attentions et de difficultés à avoir. </text:p>
          </table:table-cell>
          <table:table-cell table:number-columns-repeated="16377"/>
        </table:table-row>
        <table:table-row table:style-name="ro2">
          <table:table-cell office:value-type="string" calcext:value-type="string">
            <text:p>Open Source</text:p>
          </table:table-cell>
          <table:table-cell office:value-type="string" calcext:value-type="string">
            <text:p>Semantic search with MongoDB and LLM Frameworks</text:p>
          </table:table-cell>
          <table:table-cell/>
          <table:table-cell office:value-type="string" calcext:value-type="string">
            <text:p>NLP-NoSQL</text:p>
          </table:table-cell>
          <table:table-cell table:style-name="ce5" office:value-type="string" calcext:value-type="string">
            <text:p><text:a xlink:href="https://github.com/mongodb-developer/quickstart-rag-python" xlink:type="simple">https://github.com/mongodb-developer/quickstart-rag-python</text:a></text:p>
          </table:table-cell>
          <table:table-cell/>
          <table:table-cell office:value-type="string" calcext:value-type="string">
            <text:p>Projet open source qui utilise l'API de ChatGPT, il se base sur l'utilisation de deux agents IA, LangChain et LlamaIndex, ainsi que GPT afin de générer des requête No-SQL à partir de requête utilisateurs sur des bases de données. Il est intéressant de voir que ce projet utilise GPT pour la génération de la requête, mais ce sont LangChain et LlamaIndex qui sont véritablement responsable de la recherche et de son succès. </text:p>
          </table:table-cell>
          <table:table-cell table:number-columns-repeated="16377"/>
        </table:table-row>
        <table:table-row table:style-name="ro2">
          <table:table-cell office:value-type="string" calcext:value-type="string">
            <text:p>Open Source</text:p>
          </table:table-cell>
          <table:table-cell office:value-type="string" calcext:value-type="string">
            <text:p>Mosmql</text:p>
          </table:table-cell>
          <table:table-cell/>
          <table:table-cell office:value-type="string" calcext:value-type="string">
            <text:p>NLP-NoSQL</text:p>
          </table:table-cell>
          <table:table-cell table:style-name="ce5" office:value-type="string" calcext:value-type="string">
            <text:p><text:a xlink:href="https://github.com/MOSTAFAEZZAT/mosmql" xlink:type="simple">https://github.com/MOSTAFAEZZAT/mosmql</text:a></text:p>
          </table:table-cell>
          <table:table-cell/>
          <table:table-cell table:style-name="ce4" office:value-type="string" calcext:value-type="string">
            <text:p><text:span text:style-name="T1">Projet open source également basé sur l'API de ChatGPT. Il propose également d'interroger en langage naturel une base de donnée No-SQL, mais je n'ai pas plus de précision sur le </text:span><text:span text:style-name="T2">framework </text:span><text:span text:style-name="T3">ou </text:span><text:span text:style-name="T2">pipeline</text:span><text:span text:style-name="T3"> mis en place. </text:span></text:p>
          </table:table-cell>
          <table:table-cell table:number-columns-repeated="16377"/>
        </table:table-row>
        <table:table-row table:style-name="ro1" table:number-rows-repeated="1048506">
          <table:table-cell table:number-columns-repeated="16384"/>
        </table:table-row>
        <table:table-row table:style-name="ro1">
          <table:table-cell table:number-columns-repeated="16384"/>
        </table:table-row>
      </table:table>
      <table:table table:name="Articles de recherche" table:style-name="ta2">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8" table:default-cell-style-name="ce1"/>
        <table:table-column table:style-name="co9" table:default-cell-style-name="ce1"/>
        <table:table-column table:style-name="co1" table:number-columns-repeated="16377" table:default-cell-style-name="ce1"/>
        <table:table-row table:style-name="ro1" table:number-rows-repeated="2">
          <table:table-cell table:number-columns-repeated="16384"/>
        </table:table-row>
        <table:table-row table:style-name="ro1">
          <table:table-cell table:style-name="ce3" office:value-type="string" calcext:value-type="string">
            <text:p>Titre</text:p>
          </table:table-cell>
          <table:table-cell table:style-name="ce2" office:value-type="string" calcext:value-type="string">
            <text:p>Auteur</text:p>
          </table:table-cell>
          <table:table-cell table:style-name="ce3" office:value-type="string" calcext:value-type="string">
            <text:p>Sujet</text:p>
          </table:table-cell>
          <table:table-cell table:style-name="ce3" office:value-type="string" calcext:value-type="string">
            <text:p>Lien</text:p>
          </table:table-cell>
          <table:table-cell table:style-name="ce3" office:value-type="string" calcext:value-type="string">
            <text:p>Résumé</text:p>
          </table:table-cell>
          <table:table-cell table:style-name="ce3" office:value-type="string" calcext:value-type="string">
            <text:p>Outils cités</text:p>
          </table:table-cell>
          <table:table-cell table:style-name="ce3" office:value-type="string" calcext:value-type="string">
            <text:p>Technologies citées</text:p>
          </table:table-cell>
          <table:table-cell table:number-columns-repeated="16377"/>
        </table:table-row>
        <table:table-row table:style-name="ro3">
          <table:table-cell office:value-type="string" calcext:value-type="string">
            <text:p>AI Meets Archives: The Future of Machine Learning in Cultural Heritage</text:p>
          </table:table-cell>
          <table:table-cell office:value-type="string" calcext:value-type="string">
            <text:p>Stacey Patton</text:p>
          </table:table-cell>
          <table:table-cell office:value-type="string" calcext:value-type="string">
            <text:p>NLP, HTR</text:p>
          </table:table-cell>
          <table:table-cell table:style-name="ce5" office:value-type="string" calcext:value-type="string">
            <text:p><text:a xlink:href="https://www.clir.org/2024/10/ai-meets-archives-the-future-of-machine-learning-in-cultural-heritage/" xlink:type="simple">https://www.clir.org/2024/10/ai-meets-archives-the-future-of-machine-learning-in-cultural-heritage/</text:a></text:p>
          </table:table-cell>
          <table:table-cell office:value-type="string" calcext:value-type="string">
            <text:p>Réflexion sur l'usage de l'IA dans le secteur GLAM</text:p>
          </table:table-cell>
          <table:table-cell/>
          <table:table-cell office:value-type="string" calcext:value-type="string">
            <text:p>NLP</text:p>
            <text:p>HTR</text:p>
            <text:p/>
          </table:table-cell>
          <table:table-cell table:number-columns-repeated="16377"/>
        </table:table-row>
        <table:table-row table:style-name="ro4">
          <table:table-cell office:value-type="string" calcext:value-type="string">
            <text:p>AI in Audiovisual Archives</text:p>
            <text:p/>
          </table:table-cell>
          <table:table-cell office:value-type="string" calcext:value-type="string">
            <text:p>Randi Cecchine</text:p>
          </table:table-cell>
          <table:table-cell office:value-type="string" calcext:value-type="string">
            <text:p>Indexation</text:p>
          </table:table-cell>
          <table:table-cell table:style-name="ce5" office:value-type="string" calcext:value-type="string">
            <text:p><text:a xlink:href="https://www.beeldengeluid.nl/en/research/blog/ai-audiovisual-archives" xlink:type="simple">https://www.beeldengeluid.nl/en/research/blog/ai-audiovisual-archives</text:a></text:p>
          </table:table-cell>
          <table:table-cell office:value-type="string" calcext:value-type="string">
            <text:p>Réflexion critique sur les projets existants et leurs limites : projet SEMIA, sound &amp; vision néerlandais</text:p>
            <text:p>Principe de layering d'outils IA. </text:p>
          </table:table-cell>
          <table:table-cell office:value-type="string" calcext:value-type="string">
            <text:p>INA segmenter </text:p>
            <text:p>PySceneDetect</text:p>
            <text:p>Azure video indexer</text:p>
            <text:p>Google reverse image search</text:p>
          </table:table-cell>
          <table:table-cell office:value-type="string" calcext:value-type="string">
            <text:p>ASR</text:p>
            <text:p>OCR</text:p>
          </table:table-cell>
          <table:table-cell table:number-columns-repeated="16377"/>
        </table:table-row>
        <table:table-row table:style-name="ro2">
          <table:table-cell office:value-type="string" calcext:value-type="string">
            <text:p>Bringing AI into the Audiovisual Archive</text:p>
          </table:table-cell>
          <table:table-cell office:value-type="string" calcext:value-type="string">
            <text:p>Randi Cecchine</text:p>
          </table:table-cell>
          <table:table-cell/>
          <table:table-cell table:style-name="ce5" office:value-type="string" calcext:value-type="string">
            <text:p><text:a xlink:href="https://www.beeldengeluid.nl/en/research/blog/bringing-ai-audiovisual-archive" xlink:type="simple">https://www.beeldengeluid.nl/en/research/blog/bringing-ai-audiovisual-archive</text:a></text:p>
          </table:table-cell>
          <table:table-cell office:value-type="string" calcext:value-type="string">
            <text:p>Analyse de projets utilisant l'IA pour leurs archives audiovisuelles : Vanderbilt University, AMPPD, and the Netherlands Institute for Sound &amp; Vision</text:p>
          </table:table-cell>
          <table:table-cell office:value-type="string" calcext:value-type="string">
            <text:p>Trint</text:p>
            <text:p>AWS NER</text:p>
          </table:table-cell>
          <table:table-cell table:number-columns-repeated="16378"/>
        </table:table-row>
        <table:table-row table:style-name="ro2">
          <table:table-cell office:value-type="string" calcext:value-type="string">
            <text:p>L'IA : quels défis pour les archives ?</text:p>
          </table:table-cell>
          <table:table-cell office:value-type="string" calcext:value-type="string">
            <text:p>Edouard Vasseur</text:p>
          </table:table-cell>
          <table:table-cell/>
          <table:table-cell table:style-name="ce5" office:value-type="string" calcext:value-type="string">
            <text:p><text:a xlink:href="https://shs.cairn.info/magazine-archimag-2025-hs81-page-8?lang=fr" xlink:type="simple">https://shs.cairn.info/magazine-archimag-2025-hs81-page-8?lang=fr</text:a></text:p>
          </table:table-cell>
          <table:table-cell office:value-type="string" calcext:value-type="string">
            <text:p>analyse de différents projets et des limites de l'usage de l'IA pour les archives. Les modèles entrainés en français sont moins performants. </text:p>
            <text:p>Projets cités : INA, interpares trust IA. </text:p>
          </table:table-cell>
          <table:table-cell table:number-columns-repeated="16379"/>
        </table:table-row>
        <table:table-row table:style-name="ro4">
          <table:table-cell office:value-type="string" calcext:value-type="string">
            <text:p>L'apprentissage automatique dans les archives :</text:p>
            <text:p>l'indexation en profondeur au service de l'accès aux</text:p>
            <text:p>archives</text:p>
          </table:table-cell>
          <table:table-cell office:value-type="string" calcext:value-type="string">
            <text:p>Jonas Arnold</text:p>
            <text:p>Martin Lüpold</text:p>
            <text:p>Lorenz Theilkäs</text:p>
            <text:p>Lambert Kansy</text:p>
          </table:table-cell>
          <table:table-cell office:value-type="string" calcext:value-type="string">
            <text:p>NLP/ indexation</text:p>
          </table:table-cell>
          <table:table-cell table:style-name="ce5" office:value-type="string" calcext:value-type="string">
            <text:p><text:a xlink:href="https://vsa-aas.ch/wp-content/uploads/2024/08/MachineLearning_im_Archiv_Whitepaper_2024-08-08_fr.pdf" xlink:type="simple">https://vsa-aas.ch/wp-content/uploads/2024/08/MachineLearning_im_Archiv_Whitepaper_2024-08-08_fr.pdf</text:a></text:p>
          </table:table-cell>
          <table:table-cell office:value-type="string" calcext:value-type="string">
            <text:p>cartographie l’ensemble des usages du ML dans les archives. </text:p>
            <text:p>Concept des métadonnées fluides : les métadonnées générées par ML évoluent en fonciton de l'évolution des algorithmes. </text:p>
            <text:p>projet mentionné : PBS learning media </text:p>
          </table:table-cell>
          <table:table-cell office:value-type="string" calcext:value-type="string">
            <text:p>Annif : outil d'indexation automatique </text:p>
            <text:p>Transkribus : HTR</text:p>
            <text:p>Vitrivr : recherche par images et par contenu</text:p>
          </table:table-cell>
          <table:table-cell office:value-type="string" calcext:value-type="string">
            <text:p>Query by example</text:p>
            <text:p/>
          </table:table-cell>
          <table:table-cell table:number-columns-repeated="16377"/>
        </table:table-row>
        <table:table-row table:style-name="ro2">
          <table:table-cell office:value-type="string" calcext:value-type="string">
            <text:p>AL/ML for Processing Imagebased Records in Archives</text:p>
          </table:table-cell>
          <table:table-cell office:value-type="string" calcext:value-type="string">
            <text:p>Interpares TrustAI</text:p>
          </table:table-cell>
          <table:table-cell office:value-type="string" calcext:value-type="string">
            <text:p>Indexation</text:p>
          </table:table-cell>
          <table:table-cell table:style-name="ce5" office:value-type="string" calcext:value-type="string">
            <text:p><text:a xlink:href="https://interparestrustai.org/assets/public/dissemination/AD_01_Module4_v_1_0_20240918.pdf" xlink:type="simple">https://interparestrustai.org/assets/public/dissemination/AD_01_Module4_v_1_0_20240918.pdf</text:a></text:p>
          </table:table-cell>
          <table:table-cell office:value-type="string" calcext:value-type="string">
            <text:p>Dossier à visée pédagogique sur l'IA pour les profesionnels des archives : apprendre à utiliser l'IA pour automatiser le traitement des archives iconograohiques + portée critique </text:p>
          </table:table-cell>
          <table:table-cell office:value-type="string" calcext:value-type="string">
            <text:p>Query by image content</text:p>
            <text:p>Archipanion </text:p>
          </table:table-cell>
          <table:table-cell table:number-columns-repeated="16378"/>
        </table:table-row>
        <table:table-row table:style-name="ro3">
          <table:table-cell office:value-type="string" calcext:value-type="string">
            <text:p>On Barriers to Archival Audio Processing </text:p>
          </table:table-cell>
          <table:table-cell office:value-type="string" calcext:value-type="string">
            <text:p>Peter Sullivan</text:p>
            <text:p>Muhammad Abdul-Mageed</text:p>
          </table:table-cell>
          <table:table-cell office:value-type="string" calcext:value-type="string">
            <text:p>Indexation </text:p>
          </table:table-cell>
          <table:table-cell table:style-name="ce5" office:value-type="string" calcext:value-type="string">
            <text:p><text:a xlink:href="https://arxiv.org/pdf/2507.08768" xlink:type="simple">https://arxiv.org/pdf/2507.08768 </text:a></text:p>
          </table:table-cell>
          <table:table-cell office:value-type="string" calcext:value-type="string">
            <text:p>Article publié dans le cadre du projet interpares trust AI sur le test dess outils d’identification de langue et reconnaissance de locuteurs sur des archives de l’UNESCO. </text:p>
            <text:p>La reconnaissance des langues fonctionne plutot bien, mais pas la reconnaissance d'une même voix dans le temps. </text:p>
          </table:table-cell>
          <table:table-cell office:value-type="string" calcext:value-type="string">
            <text:p>Whisper Large V3 (Open AI) identification de la langue</text:p>
            <text:p>Massively Multilingual Speech (meta)</text:p>
            <text:p>WeSpeaker ResNet34-LM : reconnaissance de locuteurs</text:p>
          </table:table-cell>
          <table:table-cell table:number-columns-repeated="16378"/>
        </table:table-row>
        <table:table-row table:style-name="ro3">
          <table:table-cell office:value-type="string" calcext:value-type="string">
            <text:p>Indexation iconographique et intelligence artificielle </text:p>
          </table:table-cell>
          <table:table-cell office:value-type="string" calcext:value-type="string">
            <text:p>Pierre Husson</text:p>
          </table:table-cell>
          <table:table-cell office:value-type="string" calcext:value-type="string">
            <text:p>Indexation </text:p>
          </table:table-cell>
          <table:table-cell table:style-name="ce5" office:value-type="string" calcext:value-type="string">
            <text:p><text:a xlink:href="https://dumas.ccsd.cnrs.fr/dumas-05387482v1/document" xlink:type="simple">https://dumas.ccsd.cnrs.fr/dumas-05387482v1/document</text:a></text:p>
          </table:table-cell>
          <table:table-cell office:value-type="string" calcext:value-type="string">
            <text:p>Expérimentation d’indexation automatique par IA sur collection RETIF (peintures italiennes). Une des conclusions = GPT4 est le meilleur outil pour l’indexation automatique par vocabulaire contrôlé</text:p>
            <text:p/>
          </table:table-cell>
          <table:table-cell table:number-columns-repeated="16379"/>
        </table:table-row>
        <table:table-row table:style-name="ro2">
          <table:table-cell office:value-type="string" calcext:value-type="string">
            <text:p>Comparative Analysis of Image, Video, and Audio</text:p>
            <text:p>Classifiers for Automated News Video Segmentation</text:p>
          </table:table-cell>
          <table:table-cell office:value-type="string" calcext:value-type="string">
            <text:p>Jonathan Attard</text:p>
            <text:p>Dylan Seychell</text:p>
          </table:table-cell>
          <table:table-cell/>
          <table:table-cell table:style-name="ce5" office:value-type="string" calcext:value-type="string">
            <text:p><text:a xlink:href="https://arxiv.org/pdf/2503.21848v1" xlink:type="simple">https://arxiv.org/pdf/2503.21848v1</text:a></text:p>
          </table:table-cell>
          <table:table-cell office:value-type="string" calcext:value-type="string">
            <text:p>Article qui compare différentes approches IA pour segmenter automatiquement les journaux télévisés. </text:p>
            <text:p>Objectif : diviser un flux vidéo en séquences logiques et étiquetées </text:p>
          </table:table-cell>
          <table:table-cell table:number-columns-repeated="16379"/>
        </table:table-row>
        <table:table-row table:style-name="ro5">
          <table:table-cell office:value-type="string" calcext:value-type="string">
            <text:p>ViViT: A Video Vision Transformer</text:p>
          </table:table-cell>
          <table:table-cell office:value-type="string" calcext:value-type="string">
            <text:p>Anurag Arnab Mostafa Dehghani Georg Heigold Chen Sun Mario Luciˇ Cordelia Schmid</text:p>
          </table:table-cell>
          <table:table-cell office:value-type="string" calcext:value-type="string">
            <text:p>Indexation </text:p>
          </table:table-cell>
          <table:table-cell table:style-name="ce5" office:value-type="string" calcext:value-type="string">
            <text:p><text:a xlink:href="https://arxiv.org/pdf/2103.15691" xlink:type="simple">https://arxiv.org/pdf/2103.15691</text:a></text:p>
          </table:table-cell>
          <table:table-cell office:value-type="string" calcext:value-type="string">
            <text:p>article qui présente ViViT: A Video Vision Transformer : une architecture basée sur les mécanismes d’auto attention pour l’analyse des vidéos. L'enjeu est de traiter la dimension temporelle de la vidéo et de gérer l'explosion du nombre de tokens (unités de données) générées par une séquences d’images. </text:p>
          </table:table-cell>
          <table:table-cell table:number-columns-repeated="16379"/>
        </table:table-row>
        <table:table-row table:style-name="ro3">
          <table:table-cell office:value-type="string" calcext:value-type="string">
            <text:p>Scene Separation &amp; Data Selection: Temporal Segmentation</text:p>
            <text:p>Algorithm for Real-Time Video Stream Analysis</text:p>
          </table:table-cell>
          <table:table-cell office:value-type="string" calcext:value-type="string">
            <text:p>Yuelin Xin</text:p>
            <text:p>Zihan Zhou</text:p>
            <text:p>and Yuxuan Xia</text:p>
          </table:table-cell>
          <table:table-cell office:value-type="string" calcext:value-type="string">
            <text:p>Indexation </text:p>
          </table:table-cell>
          <table:table-cell table:style-name="ce5" office:value-type="string" calcext:value-type="string">
            <text:p><text:a xlink:href="https://arxiv.org/pdf/2308.00210" xlink:type="simple">https://arxiv.org/pdf/2308.00210</text:a></text:p>
          </table:table-cell>
          <table:table-cell office:value-type="string" calcext:value-type="string">
            <text:p>Présentation de <text:s/>2SDS (Scene Separation and Data Selection), un algorithme qui analyse les vidéos dans leur dimension temporelle. (utilisé en complément d'un CNN). Il sépare une vidéo en scènes, et sélectionne une représentation pour chaque scène, pour qu'un CNN puisse mieux les interpréter. </text:p>
          </table:table-cell>
          <table:table-cell table:number-columns-repeated="16379"/>
        </table:table-row>
        <table:table-row table:style-name="ro3">
          <table:table-cell office:value-type="string" calcext:value-type="string">
            <text:p>TDSNet: A temporal difference based network for video semantic segmentation</text:p>
          </table:table-cell>
          <table:table-cell office:value-type="string" calcext:value-type="string">
            <text:p>Haochen Yuan</text:p>
            <text:p>Junjie Peng </text:p>
            <text:p>Zesu Cai </text:p>
          </table:table-cell>
          <table:table-cell office:value-type="string" calcext:value-type="string">
            <text:p>Indexation </text:p>
          </table:table-cell>
          <table:table-cell table:style-name="ce5" office:value-type="string" calcext:value-type="string">
            <text:p><text:a xlink:href="https://www.sciencedirect.com/science/article/abs/pii/S0020025524012490" xlink:type="simple">https://www.sciencedirect.com/science/article/abs/pii/S0020025524012490</text:a></text:p>
          </table:table-cell>
          <table:table-cell office:value-type="string" calcext:value-type="string">
            <text:p>Article qui présente TDSNet (Temporal Difference Segmentation Network), un modèle de segmentation sémantique de vidéos qui se base sur l'analyse de la différence entre les images. </text:p>
          </table:table-cell>
          <table:table-cell table:number-columns-repeated="16379"/>
        </table:table-row>
        <table:table-row table:style-name="ro3">
          <table:table-cell office:value-type="string" calcext:value-type="string">
            <text:p>Temporal video scene segmentation using deep-learning</text:p>
            <text:p/>
          </table:table-cell>
          <table:table-cell office:value-type="string" calcext:value-type="string">
            <text:p>Tiago Henrique Trojahn </text:p>
            <text:p>Rudinei Goularte </text:p>
          </table:table-cell>
          <table:table-cell office:value-type="string" calcext:value-type="string">
            <text:p>Indexation </text:p>
          </table:table-cell>
          <table:table-cell table:style-name="ce5" office:value-type="string" calcext:value-type="string">
            <text:p><text:a xlink:href="https://link.springer.com/article/10.1007/s11042-020-10450-2" xlink:type="simple">https://link.springer.com/article/10.1007/s11042-020-10450-2</text:a></text:p>
          </table:table-cell>
          <table:table-cell office:value-type="string" calcext:value-type="string">
            <text:p>Article qui traite de la segmentation temporelle de vidéos basée sur le deep learning multimodal combinant plusieurs types de données (audio et vidéo) et en combinant deux types de modèles : CNN pour les caractéristiques visuelles et RNN pour les caractéristiques temporelles. </text:p>
          </table:table-cell>
          <table:table-cell table:number-columns-repeated="16379"/>
        </table:table-row>
        <table:table-row table:style-name="ro3">
          <table:table-cell office:value-type="string" calcext:value-type="string">
            <text:p>Multimodal early fusion operators for temporal video scene segmentation tasks</text:p>
            <text:p/>
          </table:table-cell>
          <table:table-cell office:value-type="string" calcext:value-type="string">
            <text:p>Antonio A. R. Beserra </text:p>
            <text:p>Rudinei Goularte </text:p>
          </table:table-cell>
          <table:table-cell office:value-type="string" calcext:value-type="string">
            <text:p>Indexation </text:p>
          </table:table-cell>
          <table:table-cell table:style-name="ce5" office:value-type="string" calcext:value-type="string">
            <text:p><text:a xlink:href="https://link.springer.com/article/10.1007/s11042-023-14953-6?fromPaywallRec=true" xlink:type="simple">https://link.springer.com/article/10.1007/s11042-023-14953-6?fromPaywallRec=true</text:a></text:p>
          </table:table-cell>
          <table:table-cell office:value-type="string" calcext:value-type="string">
            <text:p>Article sur la segmentation temporelle de séquences vidéo (TVSS), qui propose de simplifier la fusion de données multimodales et proposant la fusion multimodale précoce. Ce type de fusion est effectué avant la segmentation</text:p>
          </table:table-cell>
          <table:table-cell table:number-columns-repeated="16379"/>
        </table:table-row>
        <table:table-row table:style-name="ro4">
          <table:table-cell office:value-type="string" calcext:value-type="string">
            <text:p>Automatic video scene segmentation</text:p>
            <text:p>based on spatial-temporal clues and</text:p>
            <text:p>rhythm</text:p>
          </table:table-cell>
          <table:table-cell office:value-type="string" calcext:value-type="string">
            <text:p>Walid Mahdi and Liming Chen</text:p>
            <text:p>Mohsen Ardebilian</text:p>
          </table:table-cell>
          <table:table-cell office:value-type="string" calcext:value-type="string">
            <text:p>Indexation </text:p>
          </table:table-cell>
          <table:table-cell table:style-name="ce5" office:value-type="string" calcext:value-type="string">
            <text:p><text:a xlink:href="https://arxiv.org/pdf/1412.4470" xlink:type="simple">https://arxiv.org/pdf/1412.4470</text:a></text:p>
          </table:table-cell>
          <table:table-cell office:value-type="string" calcext:value-type="string">
            <text:p>Article qui propose une méthode pour segmenter automatiquement des flux vidéo en différentes séquences fondée sur des indices spatio temporels (relations entre images), et le rythme des plans (durée des plans, montage). </text:p>
          </table:table-cell>
          <table:table-cell table:number-columns-repeated="16379"/>
        </table:table-row>
        <table:table-row table:style-name="ro6">
          <table:table-cell office:value-type="string" calcext:value-type="string">
            <text:p>Conversational AI-Enhanced Exploration System to Query Large-Scale Digitised</text:p>
            <text:p>Collections of Natural History Museums</text:p>
          </table:table-cell>
          <table:table-cell office:value-type="string" calcext:value-type="string">
            <text:p>YIYUAN WANG</text:p>
            <text:p>ANDREW JOHNSTON, </text:p>
            <text:p>ZOË SADOKIERSKI, </text:p>
            <text:p>RHIANNON STEPHENS,</text:p>
            <text:p>SHANE T. AHYONG, </text:p>
          </table:table-cell>
          <table:table-cell office:value-type="string" calcext:value-type="string">
            <text:p>NLP</text:p>
          </table:table-cell>
          <table:table-cell table:style-name="ce5" office:value-type="string" calcext:value-type="string">
            <text:p><text:a xlink:href="https://arxiv.org/pdf/2603.10285" xlink:type="simple">https://arxiv.org/pdf/2603.10285</text:a></text:p>
          </table:table-cell>
          <table:table-cell office:value-type="string" calcext:value-type="string">
            <text:p>Description du déploiement de l’IA pour interroger des spécimens en langage naturel, couplé à une carte interactive. Architecture technique qui peut être transposé aux archives audiovisuelles. </text:p>
          </table:table-cell>
          <table:table-cell table:style-name="ce5"/>
          <table:table-cell office:value-type="string" calcext:value-type="string">
            <text:p>Text to SQL </text:p>
            <text:p>Function calling </text:p>
          </table:table-cell>
          <table:table-cell table:number-columns-repeated="16377"/>
        </table:table-row>
        <table:table-row table:style-name="ro2">
          <table:table-cell office:value-type="string" calcext:value-type="string">
            <text:p>Annif : indexation automatique à al bibliothèque nationale de finlande</text:p>
          </table:table-cell>
          <table:table-cell office:value-type="string" calcext:value-type="string">
            <text:p>Osma Suominen</text:p>
          </table:table-cell>
          <table:table-cell office:value-type="string" calcext:value-type="string">
            <text:p>Indexation </text:p>
          </table:table-cell>
          <table:table-cell table:style-name="ce5" office:value-type="string" calcext:value-type="string">
            <text:p><text:a xlink:href="https://publications-prairial.fr/arabesques/index.php?id=605" xlink:type="simple">https://publications-prairial.fr/arabesques/index.php?id=605</text:a></text:p>
          </table:table-cell>
          <table:table-cell table:style-name="ce8" office:value-type="string" calcext:value-type="string">
            <text:p>Article du créateur de Annif : outil d’indexation automatique opensource qui prend un document textuel en entrée et retourne une liste de mots clés issus de vocabulaires controlés. Dispo sur github et exposé via une API REST.</text:p>
          </table:table-cell>
          <table:table-cell table:number-columns-repeated="16379"/>
        </table:table-row>
        <table:table-row table:style-name="ro4">
          <table:table-cell office:value-type="string" calcext:value-type="string">
            <text:p>LLaVA-Video: Video Instruction Tuning With Synthetic Data</text:p>
          </table:table-cell>
          <table:table-cell/>
          <table:table-cell office:value-type="string" calcext:value-type="string">
            <text:p>Indexation </text:p>
          </table:table-cell>
          <table:table-cell table:style-name="ce5" office:value-type="string" calcext:value-type="string">
            <text:p><text:a xlink:href="https://arxiv.org/pdf/2410.02713" xlink:type="simple">https://arxiv.org/pdf/2410.02713</text:a></text:p>
          </table:table-cell>
          <table:table-cell table:style-name="ce8" office:value-type="string" calcext:value-type="string">
            <text:p>Mise à disposition du jeu de données  LLaVA-Video-178K et de son LLM LLaVA-Video. Le jeu de données contient 3 types de contenus : descriptions, questions-réponses, questions à choix multiples. </text:p>
            <text:p>présentation de LLava-video slowfast : méthode qui induit plus de frames et moins de token, mieux répartis. </text:p>
            <text:p>Architecture unifiée image et vidéo </text:p>
          </table:table-cell>
          <table:table-cell table:number-columns-repeated="2"/>
          <table:table-cell office:value-type="string" calcext:value-type="string">
            <text:p>Language bind</text:p>
          </table:table-cell>
          <table:table-cell table:number-columns-repeated="16376"/>
        </table:table-row>
        <table:table-row table:style-name="ro7">
          <table:table-cell office:value-type="string" calcext:value-type="string">
            <text:p>Case study: AI in screen archives</text:p>
          </table:table-cell>
          <table:table-cell/>
          <table:table-cell office:value-type="string" calcext:value-type="string">
            <text:p>Indexation </text:p>
          </table:table-cell>
          <table:table-cell table:style-name="ce5" office:value-type="string" calcext:value-type="string">
            <text:p><text:a xlink:href="https://www.bfi.org.uk/industry-data-insights/reports/ai-screen-sector-perspectives-paths-forward" xlink:type="simple">https://www.bfi.org.uk/industry-data-insights/reports/ai-screen-sector-perspectives-paths-forward</text:a></text:p>
          </table:table-cell>
          <table:table-cell table:style-name="ce8" office:value-type="string" calcext:value-type="string">
            <text:p>The BFI national archive (p.22) : experimentations avec le speech-to-text, NER, description et compréhension vidéo. </text:p>
          </table:table-cell>
          <table:table-cell/>
          <table:table-cell office:value-type="string" calcext:value-type="string">
            <text:p>EntityFishing</text:p>
            <text:p>Refined</text:p>
            <text:p>Qwen2-VL </text:p>
            <text:p>LLaVA-Video</text:p>
            <text:p>Whisper</text:p>
          </table:table-cell>
          <table:table-cell/>
          <table:table-cell table:style-name="ce5" office:value-type="string" calcext:value-type="string">
            <text:p><text:a xlink:href="https://arxiv.org/abs/2409.12191" xlink:type="simple">https://arxiv.org/abs/2409.12191</text:a></text:p>
          </table:table-cell>
          <table:table-cell table:number-columns-repeated="16375"/>
        </table:table-row>
        <table:table-row table:style-name="ro8">
          <table:table-cell office:value-type="string" calcext:value-type="string">
            <text:p>Content-Based Video Retrieval in Historical</text:p>
            <text:p>Collections of the German Broadcasting Archive</text:p>
          </table:table-cell>
          <table:table-cell office:value-type="string" calcext:value-type="string">
            <text:p>Markus Mühling</text:p>
            <text:p>Manja Meister</text:p>
            <text:p>Nikolaus Korfhage</text:p>
            <text:p>Jörg Wehling</text:p>
            <text:p>Angelika Hörth</text:p>
            <text:p>Ralph Ewerth</text:p>
            <text:p>Bernd Freisleben</text:p>
          </table:table-cell>
          <table:table-cell office:value-type="string" calcext:value-type="string">
            <text:p>Indexation </text:p>
          </table:table-cell>
          <table:table-cell table:style-name="ce5" office:value-type="string" calcext:value-type="string">
            <text:p><text:a xlink:href="https://arxiv.org/pdf/1702.03790" xlink:type="simple">https://arxiv.org/pdf/1702.03790</text:a></text:p>
          </table:table-cell>
          <table:table-cell table:style-name="ce8" office:value-type="string" calcext:value-type="string">
            <text:p> Description en détail d’un système de retrieval vidéo déployé sur 2500 heures d’archives télévisuelles de la RDA à l'aide d'un CNN multi label fine tuné sur googlenet. </text:p>
            <text:p>Le modèle est construit sur une étude des requêtes utilisateurs : ce qu'ils cherchent, ce qu'ils ne trouvent pas...</text:p>
          </table:table-cell>
          <table:table-cell/>
          <table:table-cell office:value-type="string" calcext:value-type="string">
            <text:p>CNN</text:p>
            <text:p>Googlenet</text:p>
            <text:p>Tesseract</text:p>
          </table:table-cell>
          <table:table-cell office:value-type="string" calcext:value-type="string">
            <text:p>OCR</text:p>
            <text:p>semantic hashing</text:p>
            <text:p>algorithme MSER</text:p>
            <text:p/>
          </table:table-cell>
          <table:table-cell table:number-columns-repeated="16376"/>
        </table:table-row>
        <table:table-row table:style-name="ro3">
          <table:table-cell office:value-type="string" calcext:value-type="string">
            <text:p/>
            <text:p>Crosspoint and Amplify will manage the automatic metadata of the RTVE Archive using AI</text:p>
          </table:table-cell>
          <table:table-cell/>
          <table:table-cell office:value-type="string" calcext:value-type="string">
            <text:p>Indexation </text:p>
          </table:table-cell>
          <table:table-cell table:style-name="ce5" office:value-type="string" calcext:value-type="string">
            <text:p><text:a xlink:href="https://www.panoramaaudiovisual.com/en/2025/09/04/crosspoint-and-amplify-will-manage-the-automatic-metadata-of-the-rtve-archive-using-ai/" xlink:type="simple">https://www.panoramaaudiovisual.com/en/2025/09/04/crosspoint-and-amplify-will-manage-the-automatic-metadata-of-the-rtve-archive-using-ai/</text:a></text:p>
          </table:table-cell>
          <table:table-cell table:style-name="ce8" office:value-type="string" calcext:value-type="string">
            <text:p>Projet de la RTVE d'utiliser Crosspoint (basé sur Amplify), pour indexer automatiquement les archives audiovisuelles : transcription d'audio, NER, extraction de mots clés, classification automatique, production de résumés, segmentation sémantique. </text:p>
          </table:table-cell>
          <table:table-cell/>
          <table:table-cell office:value-type="string" calcext:value-type="string">
            <text:p>Crosspoint</text:p>
            <text:p>Amplify Seiri</text:p>
            <text:p>Memnon</text:p>
          </table:table-cell>
          <table:table-cell office:value-type="string" calcext:value-type="string">
            <text:p>OCR</text:p>
            <text:p>NER</text:p>
            <text:p/>
          </table:table-cell>
          <table:table-cell table:number-columns-repeated="16376"/>
        </table:table-row>
        <table:table-row table:style-name="ro9">
          <table:table-cell office:value-type="string" calcext:value-type="string">
            <text:p>AI-driven Metadata Extraction and Semantic Search for Audiovisual Archives</text:p>
            <text:p/>
          </table:table-cell>
          <table:table-cell office:value-type="string" calcext:value-type="string">
            <text:p>André Rattinger </text:p>
            <text:p>Giacomo AlliataKirell </text:p>
            <text:p>BenziSarah Kenderdine</text:p>
          </table:table-cell>
          <table:table-cell office:value-type="string" calcext:value-type="string">
            <text:p>Indexation</text:p>
          </table:table-cell>
          <table:table-cell table:style-name="ce5" office:value-type="string" calcext:value-type="string">
            <text:p><text:a xlink:href="https://library.imaging.org/archiving/articles/22/1/21" xlink:type="simple">https://library.imaging.org/archiving/articles/22/1/21 </text:a></text:p>
          </table:table-cell>
          <table:table-cell table:style-name="ce8" office:value-type="string" calcext:value-type="string">
            <text:p>Description du système archivevault et de la méthodologie utilisée pour extraire automatiquement des métadonnées depuis des archives audiovisuelles. </text:p>
            <text:p>Notamment utilisé par les archives de la RTS.  </text:p>
          </table:table-cell>
          <table:table-cell/>
          <table:table-cell office:value-type="string" calcext:value-type="string">
            <text:p>ArchiveVault</text:p>
          </table:table-cell>
          <table:table-cell office:value-type="string" calcext:value-type="string">
            <text:p>NER (spaCY)</text:p>
            <text:p>Reconnaissance vocale et transcription (WhisperX)</text:p>
            <text:p>pgvector </text:p>
            <text:p>Openpifpaf</text:p>
          </table:table-cell>
          <table:table-cell table:number-columns-repeated="16376"/>
        </table:table-row>
        <table:table-row table:style-name="ro2">
          <table:table-cell office:value-type="string" calcext:value-type="string">
            <text:p>Artificial Intelligence at the service of the RTS Audiovisual Archives</text:p>
          </table:table-cell>
          <table:table-cell office:value-type="string" calcext:value-type="string">
            <text:p>Pietro Rezzonico,</text:p>
          </table:table-cell>
          <table:table-cell office:value-type="string" calcext:value-type="string">
            <text:p>Indexation</text:p>
          </table:table-cell>
          <table:table-cell table:style-name="ce5" office:value-type="string" calcext:value-type="string">
            <text:p><text:a xlink:href="https://fiatifta.org/awards-editions/awards-2019/" xlink:type="simple">https://fiatifta.org/awards-editions/awards-2019/</text:a></text:p>
          </table:table-cell>
          <table:table-cell table:style-name="ce8" office:value-type="string" calcext:value-type="string">
            <text:p>Les archives de la RTS ont mis en place la reconnaissance faciale, recherche visuelle, et classification automatique. Un peu plus d'infos dans cette vidéo : </text:p>
            <text:p>https://www.youtube.com/watch?v=Cp-Sd0KQ-SA </text:p>
          </table:table-cell>
          <table:table-cell table:number-columns-repeated="16379"/>
        </table:table-row>
        <table:table-row table:style-name="ro10">
          <table:table-cell office:value-type="string" calcext:value-type="string">
            <text:p>La recherche avec IA</text:p>
          </table:table-cell>
          <table:table-cell office:value-type="string" calcext:value-type="string">
            <text:p>Amorce</text:p>
          </table:table-cell>
          <table:table-cell office:value-type="string" calcext:value-type="string">
            <text:p>NLP</text:p>
          </table:table-cell>
          <table:table-cell table:style-name="ce5" office:value-type="string" calcext:value-type="string">
            <text:p><text:a xlink:href="https://www.amorce.eu/projets-la-recherche-avec-ia-1535-1041-0-0.html" xlink:type="simple">https://www.amorce.eu/projets-la-recherche-avec-ia-1535-1041-0-0.html
https://archipanion.amorce.eu/fr </text:a></text:p>
          </table:table-cell>
          <table:table-cell table:style-name="ce8" office:value-type="string" calcext:value-type="string">
            <text:p>La plateforme Amorce a mis en place une recherche en langage naturel pour les archives audiovisuelles avec Archipanion</text:p>
          </table:table-cell>
          <table:table-cell/>
          <table:table-cell office:value-type="string" calcext:value-type="string">
            <text:p>Archipanion (recherche visuelle assistée par IA, extraction de données structurées. </text:p>
            <text:p>https://www.archipanion.com/fr/  </text:p>
          </table:table-cell>
          <table:table-cell table:number-columns-repeated="16377"/>
        </table:table-row>
        <table:table-row table:style-name="ro1">
          <table:table-cell office:value-type="string" calcext:value-type="string">
            <text:p>Traitements IA à l'INA</text:p>
          </table:table-cell>
          <table:table-cell office:value-type="string" calcext:value-type="string">
            <text:p>INA</text:p>
          </table:table-cell>
          <table:table-cell office:value-type="string" calcext:value-type="string">
            <text:p>Indexation</text:p>
          </table:table-cell>
          <table:table-cell table:style-name="ce5" office:value-type="string" calcext:value-type="string">
            <text:p><text:a xlink:href="https://data.ina.fr/traitements-ia" xlink:type="simple">https://data.ina.fr/traitements-ia</text:a></text:p>
          </table:table-cell>
          <table:table-cell table:style-name="ce8" office:value-type="string" calcext:value-type="string">
            <text:p>Présentation des traitements IA à l'INA comprenant : analyse du son, transcriptions automatiques, reconnaissance d'entités nommées. </text:p>
          </table:table-cell>
          <table:table-cell table:number-columns-repeated="16379"/>
        </table:table-row>
        <table:table-row table:style-name="ro11">
          <table:table-cell office:value-type="string" calcext:value-type="string">
            <text:p>CamemBERT: a Tasty French Language Model</text:p>
          </table:table-cell>
          <table:table-cell office:value-type="string" calcext:value-type="string">
            <text:p>Louis Martin</text:p>
            <text:p> Benjamin Muller Pedro Javier Ortiz Suárez</text:p>
            <text:p>Yoann Dupont Laurent Romary Éric Villemonte de la Clergerie</text:p>
            <text:p>Djamé Seddah Benoît Sagot</text:p>
          </table:table-cell>
          <table:table-cell office:value-type="string" calcext:value-type="string">
            <text:p>NLP</text:p>
          </table:table-cell>
          <table:table-cell table:style-name="ce5" office:value-type="string" calcext:value-type="string">
            <text:p><text:a xlink:href="https://inria.hal.science/hal-02889805/document" xlink:type="simple">https://inria.hal.science/hal-02889805/document</text:a></text:p>
          </table:table-cell>
          <table:table-cell table:style-name="ce8" office:value-type="string" calcext:value-type="string">
            <text:p>Article sur le modèle de langage camemBERT entrainé en français. </text:p>
          </table:table-cell>
          <table:table-cell table:number-columns-repeated="16379"/>
        </table:table-row>
        <table:table-row table:style-name="ro2">
          <table:table-cell office:value-type="string" calcext:value-type="string">
            <text:p>Qu’est ce que l’indexation de documents ? Guide complet et automatisation</text:p>
          </table:table-cell>
          <table:table-cell office:value-type="string" calcext:value-type="string">
            <text:p>Alexandre Baudon</text:p>
          </table:table-cell>
          <table:table-cell office:value-type="string" calcext:value-type="string">
            <text:p>Indexation </text:p>
          </table:table-cell>
          <table:table-cell table:style-name="ce5" office:value-type="string" calcext:value-type="string">
            <text:p><text:a xlink:href="https://deltic.fr/indexation-documents/" xlink:type="simple">https://deltic.fr/indexation-documents/</text:a></text:p>
          </table:table-cell>
          <table:table-cell office:value-type="string" calcext:value-type="string">
            <text:p>Article général qui présente les grands principe de l'indexation de documents et le challenge que l'automatisation de ce processus représente. </text:p>
          </table:table-cell>
          <table:table-cell table:number-columns-repeated="16379"/>
        </table:table-row>
        <table:table-row table:style-name="ro2">
          <table:table-cell office:value-type="string" calcext:value-type="string">
            <text:p>Utilisation du contexte pour l’indexation Sémantique des images et vidéos</text:p>
          </table:table-cell>
          <table:table-cell office:value-type="string" calcext:value-type="string">
            <text:p>Abdelkader Hamadi</text:p>
          </table:table-cell>
          <table:table-cell office:value-type="string" calcext:value-type="string">
            <text:p>Indexation</text:p>
          </table:table-cell>
          <table:table-cell table:style-name="ce5" office:value-type="string" calcext:value-type="string">
            <text:p><text:a xlink:href="https://hal.science/tel-01137526v1" xlink:type="simple">https://hal.science/tel-01137526v1</text:a></text:p>
          </table:table-cell>
          <table:table-cell office:value-type="string" calcext:value-type="string">
            <text:p>Thèse qui étudie les moyens en places et à mettre en place afin de créer une indexation automatisée intégrant des notions sémantiques. C'est à dire une indexation basée sur la compréhension d'un film/d'un image par l'IA. </text:p>
          </table:table-cell>
          <table:table-cell table:number-columns-repeated="16379"/>
        </table:table-row>
        <table:table-row table:style-name="ro2">
          <table:table-cell table:style-name="ce6" office:value-type="string" calcext:value-type="string">
            <text:p>Traitement automatique du langage naturel avec Python – Le NLP avec spaCy et NLTK</text:p>
          </table:table-cell>
          <table:table-cell office:value-type="string" calcext:value-type="string">
            <text:p>Benoît Prieur</text:p>
          </table:table-cell>
          <table:table-cell office:value-type="string" calcext:value-type="string">
            <text:p>NLP</text:p>
          </table:table-cell>
          <table:table-cell table:style-name="ce5" office:value-type="string" calcext:value-type="string">
            <text:p><text:a xlink:href="https://hal.science/hal-04610717v1" xlink:type="simple">https://hal.science/hal-04610717v1</text:a></text:p>
          </table:table-cell>
          <table:table-cell office:value-type="string" calcext:value-type="string">
            <text:p>Ouvrage disponible uniquement l'achat, le lien ne comporte que le résumé, qui présente deux bibliothèques python particulièrement utile pour le NLP.</text:p>
          </table:table-cell>
          <table:table-cell office:value-type="string" calcext:value-type="string">
            <text:p>SPACY et NLTK</text:p>
          </table:table-cell>
          <table:table-cell office:value-type="string" calcext:value-type="string">
            <text:p>NLP</text:p>
          </table:table-cell>
          <table:table-cell table:number-columns-repeated="16377"/>
        </table:table-row>
        <table:table-row table:style-name="ro2">
          <table:table-cell office:value-type="string" calcext:value-type="string">
            <text:p>Qu'est ce que le NLP ?</text:p>
          </table:table-cell>
          <table:table-cell office:value-type="string" calcext:value-type="string">
            <text:p>Cole Stryker et Jim Holdsworth</text:p>
          </table:table-cell>
          <table:table-cell office:value-type="string" calcext:value-type="string">
            <text:p>NLP</text:p>
          </table:table-cell>
          <table:table-cell table:style-name="ce5" office:value-type="string" calcext:value-type="string">
            <text:p><text:a xlink:href="https://www.ibm.com/fr-fr/think/topics/natural-language-processing" xlink:type="simple">https://www.ibm.com/fr-fr/think/topics/natural-language-processing</text:a></text:p>
          </table:table-cell>
          <table:table-cell office:value-type="string" calcext:value-type="string">
            <text:p>Article de IBM permettant de présenter et de comprendre les bases du NLP. </text:p>
          </table:table-cell>
          <table:table-cell table:number-columns-repeated="16379"/>
        </table:table-row>
        <table:table-row table:style-name="ro2">
          <table:table-cell office:value-type="string" calcext:value-type="string">
            <text:p>TRECVID 2024 : Evaluating video search, captionning and activity recognition</text:p>
          </table:table-cell>
          <table:table-cell office:value-type="string" calcext:value-type="string">
            <text:p>George Awad</text:p>
          </table:table-cell>
          <table:table-cell office:value-type="string" calcext:value-type="string">
            <text:p>Indexation</text:p>
          </table:table-cell>
          <table:table-cell table:style-name="ce5" office:value-type="string" calcext:value-type="string">
            <text:p><text:a xlink:href="https://trec.nist.gov/pubs/trec33/papers/Overview_avs_vtt_actev.pdf" xlink:type="simple">https://trec.nist.gov/pubs/trec33/papers/Overview_avs_vtt_actev.pdf</text:a></text:p>
          </table:table-cell>
          <table:table-cell table:style-name="ce4" office:value-type="string" calcext:value-type="string">
            <text:p><text:span text:style-name="T1">TRECVID est une publication annuelle de </text:span><text:span text:style-name="T2">Benchmark</text:span><text:span text:style-name="T3"> dans le domaine de l'application d'IA sur des vidéos et images pour leurs traitement.</text:span></text:p>
          </table:table-cell>
          <table:table-cell table:number-columns-repeated="16379"/>
        </table:table-row>
        <table:table-row table:style-name="ro7">
          <table:table-cell office:value-type="string" calcext:value-type="string">
            <text:p>Changing the Paradigm from Dynamic Queries to LLM-generated SQL Queries with Human Intervention</text:p>
          </table:table-cell>
          <table:table-cell office:value-type="string" calcext:value-type="string">
            <text:p>Ambre Assore, Hyeon Jeon, Sungbok Shin, Jean-Daniel Fekete</text:p>
          </table:table-cell>
          <table:table-cell office:value-type="string" calcext:value-type="string">
            <text:p>NLP</text:p>
          </table:table-cell>
          <table:table-cell table:style-name="ce5" office:value-type="string" calcext:value-type="string">
            <text:p><text:a xlink:href="https://hal.science/hal-05341025v1" xlink:type="simple">https://hal.science/hal-05341025v1</text:a></text:p>
          </table:table-cell>
          <table:table-cell office:value-type="string" calcext:value-type="string">
            <text:p>Article issus d'un Congrès, il présente l'utilisation possibl du LLM pour la génération automatisée de requête SQL sur une base de donnée médicale. </text:p>
          </table:table-cell>
          <table:table-cell table:number-columns-repeated="16379"/>
        </table:table-row>
        <table:table-row table:style-name="ro4">
          <table:table-cell table:style-name="ce6" office:value-type="string" calcext:value-type="string">
            <text:p>Think2SQL: Blueprinting Reward Density and Advantage Scaling for Effective Text-to-SQL Reasoning,</text:p>
          </table:table-cell>
          <table:table-cell office:value-type="string" calcext:value-type="string">
            <text:p>Simone Papicchio, Simone Rossi, Luca Cagliero, Paolo Papotti</text:p>
          </table:table-cell>
          <table:table-cell office:value-type="string" calcext:value-type="string">
            <text:p>NLP</text:p>
          </table:table-cell>
          <table:table-cell table:style-name="ce5" office:value-type="string" calcext:value-type="string">
            <text:p><text:a xlink:href="https://hal.science/hal-05523999v1" xlink:type="simple">https://hal.science/hal-05523999v1</text:a></text:p>
          </table:table-cell>
          <table:table-cell table:style-name="ce4" office:value-type="string" calcext:value-type="string">
            <text:p><text:span text:style-name="T1">Article présentant les améliorations possibles d'un pipeline classique de </text:span><text:span text:style-name="T2">text-to-SQL</text:span></text:p>
          </table:table-cell>
          <table:table-cell table:number-columns-repeated="16379"/>
        </table:table-row>
        <table:table-row table:style-name="ro1">
          <table:table-cell office:value-type="string" calcext:value-type="string">
            <text:p>Interroger vos bases en langage naturel</text:p>
          </table:table-cell>
          <table:table-cell/>
          <table:table-cell office:value-type="string" calcext:value-type="string">
            <text:p>NLP</text:p>
          </table:table-cell>
          <table:table-cell table:style-name="ce5" office:value-type="string" calcext:value-type="string">
            <text:p><text:a xlink:href="https://flowt.fr/blog/text-to-sql-ia-generative-interroger-bases-donnees-langage-naturel/" xlink:type="simple">https://flowt.fr/blog/text-to-sql-ia-generative-interroger-bases-donnees-langage-naturel/</text:a></text:p>
          </table:table-cell>
          <table:table-cell table:style-name="ce4" office:value-type="string" calcext:value-type="string">
            <text:p><text:span text:style-name="T1">Article web qui récapitule l'essentiel d'un pipeline </text:span><text:span text:style-name="T2">Text-to-SQL</text:span><text:span text:style-name="T3"> et qui présente des options de pipeline utilisable</text:span></text:p>
          </table:table-cell>
          <table:table-cell office:value-type="string" calcext:value-type="string">
            <text:p>VANA AI , LANGCHAIN SQL</text:p>
          </table:table-cell>
          <table:table-cell table:number-columns-repeated="16378"/>
        </table:table-row>
        <table:table-row table:style-name="ro7">
          <table:table-cell office:value-type="string" calcext:value-type="string">
            <text:p>Structural deep encoding for tabl question answering</text:p>
          </table:table-cell>
          <table:table-cell office:value-type="string" calcext:value-type="string">
            <text:p>Raphaël Mouraviee, Benjamin Piwowarski, Sylvain Lamprier</text:p>
          </table:table-cell>
          <table:table-cell office:value-type="string" calcext:value-type="string">
            <text:p>NLP</text:p>
          </table:table-cell>
          <table:table-cell table:style-name="ce5" office:value-type="string" calcext:value-type="string">
            <text:p><text:a xlink:href="https://hal.sorbonne-universite.fr/hal-05392142/file/2025.findings-acl.121.pdf" xlink:type="simple">https://hal.sorbonne-universite.fr/hal-05392142/file/2025.findings-acl.121.pdf</text:a></text:p>
          </table:table-cell>
          <table:table-cell table:style-name="ce4" office:value-type="string" calcext:value-type="string">
            <text:p><text:span text:style-name="T1">Article qui présente les fruits du projet TaBERT. Expose les difficultés et challenge à relever quant à l'application d'un NLP reposant sur des </text:span><text:span text:style-name="T2">transformers</text:span><text:span text:style-name="T3"> sur des données tabulaires. </text:span></text:p>
          </table:table-cell>
          <table:table-cell office:value-type="string" calcext:value-type="string">
            <text:p>BERT</text:p>
          </table:table-cell>
          <table:table-cell office:value-type="string" calcext:value-type="string">
            <text:p>Transformers</text:p>
          </table:table-cell>
          <table:table-cell table:number-columns-repeated="16377"/>
        </table:table-row>
        <table:table-row table:style-name="ro8">
          <table:table-cell office:value-type="string" calcext:value-type="string">
            <text:p>Logical and Physical Optimizations for SQL query execution over large language models</text:p>
          </table:table-cell>
          <table:table-cell office:value-type="string" calcext:value-type="string">
            <text:p>Dario Satriani, Enzo Veltri, Donatello Santoro, Sara Rosato, Simone Varriale, Paolo Papotti</text:p>
          </table:table-cell>
          <table:table-cell office:value-type="string" calcext:value-type="string">
            <text:p>NLP</text:p>
          </table:table-cell>
          <table:table-cell table:style-name="ce5" office:value-type="string" calcext:value-type="string">
            <text:p><text:a xlink:href="https://hal.science/hal-05034648v1" xlink:type="simple">https://hal.science/hal-05034648v1</text:a></text:p>
          </table:table-cell>
          <table:table-cell office:value-type="string" calcext:value-type="string">
            <text:p>Article qui propose une manière de fiabiliser les résultats obtenus par interrogation d'un LLM sur une base de donnée. Expose les difficultées repérée et des solutions à mettre en place afin de fiabiliser les résultats.</text:p>
          </table:table-cell>
          <table:table-cell office:value-type="string" calcext:value-type="string">
            <text:p>LLM, Galois </text:p>
          </table:table-cell>
          <table:table-cell table:number-columns-repeated="16378"/>
        </table:table-row>
        <table:table-row table:style-name="ro2">
          <table:table-cell office:value-type="string" calcext:value-type="string">
            <text:p>Comment générer du SQL à partir de texte avec les LLMs ? </text:p>
          </table:table-cell>
          <table:table-cell office:value-type="string" calcext:value-type="string">
            <text:p>Franck Scandolera</text:p>
          </table:table-cell>
          <table:table-cell office:value-type="string" calcext:value-type="string">
            <text:p>NLP</text:p>
          </table:table-cell>
          <table:table-cell table:style-name="ce5" office:value-type="string" calcext:value-type="string">
            <text:p><text:a xlink:href="https://elearning.formations-analytics.com/programmation/comment-generer-du-sql-a-partir-de-texte-avec-les-llms/" xlink:type="simple">https://elearning.formations-analytics.com/programmation/comment-generer-du-sql-a-partir-de-texte-avec-les-llms/</text:a></text:p>
          </table:table-cell>
          <table:table-cell table:style-name="ce4" office:value-type="string" calcext:value-type="string">
            <text:p><text:span text:style-name="T1">Article permettant de faire un point sur le </text:span><text:span text:style-name="T2">text-to-sql</text:span><text:span text:style-name="T3"> et de présenter différents outils et alternatives pour la génération de SQL à partir de requête en langage naturel via LLMs</text:span></text:p>
          </table:table-cell>
          <table:table-cell office:value-type="string" calcext:value-type="string">
            <text:p>LLM</text:p>
          </table:table-cell>
          <table:table-cell table:number-columns-repeated="16378"/>
        </table:table-row>
        <table:table-row table:style-name="ro3">
          <table:table-cell office:value-type="string" calcext:value-type="string">
            <text:p>Interroger la mémoire d'entreprise par l'IA : le RAG face aux archives orales. Enjeux et limites pour l'histoire appliquée</text:p>
          </table:table-cell>
          <table:table-cell office:value-type="string" calcext:value-type="string">
            <text:p>Bénédicte Tuza</text:p>
          </table:table-cell>
          <table:table-cell office:value-type="string" calcext:value-type="string">
            <text:p>Indexation </text:p>
          </table:table-cell>
          <table:table-cell table:style-name="ce5" office:value-type="string" calcext:value-type="string">
            <text:p><text:a xlink:href="https://dumas.ccsd.cnrs.fr/dumas-05390427v1/file/ENC-PSL_M2TNAH_TUZA_Bénédicte.pdf" xlink:type="simple">https://dumas.ccsd.cnrs.fr/dumas-05390427v1/file/ENC-PSL_M2TNAH_TUZA_B%C3%A9n%C3%A9dicte.pdf</text:a></text:p>
          </table:table-cell>
          <table:table-cell table:style-name="ce4" office:value-type="string" calcext:value-type="string">
            <text:p><text:span text:style-name="T1">Mémoire soutenu en 2025 par Bénédicte Tuza pour l'obtention de son diplôme Technologies Numériques Appliquées à l'Histoire. Il fait le tour sur l'utilisation possible du RAG dans les archives. Extrêmement intéressant pour comprendre comment un RAG fonctionne et les limites de cette technologies. Le RAG étant au centre de  l'indexation comme du </text:span><text:span text:style-name="T2">text-to-sql.</text:span></text:p>
          </table:table-cell>
          <table:table-cell table:number-columns-repeated="16379"/>
        </table:table-row>
        <table:table-row table:style-name="ro7">
          <table:table-cell table:style-name="ce4" office:value-type="string" calcext:value-type="string">
            <text:p><text:span text:style-name="T1">Battle of the Large Language Models : Dolly vs LLaMA vs Vicuna vs Guanaco vs Bard vs ChatGPT - A </text:span><text:span text:style-name="T2">text-too-SQL</text:span><text:span text:style-name="T3"> Parsing Comparaison</text:span></text:p>
          </table:table-cell>
          <table:table-cell office:value-type="string" calcext:value-type="string">
            <text:p>Shuo Sun, Yuchen Zhang, Jiahuan Yan, Yuze Gao, Donovan Ong, Bin Chen, Jian Su</text:p>
          </table:table-cell>
          <table:table-cell office:value-type="string" calcext:value-type="string">
            <text:p>NLP</text:p>
          </table:table-cell>
          <table:table-cell table:style-name="ce5" office:value-type="string" calcext:value-type="string">
            <text:p><text:a xlink:href="https://arxivv.org/abs/2310.10190" xlink:type="simple">https://arxivv.org/abs/2310.10190</text:a></text:p>
          </table:table-cell>
          <table:table-cell office:value-type="string" calcext:value-type="string">
            <text:p>Article de comparaison de différents LLMs en fonction de leurs capacité à générer une requête SQL valide et correspondant à une requête utilisateur formulée en Langage Naturel. </text:p>
          </table:table-cell>
          <table:table-cell office:value-type="string" calcext:value-type="string">
            <text:p>Dolly, LLaMA, Vicuna, Guanaco, Bard, ChatGPT</text:p>
          </table:table-cell>
          <table:table-cell table:number-columns-repeated="16378"/>
        </table:table-row>
        <table:table-row table:style-name="ro2">
          <table:table-cell table:style-name="ce7" office:value-type="string" calcext:value-type="string">
            <text:p>Cinéma &amp; IA : Incorporer une intelligence artificielle pour (ré)écrire l’histoire du cinéma ? Une exploration de méthodes et d’analyses possibles</text:p>
          </table:table-cell>
          <table:table-cell office:value-type="string" calcext:value-type="string">
            <text:p>Beatriz-Tadeo Fuica</text:p>
          </table:table-cell>
          <table:table-cell office:value-type="string" calcext:value-type="string">
            <text:p>Indexation </text:p>
          </table:table-cell>
          <table:table-cell table:style-name="ce5" office:value-type="string" calcext:value-type="string">
            <text:p><text:a xlink:href="https://inalelab.hypotheses.org/4192" xlink:type="simple">https://inalelab.hypotheses.org/4192</text:a></text:p>
          </table:table-cell>
          <table:table-cell office:value-type="string" calcext:value-type="string">
            <text:p>Article surtout utile pour sa large bibliographie vers d'autres projets, avancées et concepts dans l'application d'IA au monde des images animés.</text:p>
          </table:table-cell>
          <table:table-cell table:number-columns-repeated="16379"/>
        </table:table-row>
        <table:table-row table:style-name="ro2">
          <table:table-cell office:value-type="string" calcext:value-type="string">
            <text:p>SNOOP : moteurs de recherche d'objets visuels</text:p>
          </table:table-cell>
          <table:table-cell office:value-type="string" calcext:value-type="string">
            <text:p>INA</text:p>
          </table:table-cell>
          <table:table-cell office:value-type="string" calcext:value-type="string">
            <text:p>Indexation </text:p>
          </table:table-cell>
          <table:table-cell table:style-name="ce5" office:value-type="string" calcext:value-type="string">
            <text:p><text:a xlink:href="https://inalelab.hypotheses.org/642" xlink:type="simple">https://inalelab.hypotheses.org/642</text:a></text:p>
          </table:table-cell>
          <table:table-cell office:value-type="string" calcext:value-type="string">
            <text:p>Comme précédemment, cet article est assez peu bavard mais contient de la bibliographie pouvant être intéressant sur le projet SNOOP mis en place par l'INA. IA de reconnaissance d'objets. </text:p>
          </table:table-cell>
          <table:table-cell table:number-columns-repeated="16379"/>
        </table:table-row>
        <table:table-row table:style-name="ro2">
          <table:table-cell table:style-name="ce4" office:value-type="string" calcext:value-type="string">
            <text:p><text:span text:style-name="T1">Content Enhanced BERT-based </text:span><text:span text:style-name="T2">Text-to-SQL </text:span><text:span text:style-name="T3">Generation</text:span></text:p>
          </table:table-cell>
          <table:table-cell office:value-type="string" calcext:value-type="string">
            <text:p>Tong Guo, Huilin Gao</text:p>
          </table:table-cell>
          <table:table-cell office:value-type="string" calcext:value-type="string">
            <text:p>NLP</text:p>
          </table:table-cell>
          <table:table-cell table:style-name="ce5" office:value-type="string" calcext:value-type="string">
            <text:p><text:a xlink:href="https://arxiv.org/abs/1910.07179" xlink:type="simple">https://arxiv.org/abs/1910.07179 </text:a></text:p>
          </table:table-cell>
          <table:table-cell office:value-type="string" calcext:value-type="string">
            <text:p>Article d'approfondissement de la technologie BERT pour la génération de SQL à partir de texte. </text:p>
          </table:table-cell>
          <table:table-cell table:number-columns-repeated="16379"/>
        </table:table-row>
        <table:table-row table:style-name="ro7">
          <table:table-cell office:value-type="string" calcext:value-type="string">
            <text:p>Des usages archivistiques pour l'intelligence artificielle : le cas de l'automatisation de l'inventaire des archivesà la Chambre des Députés du Grand-Duché de Luxembourg</text:p>
          </table:table-cell>
          <table:table-cell office:value-type="string" calcext:value-type="string">
            <text:p>Sarah Marcq</text:p>
          </table:table-cell>
          <table:table-cell office:value-type="string" calcext:value-type="string">
            <text:p>Indexation </text:p>
          </table:table-cell>
          <table:table-cell table:style-name="ce5" office:value-type="string" calcext:value-type="string">
            <text:p><text:a xlink:href="https://dumas.ccsd.cnrs.fr/dumas-04765262" xlink:type="simple">https://dumas.ccsd.cnrs.fr/dumas-04765262</text:a></text:p>
          </table:table-cell>
          <table:table-cell office:value-type="string" calcext:value-type="string">
            <text:p>Mémoire soutenu en 2024 par Sarah Marcq pour l'obtention de son diplôme Technologie Numériques Appliquées à l'Histoire, il présente les méthodes de traitement mise en place pour l'automatisation du traitement des archives de la Chambre des Députés du Grand-Duché de Luxembourg. Très intéressant car elle s'appuie sur différentes technologies d'IA et balaye toute la richesse et complexité d'un tel projet. N'inclus pas de travail sur des vidéos.</text:p>
          </table:table-cell>
          <table:table-cell/>
          <table:table-cell office:value-type="string" calcext:value-type="string">
            <text:p>HTR, LLM, NEL,, NER, NLP, OCR, Embeddings, speech to tetx, token, topic modelling, RAG</text:p>
          </table:table-cell>
          <table:table-cell table:number-columns-repeated="16377"/>
        </table:table-row>
        <table:table-row table:style-name="ro2">
          <table:table-cell office:value-type="string" calcext:value-type="string">
            <text:p>Digital Humanities and Natural Language Processing : "Je t'aime... Moi non plus" </text:p>
          </table:table-cell>
          <table:table-cell office:value-type="string" calcext:value-type="string">
            <text:p>Thierry Poibeau, Pablo Ruiz</text:p>
          </table:table-cell>
          <table:table-cell office:value-type="string" calcext:value-type="string">
            <text:p>NLP</text:p>
          </table:table-cell>
          <table:table-cell table:style-name="ce5" office:value-type="string" calcext:value-type="string">
            <text:p><text:a xlink:href="https://hal.science/hal-02970302" xlink:type="simple">https://hal.science/hal-02970302</text:a></text:p>
          </table:table-cell>
          <table:table-cell table:style-name="ce4" office:value-type="string" calcext:value-type="string">
            <text:p><text:span text:style-name="T1">Article qui a pour objet de présenter différentes technologies NLP et la manière de les utiliser dans les Humanités Numériques, ou </text:span><text:span text:style-name="T2">Digital Humanities. </text:span><text:span text:style-name="T3">Part d'un constat d'une fiable utilisation de cette technologie et vise à la rendre plus "populaire' dans le monde des humanités numériques. </text:span></text:p>
          </table:table-cell>
          <table:table-cell/>
          <table:table-cell office:value-type="string" calcext:value-type="string">
            <text:p>NLP</text:p>
          </table:table-cell>
          <table:table-cell table:number-columns-repeated="16377"/>
        </table:table-row>
        <table:table-row table:style-name="ro2">
          <table:table-cell office:value-type="string" calcext:value-type="string">
            <text:p>Le traitement automatique des langues pour les sciences sociales. Quelques éléments de réflexion à partir d'expériences récentes</text:p>
          </table:table-cell>
          <table:table-cell office:value-type="string" calcext:value-type="string">
            <text:p>Thierry Poibeau </text:p>
          </table:table-cell>
          <table:table-cell office:value-type="string" calcext:value-type="string">
            <text:p>NLP</text:p>
          </table:table-cell>
          <table:table-cell table:style-name="ce5" office:value-type="string" calcext:value-type="string">
            <text:p><text:a xlink:href="https://shs.cairn.info/revue-reseaux-2014-6-page-25" xlink:type="simple">https://shs.cairn.info/revue-reseaux-2014-6-page-25</text:a></text:p>
          </table:table-cell>
          <table:table-cell office:value-type="string" calcext:value-type="string">
            <text:p>Article de 2014 qui propose des pistes de réflexions quant à l'évolution et l'utilisatioon du NLP </text:p>
          </table:table-cell>
          <table:table-cell table:number-columns-repeated="16379"/>
        </table:table-row>
        <table:table-row table:style-name="ro2">
          <table:table-cell office:value-type="string" calcext:value-type="string">
            <text:p>Object ddetection : combining YOLO and SAM2 for Enhanced Video Segmentation</text:p>
          </table:table-cell>
          <table:table-cell office:value-type="string" calcext:value-type="string">
            <text:p>Genet Gessessew</text:p>
          </table:table-cell>
          <table:table-cell office:value-type="string" calcext:value-type="string">
            <text:p>Indexation </text:p>
          </table:table-cell>
          <table:table-cell table:style-name="ce5" office:value-type="string" calcext:value-type="string">
            <text:p><text:a xlink:href="https://medium.com/@genet.gessessew/supercharging-object-detection-combining-yolo-and-sam2-for-enhanced-video-segmentation-3a8c5e603430" xlink:type="simple">https://medium.com/@genet.gessessew/supercharging-object-detection-combining-yolo-and-sam2-for-enhanced-video-segmentation-3a8c5e603430</text:a></text:p>
          </table:table-cell>
          <table:table-cell office:value-type="string" calcext:value-type="string">
            <text:p>Article WEB qui présent l'intérêt, et la réalisation technique, de combiner un modèle YOLO et SAM2 pour la segmentation de vidéos. </text:p>
          </table:table-cell>
          <table:table-cell table:number-columns-repeated="16379"/>
        </table:table-row>
        <table:table-row table:style-name="ro2">
          <table:table-cell office:value-type="string" calcext:value-type="string">
            <text:p>Qu'est ce que la recherche intelligente ?</text:p>
          </table:table-cell>
          <table:table-cell office:value-type="string" calcext:value-type="string">
            <text:p>IBM</text:p>
          </table:table-cell>
          <table:table-cell office:value-type="string" calcext:value-type="string">
            <text:p>NLP</text:p>
          </table:table-cell>
          <table:table-cell table:style-name="ce5" office:value-type="string" calcext:value-type="string">
            <text:p><text:a xlink:href="https://www.ibm.com/fr-fr/think/topics/intelligent-search" xlink:type="simple">https://www.ibm.com/fr-fr/think/topics/intelligent-search</text:a></text:p>
          </table:table-cell>
          <table:table-cell office:value-type="string" calcext:value-type="string">
            <text:p>Article WEB de IBM qui explique les bases de la recherche intelligente. C'est à dire un moteur de recherche qui repose sur le NLP et l'indexation de contenu à partir de bases de données afin de faciliter les recherches</text:p>
          </table:table-cell>
          <table:table-cell/>
          <table:table-cell office:value-type="string" calcext:value-type="string">
            <text:p>NLP </text:p>
          </table:table-cell>
          <table:table-cell table:number-columns-repeated="16377"/>
        </table:table-row>
        <table:table-row table:style-name="ro12">
          <table:table-cell office:value-type="string" calcext:value-type="string">
            <text:p>Review on Natural Language Processing Base on Different Techniques</text:p>
          </table:table-cell>
          <table:table-cell office:value-type="string" calcext:value-type="string">
            <text:p>Dastan Hussen Maulud, Siddeeq Y Ameen, Naaman Omar, Shakir Fattah Kak, Zryan Najat Rashid, Hajar Maseeh Yasin, Ibrahim Mahmood Ibrahim, Azar Abid Salih, Nareen O, M.Salim, Dindar Mikaeel Ahmed</text:p>
          </table:table-cell>
          <table:table-cell office:value-type="string" calcext:value-type="string">
            <text:p>NLP</text:p>
          </table:table-cell>
          <table:table-cell table:style-name="ce5" office:value-type="string" calcext:value-type="string">
            <text:p><text:a xlink:href="https://scispace.com/pdf/review-on-natural-language-processing-based-on-different-2qpw7nmbi4.pdf" xlink:type="simple">https://scispace.com/pdf/review-on-natural-language-processing-based-on-different-2qpw7nmbi4.pdf</text:a></text:p>
          </table:table-cell>
          <table:table-cell office:value-type="string" calcext:value-type="string">
            <text:p>Article qui met en comparaison différentes techniques d'application et d'entraïnement de différents NLP. La comparaison se fait le niveau de précision atteint par chaque méthdologies.</text:p>
          </table:table-cell>
          <table:table-cell/>
          <table:table-cell office:value-type="string" calcext:value-type="string">
            <text:p>NLP</text:p>
          </table:table-cell>
          <table:table-cell table:number-columns-repeated="16377"/>
        </table:table-row>
        <table:table-row table:style-name="ro3">
          <table:table-cell office:value-type="string" calcext:value-type="string">
            <text:p>SAM2 : Segment Anything in images and videos</text:p>
          </table:table-cell>
          <table:table-cell office:value-type="string" calcext:value-type="string">
            <text:p>Nikhila Ravi, Valentin Gabeur, Yuan-Ting Hu</text:p>
          </table:table-cell>
          <table:table-cell office:value-type="string" calcext:value-type="string">
            <text:p>Indexation </text:p>
          </table:table-cell>
          <table:table-cell table:style-name="ce5" office:value-type="string" calcext:value-type="string">
            <text:p><text:a xlink:href="https://arxiv.org/abs/2408.00714" xlink:type="simple">https://arxiv.org/abs/2408.00714</text:a></text:p>
          </table:table-cell>
          <table:table-cell office:value-type="string" calcext:value-type="string">
            <text:p>Article détaillé présentant l'outil SAM2. Permet d'en comprendre toute la complexité, les apports et limites de l'outil. </text:p>
          </table:table-cell>
          <table:table-cell office:value-type="string" calcext:value-type="string">
            <text:p>SAM2</text:p>
          </table:table-cell>
          <table:table-cell table:number-columns-repeated="16378"/>
        </table:table-row>
        <table:table-row table:style-name="ro3">
          <table:table-cell office:value-type="string" calcext:value-type="string">
            <text:p>Segment Anything for Video : A comprehensiv review of video object segmentation and tracking form Past to Future</text:p>
          </table:table-cell>
          <table:table-cell office:value-type="string" calcext:value-type="string">
            <text:p>Guoping Xu, Jayaram K. Udupa, Yajun Yu</text:p>
          </table:table-cell>
          <table:table-cell office:value-type="string" calcext:value-type="string">
            <text:p>Indexation </text:p>
          </table:table-cell>
          <table:table-cell table:style-name="ce5" office:value-type="string" calcext:value-type="string">
            <text:p><text:a xlink:href="https://arxiv.org/abs/2507.22792" xlink:type="simple">https://arxiv.org/abs/2507.22792</text:a></text:p>
          </table:table-cell>
          <table:table-cell office:value-type="string" calcext:value-type="string">
            <text:p>Examine l'application des technologies SAM et SAM2 et l'évolution qu'elle représennte dans le domaine. Permet aussi de comprendre comme SAM et SAM2 s'appliquent àà des films historiques et/ou des films créer pour le steaming.</text:p>
          </table:table-cell>
          <table:table-cell office:value-type="string" calcext:value-type="string">
            <text:p>SAM et SAM2</text:p>
          </table:table-cell>
          <table:table-cell table:number-columns-repeated="16378"/>
        </table:table-row>
        <table:table-row table:style-name="ro2">
          <table:table-cell office:value-type="string" calcext:value-type="string">
            <text:p>Watching historical films through AI : Reflections on Image Retrieval from heritage collection</text:p>
          </table:table-cell>
          <table:table-cell/>
          <table:table-cell office:value-type="string" calcext:value-type="string">
            <text:p>Indexation </text:p>
          </table:table-cell>
          <table:table-cell table:style-name="ce5" office:value-type="string" calcext:value-type="string">
            <text:p><text:a xlink:href="https://cinergie.unibo.it/article/view/13082" xlink:type="simple">https://cinergie.unibo.it/article/view/13082</text:a></text:p>
          </table:table-cell>
          <table:table-cell table:style-name="ce4" office:value-type="string" calcext:value-type="string">
            <text:p><text:span text:style-name="T1">Cet article vise à montrer comment l'IA peut être utilisé par les historiens du cinéma dans leurs travaux de recherches. Pour cela, l'article se concentre sur un état des lieux de l'IA appliqué aux vidéos et s'attarde sur différentes technologies comme SNOOP </text:span><text:span text:style-name="T2">(INA).</text:span></text:p>
          </table:table-cell>
          <table:table-cell office:value-type="string" calcext:value-type="string">
            <text:p>SNOOP</text:p>
          </table:table-cell>
          <table:table-cell table:number-columns-repeated="16378"/>
        </table:table-row>
        <table:table-row table:style-name="ro7">
          <table:table-cell office:value-type="string" calcext:value-type="string">
            <text:p>FairMOT : On the Fairness of Detection and Re-Identification in Multiple Object Tracking</text:p>
          </table:table-cell>
          <table:table-cell table:style-name="ce6" office:value-type="string" calcext:value-type="string">
            <text:p>Yifu Zhang, Chunyu Wang, Xinggang Wang, Wenjun Zeng, Wenyu Liu</text:p>
          </table:table-cell>
          <table:table-cell office:value-type="string" calcext:value-type="string">
            <text:p>Indexation </text:p>
          </table:table-cell>
          <table:table-cell table:style-name="ce5" office:value-type="string" calcext:value-type="string">
            <text:p><text:a xlink:href="https://arxiv.org/abs/2004.01888" xlink:type="simple">https://arxiv.org/abs/2004.01888</text:a></text:p>
          </table:table-cell>
          <table:table-cell table:style-name="ce4" office:value-type="string" calcext:value-type="string">
            <text:p><text:span text:style-name="T1">Article de présentation de l'outil FairMOT, les challenges qu'il relève, ces apports et limites. S'inscrit dans les MOTs, champs d'études pour le suivis, ou </text:span><text:span text:style-name="T2">tracking</text:span><text:span text:style-name="T3">, de différentes entités dans la même vidéos. </text:span></text:p>
          </table:table-cell>
          <table:table-cell table:number-columns-repeated="16379"/>
        </table:table-row>
        <table:table-row table:style-name="ro7">
          <table:table-cell table:style-name="ce7" office:value-type="string" calcext:value-type="string">
            <text:p>Seg2Track-SAM2: SAM2-based Multi-object Tracking and Segmentation</text:p>
          </table:table-cell>
          <table:table-cell table:style-name="ce4" office:value-type="string" calcext:value-type="string">
            <text:p>Diogo Mendonça, Tiago Barros, Cristiano Premebida, Urbano J. Nunes</text:p>
          </table:table-cell>
          <table:table-cell office:value-type="string" calcext:value-type="string">
            <text:p>Indexation </text:p>
          </table:table-cell>
          <table:table-cell table:style-name="ce5" office:value-type="string" calcext:value-type="string">
            <text:p><text:a xlink:href="https://arxiv.org/abs/2509.11772" xlink:type="simple">https://arxiv.org/abs/2509.11772</text:a></text:p>
          </table:table-cell>
          <table:table-cell table:style-name="ce4" office:value-type="string" calcext:value-type="string">
            <text:p><text:span text:style-name="T1">Présentation d'un </text:span><text:span text:style-name="T2">framework</text:span><text:span text:style-name="T3"> basé sur l'utilisation de deux librairies python afin de faire du suivis de cibles mutliples dans une vidéo et de fiabiliser ces résultats dans la durée.</text:span></text:p>
          </table:table-cell>
          <table:table-cell table:number-columns-repeated="16379"/>
        </table:table-row>
        <table:table-row table:style-name="ro8">
          <table:table-cell table:style-name="ce7" office:value-type="string" calcext:value-type="string">
            <text:p>Group Generalized Mean Pooling for Vision Transformer</text:p>
          </table:table-cell>
          <table:table-cell table:style-name="ce4" office:value-type="string" calcext:value-type="string">
            <text:p>Byungsoo Ko, Han-Gyu Kim, Byeongho Heo, Sangdoo Yun, Sanghyuk Chun, Geonmo Gu, Wonjae Kim</text:p>
          </table:table-cell>
          <table:table-cell office:value-type="string" calcext:value-type="string">
            <text:p>Indexation </text:p>
          </table:table-cell>
          <table:table-cell table:style-name="ce5" office:value-type="string" calcext:value-type="string">
            <text:p><text:a xlink:href="https://arxiv.org/abs/2212.04114" xlink:type="simple">https://arxiv.org/abs/2212.04114</text:a></text:p>
          </table:table-cell>
          <table:table-cell office:value-type="string" calcext:value-type="string">
            <text:p>Article de présentation du concept de GeM afin de fiabiliser la reconnaissance de l'architecture afin d'identifier un lieu. </text:p>
          </table:table-cell>
          <table:table-cell table:number-columns-repeated="16379"/>
        </table:table-row>
        <table:table-row table:style-name="ro7">
          <table:table-cell table:style-name="ce7" office:value-type="string" calcext:value-type="string">
            <text:p>PIGEON: Predicting Image Geolocations</text:p>
          </table:table-cell>
          <table:table-cell table:style-name="ce4" office:value-type="string" calcext:value-type="string">
            <text:p>Lukas Haas, Michal Skreta, Silas Alberti, Chelsea Finn</text:p>
          </table:table-cell>
          <table:table-cell office:value-type="string" calcext:value-type="string">
            <text:p>Indexation </text:p>
          </table:table-cell>
          <table:table-cell table:style-name="ce5" office:value-type="string" calcext:value-type="string">
            <text:p><text:a xlink:href="https://arxiv.org/abs/2307.05845" xlink:type="simple">https://arxiv.org/abs/2307.05845</text:a></text:p>
          </table:table-cell>
          <table:table-cell office:value-type="string" calcext:value-type="string">
            <text:p>Présentation d'un outil IA neuronal basé sur différentes technologies afin de pouvvoir estimer une position géographique. Entraîné sur les données de Géoguesseur, il utilise l'analyse de texte et d'image. </text:p>
          </table:table-cell>
          <table:table-cell office:value-type="string" calcext:value-type="string">
            <text:p>Transformers, OCR</text:p>
          </table:table-cell>
          <table:table-cell table:number-columns-repeated="16378"/>
        </table:table-row>
        <table:table-row table:style-name="ro1">
          <table:table-cell/>
          <table:table-cell table:style-name="ce6"/>
          <table:table-cell/>
          <table:table-cell table:style-name="ce5"/>
          <table:table-cell table:number-columns-repeated="16380"/>
        </table:table-row>
        <table:table-row table:style-name="ro2">
          <table:table-cell office:value-type="string" calcext:value-type="string">
            <text:p>Europeana enrichies its data with the AAT</text:p>
          </table:table-cell>
          <table:table-cell table:number-columns-repeated="2"/>
          <table:table-cell table:style-name="ce5" office:value-type="string" calcext:value-type="string">
            <text:p><text:a xlink:href="https://pro.europeana.eu/page/europeana-aat" xlink:type="simple">https://pro.europeana.eu/page/europeana-aat</text:a></text:p>
          </table:table-cell>
          <table:table-cell office:value-type="string" calcext:value-type="string">
            <text:p>Présentation d'un projet mené par Europeana, plateforme européenne numérique, qui vise a concilier indexation automatique par IA et utilisation des Thésaurus notamment l'AAT du GETTY. </text:p>
          </table:table-cell>
          <table:table-cell table:number-columns-repeated="16379"/>
        </table:table-row>
        <table:table-row table:style-name="ro2">
          <table:table-cell office:value-type="string" calcext:value-type="string">
            <text:p>Préparer les archives pour l'ère de l'IA </text:p>
          </table:table-cell>
          <table:table-cell office:value-type="string" calcext:value-type="string">
            <text:p>Memoriav</text:p>
          </table:table-cell>
          <table:table-cell office:value-type="string" calcext:value-type="string">
            <text:p>Indexation </text:p>
          </table:table-cell>
          <table:table-cell table:style-name="ce5" office:value-type="string" calcext:value-type="string">
            <text:p><text:a xlink:href="https://memoriav.ch/fr/actualite/preparer-les-archives-pour-lere-de-lia" xlink:type="simple">https://memoriav.ch/fr/actualite/preparer-les-archives-pour-lere-de-lia</text:a></text:p>
          </table:table-cell>
          <table:table-cell table:style-name="ce4" office:value-type="string" calcext:value-type="string">
            <text:p><text:span text:style-name="T1">Article qui présente des recommandations publiées depuis début 2026 afin par </text:span><text:span text:style-name="T2">Archives &amp; Records Association</text:span><text:span text:style-name="T3"> afin d'aider les archivistes dans cette transition. Cet article reprend les grandes lignes et en souligne l'intérêt pour les archives audiovisuel. </text:span></text:p>
          </table:table-cell>
          <table:table-cell table:number-columns-repeated="16379"/>
        </table:table-row>
        <table:table-row table:style-name="ro7">
          <table:table-cell table:style-name="ce7" office:value-type="string" calcext:value-type="string">
            <text:p>BERT: Pre-training of Deep Bidirectional Transformers for Language Understanding</text:p>
          </table:table-cell>
          <table:table-cell office:value-type="string" calcext:value-type="string">
            <text:p>Jacob Devlin, Mig-Wei Chang, Kenton Lee, Kristina Toutanova</text:p>
          </table:table-cell>
          <table:table-cell office:value-type="string" calcext:value-type="string">
            <text:p>NLP</text:p>
          </table:table-cell>
          <table:table-cell table:style-name="ce5" office:value-type="string" calcext:value-type="string">
            <text:p><text:a xlink:href="https://arxiv.org/abs/1810.04805" xlink:type="simple">https://arxiv.org/abs/1810.04805 </text:a></text:p>
          </table:table-cell>
          <table:table-cell office:value-type="string" calcext:value-type="string">
            <text:p>Article de présentation du projet BERT et de ses avancées. il s'attarde surtout sur l'entraînement du modèle, le besoin et l'objectif final. </text:p>
          </table:table-cell>
          <table:table-cell table:number-columns-repeated="16379"/>
        </table:table-row>
        <table:table-row table:style-name="ro7">
          <table:table-cell table:style-name="ce7" office:value-type="string" calcext:value-type="string">
            <text:p>TaBERT: Pretraining for Joint Understanding of Textual and Tabular Data</text:p>
          </table:table-cell>
          <table:table-cell table:style-name="ce4" office:value-type="string" calcext:value-type="string">
            <text:p>Pengcheng Yin, Graham Neubig, Wen-tau Yih, Sebastian Riedel</text:p>
          </table:table-cell>
          <table:table-cell office:value-type="string" calcext:value-type="string">
            <text:p>NLP</text:p>
          </table:table-cell>
          <table:table-cell table:style-name="ce5" office:value-type="string" calcext:value-type="string">
            <text:p><text:a xlink:href="https://arxiv.org/abs/2005.08314" xlink:type="simple">https://arxiv.org/abs/2005.08314</text:a></text:p>
          </table:table-cell>
          <table:table-cell table:style-name="ce9" office:value-type="string" calcext:value-type="string">
            <text:p><text:span text:style-name="T4">Article qui présente une reprise et amélioration du projet BERT et des technologies mises en places pour se faire. Pousse le modèle BERT jusqu'à la compréhension de base de données </text:span><text:span text:style-name="T5">(tables/colonnes)</text:span><text:span text:style-name="T6">.</text:span></text:p>
          </table:table-cell>
          <table:table-cell table:number-columns-repeated="16379"/>
        </table:table-row>
        <table:table-row table:style-name="ro3">
          <table:table-cell office:value-type="string" calcext:value-type="string">
            <text:p>Saint George on a Bike</text:p>
          </table:table-cell>
          <table:table-cell/>
          <table:table-cell office:value-type="string" calcext:value-type="string">
            <text:p>Indexation</text:p>
          </table:table-cell>
          <table:table-cell table:style-name="ce5" office:value-type="string" calcext:value-type="string">
            <text:p><text:a xlink:href="https://www.digitaltreasures.eu/wp-content/uploads/2021/12/What-AI-can-bring-to-GLAM-Artem-Reshetnikov.pdf" xlink:type="simple">https://www.digitaltreasures.eu/wp-content/uploads/2021/12/What-AI-can-bring-to-GLAM-Artem-Reshetnikov.pdf</text:a></text:p>
          </table:table-cell>
          <table:table-cell table:style-name="ce4" office:value-type="string" calcext:value-type="string">
            <text:p><text:span text:style-name="T1">Article de présentation du projet IA </text:span><text:span text:style-name="T2">Saint George on a Bike.</text:span><text:span text:style-name="T3"> Ce souhaite permettre à l'IA de faire de l'indexation à l'aide de thésaurus. L'idée est de permettre à l'IA de s'adapter à son contexte historique, reconnaîtres des formes et des concepts à partir de ces dernières afin de lié ce concept au mots correspondant dans le Thésaurus</text:span></text:p>
          </table:table-cell>
          <table:table-cell table:number-columns-repeated="16379"/>
        </table:table-row>
        <table:table-row table:style-name="ro1">
          <table:table-cell table:style-name="ce4" office:value-type="string" calcext:value-type="string">
            <text:p><text:span text:style-name="T1">Google Cloud </text:span><text:span text:style-name="T2">Text-to-SQL</text:span><text:span text:style-name="T3"> for Gemini 2.5</text:span></text:p>
          </table:table-cell>
          <table:table-cell office:value-type="string" calcext:value-type="string">
            <text:p>Google</text:p>
          </table:table-cell>
          <table:table-cell office:value-type="string" calcext:value-type="string">
            <text:p>NLP</text:p>
          </table:table-cell>
          <table:table-cell table:style-name="ce5" office:value-type="string" calcext:value-type="string">
            <text:p><text:a xlink:href="https://cloud.google.com/blog/fr/products/bases-de-donnees/comment-obtenir-du-code-sql-de-qualite-avec-lia-decryptage-des-techniques-de-text-to-sql" xlink:type="simple">https://cloud.google.com/blog/fr/products/bases-de-donnees/comment-obtenir-du-code-sql-de-qualite-avec-lia-decryptage-des-techniques-de-text-to-sql</text:a></text:p>
          </table:table-cell>
          <table:table-cell table:style-name="ce4" office:value-type="string" calcext:value-type="string">
            <text:p><text:span text:style-name="T1">Google avec son IA Gémini à réussi à développer et intégré un pipeline </text:span><text:span text:style-name="T2">text-to-SQL</text:span><text:span text:style-name="T3"> afin de générer des requêtes SQL à la volée sur des bases SQL</text:span></text:p>
          </table:table-cell>
          <table:table-cell table:style-name="ce5"/>
          <table:table-cell table:number-columns-repeated="16378"/>
        </table:table-row>
        <table:table-row table:style-name="ro3">
          <table:table-cell office:value-type="string" calcext:value-type="string">
            <text:p>Animer une base de connaissance : des ontologies aux modèles d'IA génératives</text:p>
          </table:table-cell>
          <table:table-cell office:value-type="string" calcext:value-type="string">
            <text:p>Peter Stockinger</text:p>
          </table:table-cell>
          <table:table-cell office:value-type="string" calcext:value-type="string">
            <text:p>Indexation </text:p>
          </table:table-cell>
          <table:table-cell table:style-name="ce5" office:value-type="string" calcext:value-type="string">
            <text:p><text:a xlink:href="https://arxiv.org/pdf/2509.01304" xlink:type="simple">https://arxiv.org/pdf/2509.01304</text:a></text:p>
          </table:table-cell>
          <table:table-cell table:style-name="ce4" office:value-type="string" calcext:value-type="string">
            <text:p><text:span text:style-name="T1">Article qui explore différents environements mis en place par différentes structures pour utiliser l'IA à des fins d'assitances.à l'indexation. Il explore notamment l'environement </text:span><text:span text:style-name="T2">okapi</text:span><text:span text:style-name="T3"> de l'INA qui permet d'extraire des index, de suggérer des mots clés, des propriétés ou encore de localiser des découpage de vidéos tout en observant un Thésaurus. </text:span></text:p>
          </table:table-cell>
          <table:table-cell table:number-columns-repeated="16379"/>
        </table:table-row>
        <table:table-row table:style-name="ro2">
          <table:table-cell office:value-type="string" calcext:value-type="string">
            <text:p>L'intelligence artificielle pour la valorisation des archives télévisuelles </text:p>
          </table:table-cell>
          <table:table-cell office:value-type="string" calcext:value-type="string">
            <text:p>B.Bsir</text:p>
          </table:table-cell>
          <table:table-cell office:value-type="string" calcext:value-type="string">
            <text:p>Indexation </text:p>
          </table:table-cell>
          <table:table-cell table:style-name="ce5" office:value-type="string" calcext:value-type="string">
            <text:p><text:a xlink:href="https://revues.imist.ma/index.php/JIS/article/view/54261/29964" xlink:type="simple">https://revues.imist.ma/index.php/JIS/article/view/54261/29964</text:a></text:p>
          </table:table-cell>
          <table:table-cell office:value-type="string" calcext:value-type="string">
            <text:p>Article qui présente un projet de gestion de collections d'archives télévisées par IA. L'objectif est de permettre l'automatisation de la mise à jour des données des archives.</text:p>
          </table:table-cell>
          <table:table-cell table:number-columns-repeated="16379"/>
        </table:table-row>
        <table:table-row table:style-name="ro3">
          <table:table-cell office:value-type="string" calcext:value-type="string">
            <text:p>Real time application to identifiy facial emotion using CNN and OpenCV</text:p>
          </table:table-cell>
          <table:table-cell table:style-name="ce6" office:value-type="string" calcext:value-type="string">
            <text:p>Sahabdeen Aysha Asra, K.H. Ramanayaka</text:p>
          </table:table-cell>
          <table:table-cell office:value-type="string" calcext:value-type="string">
            <text:p>Indexation </text:p>
          </table:table-cell>
          <table:table-cell table:style-name="ce5" office:value-type="string" calcext:value-type="string">
            <text:p><text:a xlink:href="https://irjss.com/index.php/journal/article/view/26" xlink:type="simple">https://irjss.com/index.php/journal/article/view/26</text:a></text:p>
          </table:table-cell>
          <table:table-cell office:value-type="string" calcext:value-type="string">
            <text:p>Article de recherches qui se concentrent sur la reconnaissance des émotions. Peut être utile afin d'envisager l'indexation de scène selon des thématiques basées sur des émotions "scènes tristes", "scènes de joie" etc. </text:p>
          </table:table-cell>
          <table:table-cell table:number-columns-repeated="16379"/>
        </table:table-row>
        <table:table-row table:style-name="ro4">
          <table:table-cell office:value-type="string" calcext:value-type="string">
            <text:p>The evolving Role of AI in Simulation-based Audiovisual Analysis </text:p>
          </table:table-cell>
          <table:table-cell office:value-type="string" calcext:value-type="string">
            <text:p>Selina Hassan, <text:s/>Ayesha Ahmed, Faisal Wassim Ismael</text:p>
          </table:table-cell>
          <table:table-cell office:value-type="string" calcext:value-type="string">
            <text:p>Indexation </text:p>
          </table:table-cell>
          <table:table-cell table:style-name="ce5" office:value-type="string" calcext:value-type="string">
            <text:p><text:a xlink:href="https://pmc.ncbi.nlm.nih.gov/articles/PMC13091622/" xlink:type="simple">https://pmc.ncbi.nlm.nih.gov/articles/PMC13091622/</text:a></text:p>
          </table:table-cell>
          <table:table-cell office:value-type="string" calcext:value-type="string">
            <text:p>Article qui expose les limites de l'indexation par IA, notamment l'indexation totalement automatisée.</text:p>
          </table:table-cell>
          <table:table-cell table:number-columns-repeated="16379"/>
        </table:table-row>
        <table:table-row table:style-name="ro3">
          <table:table-cell office:value-type="string" calcext:value-type="string">
            <text:p>Projet OKAPI</text:p>
          </table:table-cell>
          <table:table-cell office:value-type="string" calcext:value-type="string">
            <text:p>Equipe de recherche de l'INA</text:p>
          </table:table-cell>
          <table:table-cell office:value-type="string" calcext:value-type="string">
            <text:p>Indexation</text:p>
          </table:table-cell>
          <table:table-cell table:style-name="ce5" office:value-type="string" calcext:value-type="string">
            <text:p><text:a xlink:href="https://www.ina.fr/institut-national-audiovisuel/equipe-recherche/projet-okapi" xlink:type="simple">https://www.ina.fr/institut-national-audiovisuel/equipe-recherche/projet-okapi</text:a></text:p>
          </table:table-cell>
          <table:table-cell office:value-type="string" calcext:value-type="string">
            <text:p>Article qui expose très rapidement ce qu'est le projet OKAPI de l'INA, sa portée et sa composition, et propose quelques liens vers des articles en lien avec ce projet. </text:p>
          </table:table-cell>
          <table:table-cell table:number-columns-repeated="16379"/>
        </table:table-row>
        <table:table-row table:style-name="ro4">
          <table:table-cell office:value-type="string" calcext:value-type="string">
            <text:p>Automatic Detection of Intro and Credits in Video using CLIP and Multihead Attention</text:p>
            <text:p/>
          </table:table-cell>
          <table:table-cell office:value-type="string" calcext:value-type="string">
            <text:p>Vasilii Korolkov, Andrey Yanchenko</text:p>
            <text:p/>
          </table:table-cell>
          <table:table-cell office:value-type="string" calcext:value-type="string">
            <text:p>Indexation</text:p>
          </table:table-cell>
          <table:table-cell table:style-name="ce5" office:value-type="string" calcext:value-type="string">
            <text:p><text:a xlink:href="https://arxiv.org/abs/2504.09738" xlink:type="simple">https://arxiv.org/abs/2504.09738</text:a></text:p>
          </table:table-cell>
          <table:table-cell table:style-name="ce4" office:value-type="string" calcext:value-type="string">
            <text:p><text:span text:style-name="T1">Article qui propose une nouvelle manière de reconnaître et isoler les génériques d'un films de manière automatique dans l'objectif de pouvoir en extraire toutes les métadonnées disponibles </text:span><text:span text:style-name="T2">(titre, réalisateurs, acteur, etc) </text:span></text:p>
          </table:table-cell>
          <table:table-cell table:number-columns-repeated="16379"/>
        </table:table-row>
        <table:table-row table:style-name="ro2">
          <table:table-cell office:value-type="string" calcext:value-type="string">
            <text:p>How to extract Metadata from Scannned document using OCR</text:p>
          </table:table-cell>
          <table:table-cell office:value-type="string" calcext:value-type="string">
            <text:p>Fast.io editorial Team</text:p>
          </table:table-cell>
          <table:table-cell office:value-type="string" calcext:value-type="string">
            <text:p>Indexation</text:p>
          </table:table-cell>
          <table:table-cell table:style-name="ce5" office:value-type="string" calcext:value-type="string">
            <text:p><text:a xlink:href="https://fast.io/resources/ocr-metadata-extraction-scanned-documents/" xlink:type="simple">https://fast.io/resources/ocr-metadata-extraction-scanned-documents/</text:a></text:p>
          </table:table-cell>
          <table:table-cell table:style-name="ce4" office:value-type="string" calcext:value-type="string">
            <text:p><text:span text:style-name="T1">Article présentant le </text:span><text:span text:style-name="T2">pipeline</text:span><text:span text:style-name="T3"> à mettre en place afinn d'extraire de la métadonnés depuis des documents numériques, comme des vidéos.</text:span></text:p>
          </table:table-cell>
          <table:table-cell office:value-type="string" calcext:value-type="string">
            <text:p>ExifTool, PDFPlumber, Apache Tika, </text:p>
          </table:table-cell>
          <table:table-cell office:value-type="string" calcext:value-type="string">
            <text:p>OCR</text:p>
          </table:table-cell>
          <table:table-cell table:number-columns-repeated="16377"/>
        </table:table-row>
        <table:table-row table:style-name="ro2">
          <table:table-cell office:value-type="string" calcext:value-type="string">
            <text:p>L'indexation automatique des archives audiovisuelles privées au prisme des Linked Open Data </text:p>
          </table:table-cell>
          <table:table-cell office:value-type="string" calcext:value-type="string">
            <text:p>Lénaïk Leyoudec</text:p>
          </table:table-cell>
          <table:table-cell office:value-type="string" calcext:value-type="string">
            <text:p>Indexation </text:p>
          </table:table-cell>
          <table:table-cell table:style-name="ce5" office:value-type="string" calcext:value-type="string">
            <text:p><text:a xlink:href="https://intelligibilite-numerique.numerev.com/numeros/n-1-2020/14-l-indexation-automatique-des-archives-audiovisuelles-privees-au-prisme-des-linked-open-data-analyse-semiotique-de-l-architexte-famille" xlink:type="simple">https://intelligibilite-numerique.numerev.com/numeros/n-1-2020/14-l-indexation-automatique-des-archives-audiovisuelles-privees-au-prisme-des-linked-open-data-analyse-semiotique-de-l-architexte-famille</text:a></text:p>
          </table:table-cell>
          <table:table-cell office:value-type="string" calcext:value-type="string">
            <text:p>Article scientifique qui envisage l'indexation automatique dans le cadre de la donnée liée, du web sémantique. L'idée est de mettre l'IA en relation avec des bases de données afin de passer de la transcription de donnnée bruts à une réelle indexation conceptuelle. </text:p>
          </table:table-cell>
          <table:table-cell table:number-columns-repeated="16379"/>
        </table:table-row>
        <table:table-row table:style-name="ro7">
          <table:table-cell office:value-type="string" calcext:value-type="string">
            <text:p>A Comprehensive Survey of Deep Learning for Image Captioning</text:p>
          </table:table-cell>
          <table:table-cell office:value-type="string" calcext:value-type="string">
            <text:p>MD Zakir Hossain, Ferdous Sohel, Mohd Fairuz, Shiratuddin, Hamid laga</text:p>
          </table:table-cell>
          <table:table-cell office:value-type="string" calcext:value-type="string">
            <text:p>Indexation</text:p>
          </table:table-cell>
          <table:table-cell table:style-name="ce5" office:value-type="string" calcext:value-type="string">
            <text:p><text:a xlink:href="https://dl.acm.org/doi/abs/10.1145/3295748?fbclid=IwAR0Yyw_nl2PpaX7ek78wCrh9TBHqa7ytSW5w_Fz4sv5-sx3jAHEYabCvt9c" xlink:type="simple">https://dl.acm.org/doi/abs/10.1145/3295748?fbclid=IwAR0Yyw_nl2PpaX7ek78wCrh9TBHqa7ytSW5w_Fz4sv5-sx3jAHEYabCvt9c</text:a></text:p>
          </table:table-cell>
          <table:table-cell table:style-name="ce4" office:value-type="string" calcext:value-type="string">
            <text:p><text:span text:style-name="T1">Article scientifique qui fait un état des lieux des techniques et technologies de Deep Learning utilisées aujourd'hui pour l'</text:span><text:span text:style-name="T2">image captionning </text:span><text:span text:style-name="T3">qui est la description automatisée d'image.  Chaque techniques et technologies est examinée pour comprendre son fonctionnement et but puis analysé pour souligner sa performance. Les techniques et technologie sont ensuite mis en comparaison afin d'avoir une vue d'ensemble.</text:span></text:p>
          </table:table-cell>
          <table:table-cell office:value-type="string" calcext:value-type="string">
            <text:p>BLIP-2</text:p>
          </table:table-cell>
          <table:table-cell table:number-columns-repeated="16378"/>
        </table:table-row>
        <table:table-row table:style-name="ro3">
          <table:table-cell office:value-type="string" calcext:value-type="string">
            <text:p>BLIP-2: Bootstrapping Language-Image Pre-training with Frozen Image Encoders and Large Language Models</text:p>
            <text:p/>
          </table:table-cell>
          <table:table-cell office:value-type="string" calcext:value-type="string">
            <text:p>Junnan Li, Dongxu Li, Silvio Savarese, Steven Hoi</text:p>
          </table:table-cell>
          <table:table-cell office:value-type="string" calcext:value-type="string">
            <text:p>Indexation </text:p>
          </table:table-cell>
          <table:table-cell table:style-name="ce5" office:value-type="string" calcext:value-type="string">
            <text:p><text:a xlink:href="https://arxiv.org/abs/2301.12597" xlink:type="simple">https://arxiv.org/abs/2301.12597</text:a></text:p>
          </table:table-cell>
          <table:table-cell table:style-name="ce4" office:value-type="string" calcext:value-type="string">
            <text:p><text:span text:style-name="T1">Article de présentation de l'outil BLIP-2 qui est un outil de pré entraînement d'IA pour l'analyse des vidéos et donc l''</text:span><text:span text:style-name="T2">image captionning.</text:span><text:span text:style-name="T3"> </text:span></text:p>
          </table:table-cell>
          <table:table-cell table:number-columns-repeated="16379"/>
        </table:table-row>
        <table:table-row table:style-name="ro2">
          <table:table-cell office:value-type="string" calcext:value-type="string">
            <text:p>Stratégie vidéo et IA : les 10 tendances qui vont marquer 2026</text:p>
          </table:table-cell>
          <table:table-cell office:value-type="string" calcext:value-type="string">
            <text:p>Etienne Caillebotte</text:p>
          </table:table-cell>
          <table:table-cell office:value-type="string" calcext:value-type="string">
            <text:p>Indexation</text:p>
          </table:table-cell>
          <table:table-cell table:style-name="ce5" office:value-type="string" calcext:value-type="string">
            <text:p><text:a xlink:href="https://www.blogdumoderateur.com/strategie-video-ia-10-tendances-marquer-2026/" xlink:type="simple">https://www.blogdumoderateur.com/strategie-video-ia-10-tendances-marquer-2026/</text:a></text:p>
          </table:table-cell>
          <table:table-cell office:value-type="string" calcext:value-type="string">
            <text:p>Article général qui présente les nouvelles technologies dans l'univers de l'analyses des images animés par IA prévue pour 2026. Très intéressant afin de faire un point sur les évolutions à venir et l'impact qu'elles peuvent avoir.</text:p>
          </table:table-cell>
          <table:table-cell/>
          <table:table-cell office:value-type="string" calcext:value-type="string">
            <text:p>AI slop, GEO et AEO, </text:p>
          </table:table-cell>
          <table:table-cell table:number-columns-repeated="16377"/>
        </table:table-row>
        <table:table-row table:style-name="ro8">
          <table:table-cell office:value-type="string" calcext:value-type="string">
            <text:p>A novel NLP-driven approach for enriching artefact descriptions, provenance, and entities in cultural heritage</text:p>
          </table:table-cell>
          <table:table-cell office:value-type="string" calcext:value-type="string">
            <text:p>Sara Ferro, Riccardo Giovanelli, Madison Leeson, Michela De Bernardin &amp; Arianna Traviglia</text:p>
          </table:table-cell>
          <table:table-cell office:value-type="string" calcext:value-type="string">
            <text:p>NLP</text:p>
          </table:table-cell>
          <table:table-cell table:style-name="ce5" office:value-type="string" calcext:value-type="string">
            <text:p><text:a xlink:href="https://link.springer.com/article/10.1007/s00521-025-11449-2" xlink:type="simple">https://link.springer.com/article/10.1007/s00521-025-11449-2</text:a></text:p>
          </table:table-cell>
          <table:table-cell office:value-type="string" calcext:value-type="string">
            <text:p>Article qui explique le projet RITHMS qui consistait à construire une base SQL structurée à partir de donnée textuelle brutes à l'aide de LLM et de NLP</text:p>
          </table:table-cell>
          <table:table-cell table:number-columns-repeated="16379"/>
        </table:table-row>
        <table:table-row table:style-name="ro5">
          <table:table-cell office:value-type="string" calcext:value-type="string">
            <text:p>LEAF-SQL: Level-wise Exploration with Adaptive Fine-graining for Text-to-SQL Skeleton Prediction</text:p>
          </table:table-cell>
          <table:table-cell office:value-type="string" calcext:value-type="string">
            <text:p>Zhao Tan, Xiping Liu, Qing Shu, Qizhi Wan, Dexi Liu, Changxuan Wan</text:p>
            <text:p/>
          </table:table-cell>
          <table:table-cell office:value-type="string" calcext:value-type="string">
            <text:p>NLP</text:p>
          </table:table-cell>
          <table:table-cell table:style-name="ce5" office:value-type="string" calcext:value-type="string">
            <text:p><text:a xlink:href="https://arxiv.org/abs/2605.09295" xlink:type="simple">https://arxiv.org/abs/2605.09295</text:a></text:p>
          </table:table-cell>
          <table:table-cell table:style-name="ce4" office:value-type="string" calcext:value-type="string">
            <text:p><text:span text:style-name="T1">Une des grandes difficultés du </text:span><text:span text:style-name="T2">text-to-sql </text:span><text:span text:style-name="T3">c'est la génération de requête complexe. Pour cela, des </text:span><text:span text:style-name="T2">pipelines</text:span><text:span text:style-name="T3"> mettent à disposition des squelettes de requêtes afin que le LLM puisse partir d'une base fiable. Cet article vise à proposer un </text:span><text:span text:style-name="T2">pipeline</text:span><text:span text:style-name="T3"> plus solie et fiable pour l'intégration et l'utilisation de ces requêtes squelettes.</text:span></text:p>
          </table:table-cell>
          <table:table-cell table:number-columns-repeated="16379"/>
        </table:table-row>
        <table:table-row table:style-name="ro6">
          <table:table-cell office:value-type="string" calcext:value-type="string">
            <text:p>FINER-SQL: Boosting Small Language Models for Text-to-SQL</text:p>
          </table:table-cell>
          <table:table-cell office:value-type="string" calcext:value-type="string">
            <text:p>Thanh Dat Hoang, Thanh Trung Huynh, Matthias Weidlich, Thanh Tam Nguyen, Tong Chen, Hongzhi Yin, Quoc Viet Hung Nguyen</text:p>
          </table:table-cell>
          <table:table-cell office:value-type="string" calcext:value-type="string">
            <text:p>NLP</text:p>
          </table:table-cell>
          <table:table-cell table:style-name="ce5" office:value-type="string" calcext:value-type="string">
            <text:p><text:a xlink:href="https://arxiv.org/abs/2605.03465" xlink:type="simple">https://arxiv.org/abs/2605.03465</text:a></text:p>
          </table:table-cell>
          <table:table-cell table:style-name="ce4" office:value-type="string" calcext:value-type="string">
            <text:p><text:span text:style-name="T1">Article scientifique qui proposer des solutions afin de pousser l'efficacité de petits moodèles de langues à leurs maximums sur du </text:span><text:span text:style-name="T2">text-to-sql</text:span><text:span text:style-name="T3">. L'idée générale est d'explorer des moyens de compenser le faible raisonement qu'offrent ces petits modèles de langues. Le moyen pensé est un framework de renforcement d'apprentissage de ces petits modèles en optimisant leurs capacités. </text:span><text:span text:style-name="T2">Ministral, LLAMA, GEMMA, GPT-4o Mini sont des petits modèles de langues ou SLMs en opposition à LLMs.</text:span></text:p>
          </table:table-cell>
          <table:table-cell table:number-columns-repeated="16379"/>
        </table:table-row>
        <table:table-row table:style-name="ro8">
          <table:table-cell office:value-type="string" calcext:value-type="string">
            <text:p>FlexSQL: Flexible Exploration and Execution Make Better Text-to-SQL Agents</text:p>
          </table:table-cell>
          <table:table-cell office:value-type="string" calcext:value-type="string">
            <text:p>Quang Hieu Pham, Yang He, Ping Nie, Canwen Xu, Davood Rafiei, Yuepeng Wang, Xi Ye, Jocelyn Qiaochu Chen</text:p>
          </table:table-cell>
          <table:table-cell office:value-type="string" calcext:value-type="string">
            <text:p>NLP</text:p>
          </table:table-cell>
          <table:table-cell table:style-name="ce5" office:value-type="string" calcext:value-type="string">
            <text:p><text:a xlink:href="https://arxiv.org/abs/2605.02815" xlink:type="simple">https://arxiv.org/abs/2605.02815</text:a></text:p>
          </table:table-cell>
          <table:table-cell table:style-name="ce4" office:value-type="string" calcext:value-type="string">
            <text:p><text:span text:style-name="T1">Cet article souligne que dans un pipeline </text:span><text:span text:style-name="T2">text-to-sql</text:span><text:span text:style-name="T3"> classique, l'interprétation de la base de donnée est faites en amont et parfois avec des erreurs de lectures et/ou de compréhension. Cela peut amener à fausser les requêtes générées. Ici , il est proposé un agent IA qui permettrait de fiabiliser la génératio de requête en créant un processus itératif d'analyse de la base SQL à différents moments afin de détecter de potentielles erreurs non détectées, etc. </text:span></text:p>
          </table:table-cell>
          <table:table-cell table:number-columns-repeated="16379"/>
        </table:table-row>
        <table:table-row table:style-name="ro5">
          <table:table-cell office:value-type="string" calcext:value-type="string">
            <text:p>SQLStructEval: Structural Evaluation of LLM Text-to-SQL Generation</text:p>
          </table:table-cell>
          <table:table-cell office:value-type="string" calcext:value-type="string">
            <text:p>Yixi Zhou, Fan Zhang, Zhiqiao Guo, Yu Chen, Haipeng Zhang, Preslav Nakov, Zhuohan Xie</text:p>
          </table:table-cell>
          <table:table-cell office:value-type="string" calcext:value-type="string">
            <text:p>NLP</text:p>
          </table:table-cell>
          <table:table-cell table:style-name="ce5" office:value-type="string" calcext:value-type="string">
            <text:p><text:a xlink:href="https://arxiv.org/abs/2604.06736" xlink:type="simple">https://arxiv.org/abs/2604.06736</text:a></text:p>
          </table:table-cell>
          <table:table-cell table:style-name="ce4" office:value-type="string" calcext:value-type="string">
            <text:p><text:span text:style-name="T1">Cet article se concentre sur le fait que les requêtes générées par LLM sont parfois syntaxiquement mauvaise et/ou soumises à de trop grande variations sur des changements minimes lors du requêtage en langage naturel. L'article précédent avait pour solution d'augmenter la fréquence d'analyser de la base SQL. Cet article propose une solution alternative. Un </text:span><text:span text:style-name="T2">framework </text:span><text:span text:style-name="T3">qui analyse le squelette des requêtes générées, les corriges et surtout les homogénéise en contrôlant plus les changements fait par le LLM sur des requêtes en langage naturel différentes. </text:span></text:p>
          </table:table-cell>
          <table:table-cell table:number-columns-repeated="16379"/>
        </table:table-row>
        <table:table-row table:style-name="ro13">
          <table:table-cell office:value-type="string" calcext:value-type="string">
            <text:p>Can AI Agents Answer Your Data Questions? A Benchmark for Data Agents</text:p>
          </table:table-cell>
          <table:table-cell office:value-type="string" calcext:value-type="string">
            <text:p>Ruiying Ma, Shreya Shankar, Ruiqi Chen, Yiming Lin, Sepanta Zeighami, Rajoshi Ghosh, Abhinav Gupta, Anushrut Gupta, Tanmai Gopal, Aditya G. Parameswaran</text:p>
          </table:table-cell>
          <table:table-cell office:value-type="string" calcext:value-type="string">
            <text:p>NLP</text:p>
          </table:table-cell>
          <table:table-cell table:style-name="ce5" office:value-type="string" calcext:value-type="string">
            <text:p><text:a xlink:href="https://arxiv.org/abs/2603.20576" xlink:type="simple">https://arxiv.org/abs/2603.20576</text:a></text:p>
          </table:table-cell>
          <table:table-cell table:style-name="ce4" office:value-type="string" calcext:value-type="string">
            <text:p><text:span text:style-name="T1">Article de réflexions sur la capacité des agent IA à faire du </text:span><text:span text:style-name="T2">text-to-SQL</text:span><text:span text:style-name="T3"> sur nos données et benchmark fait via un outil, </text:span><text:span text:style-name="T2">Data Agent Benchmark</text:span><text:span text:style-name="T3">,  sur 5 LLMs. </text:span></text:p>
          </table:table-cell>
          <table:table-cell table:number-columns-repeated="16379"/>
        </table:table-row>
        <table:table-row table:style-name="ro7">
          <table:table-cell office:value-type="string" calcext:value-type="string">
            <text:p>Draft-Refine-Optimize: Self-Evolved Learning for Natural Language to MongoDB Query Generation</text:p>
          </table:table-cell>
          <table:table-cell office:value-type="string" calcext:value-type="string">
            <text:p>Mingwei Ye, Jiaxi Zhuang, Mingjun Xu, Linfeng Zhang, Guolin Ke, Hengxing Cai</text:p>
          </table:table-cell>
          <table:table-cell office:value-type="string" calcext:value-type="string">
            <text:p>NLP-nosql</text:p>
          </table:table-cell>
          <table:table-cell table:style-name="ce5" office:value-type="string" calcext:value-type="string">
            <text:p><text:a xlink:href="https://arxiv.org/abs/2604.13045" xlink:type="simple">https://arxiv.org/abs/2604.13045</text:a></text:p>
          </table:table-cell>
          <table:table-cell table:style-name="ce4" office:value-type="string" calcext:value-type="string">
            <text:p><text:span text:style-name="T1">Cet article interroge la manière d'intégrer le </text:span><text:span text:style-name="T2">text-to-SQL </text:span><text:span text:style-name="T3">à des environements </text:span><text:span text:style-name="T2">No-SQL</text:span><text:span text:style-name="T3"> comme MongoDB. </text:span></text:p>
          </table:table-cell>
          <table:table-cell table:number-columns-repeated="16379"/>
        </table:table-row>
        <table:table-row table:style-name="ro8">
          <table:table-cell office:value-type="string" calcext:value-type="string">
            <text:p>Bridging the Gap: Enabling Natural Language Queries for NoSQL Databases through Text-to-NoSQL Translation</text:p>
          </table:table-cell>
          <table:table-cell office:value-type="string" calcext:value-type="string">
            <text:p>Jinwei Lu, Yuanfeng Song, Zhiqian Qin, Haodi Zhang, Chen Zhang, Raymond Chi-Wing Wong</text:p>
          </table:table-cell>
          <table:table-cell office:value-type="string" calcext:value-type="string">
            <text:p>NLP-nosql</text:p>
          </table:table-cell>
          <table:table-cell table:style-name="ce5" office:value-type="string" calcext:value-type="string">
            <text:p><text:a xlink:href="https://arxiv.org/html/2502.11201v1" xlink:type="simple">https://arxiv.org/html/2502.11201v1</text:a></text:p>
          </table:table-cell>
          <table:table-cell table:style-name="ce4" office:value-type="string" calcext:value-type="string">
            <text:p><text:span text:style-name="T1">Article qui propose d'appliquer et adapter le pipeline </text:span><text:span text:style-name="T2">text-to-sql</text:span><text:span text:style-name="T3"> à une base de donnée noSQL. Les outils restent les mêmes et le concept global également. Il présente un nouvel outil, SMART qui est conçu pour les conversionsdu langage naturel vers le nosql. Le pipeline proposé semble prendre en charge la convertion d'une base SQL en noSQL en amont du process, une étape supplémentaire qui n'existe pas dans le pipeline </text:span><text:span text:style-name="T2">text-to-sql</text:span><text:span text:style-name="T3"> de base. </text:span></text:p>
          </table:table-cell>
          <table:table-cell table:style-name="ce4" office:value-type="string" calcext:value-type="string">
            <text:p><text:span text:style-name="T1">TEND </text:span><text:span text:style-name="T2">(text-to-nosql-dataset)</text:span><text:span text:style-name="T3">, SLM, RAG, SMART</text:span></text:p>
          </table:table-cell>
          <table:table-cell table:number-columns-repeated="16378"/>
        </table:table-row>
        <table:table-row table:style-name="ro1">
          <table:table-cell office:value-type="string" calcext:value-type="string">
            <text:p>Text to NSQL </text:p>
          </table:table-cell>
          <table:table-cell office:value-type="string" calcext:value-type="string">
            <text:p>Query Loop</text:p>
          </table:table-cell>
          <table:table-cell office:value-type="string" calcext:value-type="string">
            <text:p>NLP</text:p>
          </table:table-cell>
          <table:table-cell table:style-name="ce5" office:value-type="string" calcext:value-type="string">
            <text:p><text:a xlink:href="https://docs.queryloop.ai/features/text-to-nosql/" xlink:type="simple">https://docs.queryloop.ai/features/text-to-nosql/</text:a></text:p>
          </table:table-cell>
          <table:table-cell table:style-name="ce4" office:value-type="string" calcext:value-type="string">
            <text:p><text:span text:style-name="T1">Article qui présente le pipeline déployé par l'outil QueryLoop afin de faire de la conversion </text:span><text:span text:style-name="T2">text-to-nosql. </text:span><text:span text:style-name="T3">Présente. également les outils utilisé.</text:span></text:p>
          </table:table-cell>
          <table:table-cell office:value-type="string" calcext:value-type="string">
            <text:p>GPT-4o-mini model, MongoDB</text:p>
          </table:table-cell>
          <table:table-cell table:number-columns-repeated="16378"/>
        </table:table-row>
        <table:table-row table:style-name="ro5">
          <table:table-cell office:value-type="string" calcext:value-type="string">
            <text:p>BERT Model-based Natural Language to NoSQL Query Conversion using Deep Learning Approach</text:p>
            <text:p/>
          </table:table-cell>
          <table:table-cell office:value-type="string" calcext:value-type="string">
            <text:p>Kazi Mojammel Hossen, Mohammed Nasir Uddin, Minhazul Arefin, Md Ashraf Uddin</text:p>
          </table:table-cell>
          <table:table-cell office:value-type="string" calcext:value-type="string">
            <text:p>NLP-nosql</text:p>
          </table:table-cell>
          <table:table-cell table:style-name="ce5" office:value-type="string" calcext:value-type="string">
            <text:p><text:a xlink:href="https://www.researchgate.net/publication/369057820_BERT_Model-based_Natural_Language_to_NoSQL_Query_Conversion_using_Deep_Learning_Approach" xlink:type="simple">https://www.researchgate.net/publication/369057820_BERT_Model-based_Natural_Language_to_NoSQL_Query_Conversion_using_Deep_Learning_Approach</text:a></text:p>
          </table:table-cell>
          <table:table-cell table:style-name="ce4" office:value-type="string" calcext:value-type="string">
            <text:p><text:span text:style-name="T1">Cet article propose de revisiter le </text:span><text:span text:style-name="T2">text-to-SQL</text:span><text:span text:style-name="T3"> afin de l'adapter aux bases NoSQL en partant de l'origine de ce pipeline : le modèle BERT. Le modèle BERT est repris et combiné à des réseaux de neuronnes profonds afin de pouvoir convertir des requêtes formulée en langage naturel en requête NoSQL. Article très détaillé sur le procédé mis en place et les résultats obtenus. </text:span></text:p>
          </table:table-cell>
          <table:table-cell table:number-columns-repeated="16379"/>
        </table:table-row>
        <table:table-row table:style-name="ro3">
          <table:table-cell office:value-type="string" calcext:value-type="string">
            <text:p>Natural language querying on NoSQL Databases : Opportunities and Challenges</text:p>
          </table:table-cell>
          <table:table-cell office:value-type="string" calcext:value-type="string">
            <text:p>Wenlong Zhang, Tian Shi, Ping Wang</text:p>
          </table:table-cell>
          <table:table-cell office:value-type="string" calcext:value-type="string">
            <text:p>NLP-nosql</text:p>
          </table:table-cell>
          <table:table-cell table:style-name="ce5" office:value-type="string" calcext:value-type="string">
            <text:p><text:a xlink:href="https://ieeexplore.ieee.org/document/10825998" xlink:type="simple">https://ieeexplore.ieee.org/document/10825998</text:a></text:p>
          </table:table-cell>
          <table:table-cell office:value-type="string" calcext:value-type="string">
            <text:p>Article de réflexion sur les défis et potentiels solutions quant à l'interrogation en langage naturel d'une base de donnée NoSQL. Très utiles pour explorer les piste d'avenirs.</text:p>
          </table:table-cell>
          <table:table-cell table:number-columns-repeated="16379"/>
        </table:table-row>
        <table:table-row table:style-name="ro4">
          <table:table-cell office:value-type="string" calcext:value-type="string">
            <text:p>The futur of database queries : evaluating text-to-SQL and text-to-noSQL with AI</text:p>
          </table:table-cell>
          <table:table-cell office:value-type="string" calcext:value-type="string">
            <text:p>Auzair - Medium</text:p>
          </table:table-cell>
          <table:table-cell office:value-type="string" calcext:value-type="string">
            <text:p>NLP-nosql</text:p>
          </table:table-cell>
          <table:table-cell table:style-name="ce5" office:value-type="string" calcext:value-type="string">
            <text:p><text:a xlink:href="https://medium.com/@auzair2011/the-future-of-database-queries-evaluating-text-to-sql-and-text-to-nosql-with-ai-bcb4e767cfee" xlink:type="simple">https://medium.com/@auzair2011/the-future-of-database-queries-evaluating-text-to-sql-and-text-to-nosql-with-ai-bcb4e767cfee</text:a></text:p>
          </table:table-cell>
          <table:table-cell table:style-name="ce4" office:value-type="string" calcext:value-type="string">
            <text:p><text:span text:style-name="T1">Article qui permet de comparer les deux approches, les deux pipelines, en expliquant leurs différences, et qui se focus sur l'application d'un piepline approprié à une base MongoDB. Il semblerait que le principal challenge soit dans la gestion des pipelines d'agrégations propre à MongoDB, en dehors de ça la structure reste identique ou presque. Fait aussi une remarque général : le </text:span><text:span text:style-name="T2">text-to-SQL</text:span><text:span text:style-name="T3"> est aujourd'hui mieux maitriser et développé que le </text:span><text:span text:style-name="T2">text-to-noSQL. </text:span><text:span text:style-name="T3">Ainsi, ce nouveau pipeline à tendance à être plus lent et moins précis à cause de son aspect expérimental et nouveau. </text:span></text:p>
          </table:table-cell>
          <table:table-cell table:number-columns-repeated="16379"/>
        </table:table-row>
        <table:table-row table:style-name="ro3">
          <table:table-cell office:value-type="string" calcext:value-type="string">
            <text:p>Natural language interface for NoSQL document-oriented database</text:p>
          </table:table-cell>
          <table:table-cell office:value-type="string" calcext:value-type="string">
            <text:p>?</text:p>
          </table:table-cell>
          <table:table-cell office:value-type="string" calcext:value-type="string">
            <text:p>NLP-nosql</text:p>
          </table:table-cell>
          <table:table-cell table:style-name="ce5" office:value-type="string" calcext:value-type="string">
            <text:p><text:a xlink:href="https://link.springer.com/chapter/10.1007/978-3-032-18857-1_45" xlink:type="simple">https://link.springer.com/chapter/10.1007/978-3-032-18857-1_45</text:a></text:p>
          </table:table-cell>
          <table:table-cell table:style-name="ce4" office:value-type="string" calcext:value-type="string">
            <text:p><text:span text:style-name="T1">Article qui nourris la réflexion autour de la création d'un pipeline </text:span><text:span text:style-name="T2">text-to-noSQL</text:span><text:span text:style-name="T3"> avec un focus sur les databse orientée documents en NoSQL </text:span><text:span text:style-name="T2">(MongoDB en est une)</text:span><text:span text:style-name="T3">. L'idée de l'article est de trouver des pistes afin de développer un IA capable de comprendre le NoSQL, ce qui n'est pas encore largement le cas, afin de comprendre ainsi ces bases de données. </text:span></text:p>
          </table:table-cell>
          <table:table-cell table:number-columns-repeated="16379"/>
        </table:table-row>
        <table:table-row table:style-name="ro6">
          <table:table-cell office:value-type="string" calcext:value-type="string">
            <text:p>Query intelligence : A natural language interface to SQL and NoSQL databases using AI</text:p>
          </table:table-cell>
          <table:table-cell office:value-type="string" calcext:value-type="string">
            <text:p>Suraj Kiran Chougale, Sanket Sarjerao More-Patil, Udaysinh Uttamrav Patil, Varad Shailesh Bhise, Mrs. Trupti H. Mulik</text:p>
          </table:table-cell>
          <table:table-cell office:value-type="string" calcext:value-type="string">
            <text:p>NLP-nosql</text:p>
          </table:table-cell>
          <table:table-cell table:style-name="ce5" office:value-type="string" calcext:value-type="string">
            <text:p><text:a xlink:href="https://www.irjmets.com/upload_newfiles/irjmets80500063449/paper_file/irjmets80500063449.pdf" xlink:type="simple">https://www.irjmets.com/upload_newfiles/irjmets80500063449/paper_file/irjmets80500063449.pdf</text:a></text:p>
          </table:table-cell>
          <table:table-cell table:style-name="ce4" office:value-type="string" calcext:value-type="string">
            <text:p><text:span text:style-name="T1">Article de réflexion et de proposition de solutions sur l'accès et l'interrogeabilité des bases de données par l'intelligence artificielle. L'article mène deux axes : le </text:span><text:span text:style-name="T2">text-to-sql</text:span><text:span text:style-name="T3"> avec l'application LangChain SQL et le </text:span><text:span text:style-name="T2">text-to-noSQL</text:span></text:p>
          </table:table-cell>
          <table:table-cell table:number-columns-repeated="16379"/>
        </table:table-row>
        <table:table-row table:style-name="ro3">
          <table:table-cell office:value-type="string" calcext:value-type="string">
            <text:p>Natural Language to NoSQL query conversion using deep learning</text:p>
          </table:table-cell>
          <table:table-cell office:value-type="string" calcext:value-type="string">
            <text:p>?</text:p>
          </table:table-cell>
          <table:table-cell office:value-type="string" calcext:value-type="string">
            <text:p>NLP-nosql</text:p>
          </table:table-cell>
          <table:table-cell table:style-name="ce5" office:value-type="string" calcext:value-type="string">
            <text:p><text:a xlink:href="https://papers.ssrn.com/sol3/papers.cfm?abstract_id=3436631" xlink:type="simple">https://papers.ssrn.com/sol3/papers.cfm?abstract_id=3436631</text:a></text:p>
          </table:table-cell>
          <table:table-cell office:value-type="string" calcext:value-type="string">
            <text:p>Article qui propose une réflexion sur la manière d'utiliser le deep learning et des réseaux de neuronnes profonds pour la traduction d'une requête en langage naturel en langage NoSQL. L'article va jusqu'à proposé un système d'utilisation de ces réseaux de neuronnes profonds qui ont déjà fait leurs preuves sur MongoDB. </text:p>
          </table:table-cell>
          <table:table-cell table:number-columns-repeated="16379"/>
        </table:table-row>
        <table:table-row table:style-name="ro2">
          <table:table-cell office:value-type="string" calcext:value-type="string">
            <text:p>Natural Language Processing with NoSQL</text:p>
          </table:table-cell>
          <table:table-cell office:value-type="string" calcext:value-type="string">
            <text:p>Meegle</text:p>
          </table:table-cell>
          <table:table-cell office:value-type="string" calcext:value-type="string">
            <text:p>NLP-nosql</text:p>
          </table:table-cell>
          <table:table-cell table:style-name="ce5" office:value-type="string" calcext:value-type="string">
            <text:p><text:a xlink:href="https://www.meegle.com/en_us/topics/nosql/natural-language-processing-with-nosql" xlink:type="simple">https://www.meegle.com/en_us/topics/nosql/natural-language-processing-with-nosql</text:a></text:p>
          </table:table-cell>
          <table:table-cell table:style-name="ce4" office:value-type="string" calcext:value-type="string">
            <text:p><text:span text:style-name="T1">Article qui explique comment appliquer du traitement NLP à une base de données NoSQL. Il présente les points d'attentions, quelques recommandations et tips, quelques exemples de process à mettre en place et différentes profondeurs de traitements </text:span><text:span text:style-name="T2">(basique/avancée)</text:span></text:p>
          </table:table-cell>
          <table:table-cell table:number-columns-repeated="16379"/>
        </table:table-row>
        <table:table-row table:style-name="ro1" table:number-rows-repeated="1048483">
          <table:table-cell table:number-columns-repeated="16384"/>
        </table:table-row>
        <table:table-row table:style-name="ro1">
          <table:table-cell table:number-columns-repeated="16384"/>
        </table:table-row>
      </table:table>
      <table:table table:name="articles_lecture" table:style-name="ta3">
        <office:forms form:automatic-focus="false" form:apply-design-mode="false"/>
        <table:table-column table:style-name="co16" table:default-cell-style-name="ce1"/>
        <table:table-column table:style-name="co12" table:default-cell-style-name="ce1"/>
        <table:table-column table:style-name="co13" table:default-cell-style-name="ce1"/>
        <table:table-column table:style-name="co17" table:default-cell-style-name="ce11"/>
        <table:table-column table:style-name="co18" table:default-cell-style-name="ce11"/>
        <table:table-column table:style-name="co19" table:default-cell-style-name="ce11"/>
        <table:table-column table:style-name="co20" table:default-cell-style-name="ce1"/>
        <table:table-column table:style-name="co17" table:default-cell-style-name="ce11"/>
        <table:table-column table:style-name="co18" table:default-cell-style-name="ce11"/>
        <table:table-column table:style-name="co19" table:default-cell-style-name="ce11"/>
        <table:table-column table:style-name="co15" table:default-cell-style-name="ce1"/>
        <table:table-column table:style-name="co8" table:default-cell-style-name="ce1"/>
        <table:table-column table:style-name="co9" table:default-cell-style-name="ce1"/>
        <table:table-column table:style-name="co1" table:number-columns-repeated="2" table:default-cell-style-name="ce1"/>
        <table:table-column table:style-name="co17" table:default-cell-style-name="ce11"/>
        <table:table-column table:style-name="co18" table:default-cell-style-name="ce11"/>
        <table:table-column table:style-name="co19" table:default-cell-style-name="ce11"/>
        <table:table-column table:style-name="co21" table:default-cell-style-name="ce11"/>
        <table:table-column table:style-name="co1" table:number-columns-repeated="16365" table:default-cell-style-name="Default"/>
        <table:table-row table:style-name="ro1" table:number-rows-repeated="2">
          <table:table-cell table:number-columns-repeated="16384"/>
        </table:table-row>
        <table:table-row table:style-name="ro1">
          <table:table-cell table:style-name="ce3" office:value-type="string" calcext:value-type="string">
            <text:p>Titre</text:p>
          </table:table-cell>
          <table:table-cell table:style-name="ce2" office:value-type="string" calcext:value-type="string">
            <text:p>Auteur</text:p>
          </table:table-cell>
          <table:table-cell table:style-name="ce3" office:value-type="string" calcext:value-type="string">
            <text:p>Sujet</text:p>
          </table:table-cell>
          <table:table-cell office:value-type="string" calcext:value-type="string">
            <text:p>Lu/à lire</text:p>
          </table:table-cell>
          <table:table-cell office:value-type="string" calcext:value-type="string">
            <text:p>Citations</text:p>
          </table:table-cell>
          <table:table-cell office:value-type="string" calcext:value-type="string">
            <text:p>Sous-notion tex</text:p>
          </table:table-cell>
          <table:table-cell table:style-name="ce3" office:value-type="string" calcext:value-type="string">
            <text:p>Lien</text:p>
          </table:table-cell>
          <table:table-cell office:value-type="string" calcext:value-type="string">
            <text:p>Lu/à lire</text:p>
          </table:table-cell>
          <table:table-cell office:value-type="string" calcext:value-type="string">
            <text:p>Citations</text:p>
          </table:table-cell>
          <table:table-cell office:value-type="string" calcext:value-type="string">
            <text:p>Sous-notion tex</text:p>
          </table:table-cell>
          <table:table-cell table:style-name="ce3" office:value-type="string" calcext:value-type="string">
            <text:p>Résumé</text:p>
          </table:table-cell>
          <table:table-cell table:style-name="ce3" office:value-type="string" calcext:value-type="string">
            <text:p>Outils cités</text:p>
          </table:table-cell>
          <table:table-cell table:style-name="ce3" office:value-type="string" calcext:value-type="string">
            <text:p>Technologies citées</text:p>
          </table:table-cell>
          <table:table-cell table:number-columns-repeated="2"/>
          <table:table-cell office:value-type="string" calcext:value-type="string">
            <text:p>Lu/à lire</text:p>
          </table:table-cell>
          <table:table-cell office:value-type="string" calcext:value-type="string">
            <text:p>Citations</text:p>
          </table:table-cell>
          <table:table-cell office:value-type="string" calcext:value-type="string">
            <text:p>Sous-notion tex</text:p>
          </table:table-cell>
          <table:table-cell office:value-type="string" calcext:value-type="string">
            <text:p>ajouté dans zotero</text:p>
          </table:table-cell>
          <table:table-cell table:number-columns-repeated="16365"/>
        </table:table-row>
        <table:table-row table:style-name="ro3">
          <table:table-cell office:value-type="string" calcext:value-type="string">
            <text:p>AI Meets Archives: The Future of Machine Learning in Cultural Heritage</text:p>
          </table:table-cell>
          <table:table-cell office:value-type="string" calcext:value-type="string">
            <text:p>Stacey Patton</text:p>
          </table:table-cell>
          <table:table-cell office:value-type="string" calcext:value-type="string">
            <text:p>NLP, HTR</text:p>
          </table:table-cell>
          <table:table-cell table:number-columns-repeated="3"/>
          <table:table-cell table:style-name="ce5" office:value-type="string" calcext:value-type="string">
            <text:p><text:a xlink:href="https://www.clir.org/2024/10/ai-meets-archives-the-future-of-machine-learning-in-cultural-heritage/" xlink:type="simple">https://www.clir.org/2024/10/ai-meets-archives-the-future-of-machine-learning-in-cultural-heritage/</text:a></text:p>
          </table:table-cell>
          <table:table-cell table:number-columns-repeated="3"/>
          <table:table-cell office:value-type="string" calcext:value-type="string">
            <text:p>Réflexion sur l'usage de l'IA dans le secteur GLAM</text:p>
          </table:table-cell>
          <table:table-cell/>
          <table:table-cell office:value-type="string" calcext:value-type="string">
            <text:p>NLP</text:p>
            <text:p>HTR</text:p>
            <text:p/>
          </table:table-cell>
          <table:table-cell table:number-columns-repeated="16371"/>
        </table:table-row>
        <table:table-row table:style-name="ro4">
          <table:table-cell office:value-type="string" calcext:value-type="string">
            <text:p>AI in Audiovisual Archives</text:p>
            <text:p/>
          </table:table-cell>
          <table:table-cell office:value-type="string" calcext:value-type="string">
            <text:p>Randi Cecchine</text:p>
          </table:table-cell>
          <table:table-cell office:value-type="string" calcext:value-type="string">
            <text:p>Indexation</text:p>
          </table:table-cell>
          <table:table-cell table:number-columns-repeated="3"/>
          <table:table-cell table:style-name="ce5" office:value-type="string" calcext:value-type="string">
            <text:p><text:a xlink:href="https://www.beeldengeluid.nl/en/research/blog/ai-audiovisual-archives" xlink:type="simple">https://www.beeldengeluid.nl/en/research/blog/ai-audiovisual-archives</text:a></text:p>
          </table:table-cell>
          <table:table-cell table:number-columns-repeated="3"/>
          <table:table-cell office:value-type="string" calcext:value-type="string">
            <text:p>Réflexion critique sur les projets existants et leurs limites : projet SEMIA, sound &amp; vision néerlandais</text:p>
            <text:p>Principe de layering d'outils IA. </text:p>
          </table:table-cell>
          <table:table-cell office:value-type="string" calcext:value-type="string">
            <text:p>INA segmenter </text:p>
            <text:p>PySceneDetect</text:p>
            <text:p>Azure video indexer</text:p>
            <text:p>Google reverse image search</text:p>
          </table:table-cell>
          <table:table-cell office:value-type="string" calcext:value-type="string">
            <text:p>ASR</text:p>
            <text:p>OCR</text:p>
          </table:table-cell>
          <table:table-cell table:number-columns-repeated="16371"/>
        </table:table-row>
        <table:table-row table:style-name="ro2">
          <table:table-cell office:value-type="string" calcext:value-type="string">
            <text:p>Bringing AI into the Audiovisual Archive</text:p>
          </table:table-cell>
          <table:table-cell office:value-type="string" calcext:value-type="string">
            <text:p>Randi Cecchine</text:p>
          </table:table-cell>
          <table:table-cell table:number-columns-repeated="4"/>
          <table:table-cell table:style-name="ce5" office:value-type="string" calcext:value-type="string">
            <text:p><text:a xlink:href="https://www.beeldengeluid.nl/en/research/blog/bringing-ai-audiovisual-archive" xlink:type="simple">https://www.beeldengeluid.nl/en/research/blog/bringing-ai-audiovisual-archive</text:a></text:p>
          </table:table-cell>
          <table:table-cell table:number-columns-repeated="3"/>
          <table:table-cell office:value-type="string" calcext:value-type="string">
            <text:p>Analyse de projets utilisant l'IA pour leurs archives audiovisuelles : Vanderbilt University, AMPPD, and the Netherlands Institute for Sound &amp; Vision</text:p>
          </table:table-cell>
          <table:table-cell office:value-type="string" calcext:value-type="string">
            <text:p>Trint</text:p>
            <text:p>AWS NER</text:p>
          </table:table-cell>
          <table:table-cell table:number-columns-repeated="16372"/>
        </table:table-row>
        <table:table-row table:style-name="ro2">
          <table:table-cell office:value-type="string" calcext:value-type="string">
            <text:p>L'IA : quels défis pour les archives ?</text:p>
          </table:table-cell>
          <table:table-cell office:value-type="string" calcext:value-type="string">
            <text:p>Edouard Vasseur</text:p>
          </table:table-cell>
          <table:table-cell table:number-columns-repeated="4"/>
          <table:table-cell table:style-name="ce5" office:value-type="string" calcext:value-type="string">
            <text:p><text:a xlink:href="https://shs.cairn.info/magazine-archimag-2025-hs81-page-8?lang=fr" xlink:type="simple">https://shs.cairn.info/magazine-archimag-2025-hs81-page-8?lang=fr</text:a></text:p>
          </table:table-cell>
          <table:table-cell table:number-columns-repeated="3"/>
          <table:table-cell office:value-type="string" calcext:value-type="string">
            <text:p>analyse de différents projets et des limites de l'usage de l'IA pour les archives. Les modèles entrainés en français sont moins performants. </text:p>
            <text:p>Projets cités : INA, interpares trust IA. </text:p>
          </table:table-cell>
          <table:table-cell table:number-columns-repeated="16373"/>
        </table:table-row>
        <table:table-row table:style-name="ro4">
          <table:table-cell office:value-type="string" calcext:value-type="string">
            <text:p>L'apprentissage automatique dans les archives :</text:p>
            <text:p>l'indexation en profondeur au service de l'accès aux</text:p>
            <text:p>archives</text:p>
          </table:table-cell>
          <table:table-cell office:value-type="string" calcext:value-type="string">
            <text:p>Jonas Arnold</text:p>
            <text:p>Martin Lüpold</text:p>
            <text:p>Lorenz Theilkäs</text:p>
            <text:p>Lambert Kansy</text:p>
          </table:table-cell>
          <table:table-cell office:value-type="string" calcext:value-type="string">
            <text:p>NLP/ indexation</text:p>
          </table:table-cell>
          <table:table-cell office:value-type="string" calcext:value-type="string">
            <text:p>lu</text:p>
          </table:table-cell>
          <table:table-cell/>
          <table:table-cell table:style-name="ce12" office:value-type="string" calcext:value-type="string">
            <text:p>Indexation</text:p>
            <text:p>Experience utilisateur </text:p>
            <text:p>IA cinema</text:p>
            <text:p>Ntions IA</text:p>
          </table:table-cell>
          <table:table-cell table:style-name="ce5" office:value-type="string" calcext:value-type="string">
            <text:p><text:a xlink:href="https://vsa-aas.ch/wp-content/uploads/2024/08/MachineLearning_im_Archiv_Whitepaper_2024-08-08_fr.pdf" xlink:type="simple">https://vsa-aas.ch/wp-content/uploads/2024/08/MachineLearning_im_Archiv_Whitepaper_2024-08-08_fr.pdf</text:a></text:p>
          </table:table-cell>
          <table:table-cell table:number-columns-repeated="3"/>
          <table:table-cell office:value-type="string" calcext:value-type="string">
            <text:p>cartographie l’ensemble des usages du ML dans les archives. </text:p>
            <text:p>Concept des métadonnées fluides : les métadonnées générées par ML évoluent en fonciton de l'évolution des algorithmes. </text:p>
            <text:p>projet mentionné : PBS learning media </text:p>
          </table:table-cell>
          <table:table-cell office:value-type="string" calcext:value-type="string">
            <text:p>Annif : outil d'indexation automatique </text:p>
            <text:p>Transkribus : HTR</text:p>
            <text:p>Vitrivr : recherche par images et par contenu</text:p>
          </table:table-cell>
          <table:table-cell office:value-type="string" calcext:value-type="string">
            <text:p>Query by example</text:p>
            <text:p/>
          </table:table-cell>
          <table:table-cell table:number-columns-repeated="16371"/>
        </table:table-row>
        <table:table-row table:style-name="ro2">
          <table:table-cell office:value-type="string" calcext:value-type="string">
            <text:p>AL/ML for Processing Imagebased Records in Archives</text:p>
          </table:table-cell>
          <table:table-cell office:value-type="string" calcext:value-type="string">
            <text:p>Interpares TrustAI</text:p>
          </table:table-cell>
          <table:table-cell office:value-type="string" calcext:value-type="string">
            <text:p>Indexation</text:p>
          </table:table-cell>
          <table:table-cell office:value-type="string" calcext:value-type="string">
            <text:p>lu</text:p>
          </table:table-cell>
          <table:table-cell/>
          <table:table-cell table:style-name="ce12" office:value-type="string" calcext:value-type="string">
            <text:p>Notions IA</text:p>
            <text:p>IA cinema</text:p>
          </table:table-cell>
          <table:table-cell table:style-name="ce5" office:value-type="string" calcext:value-type="string">
            <text:p><text:a xlink:href="https://interparestrustai.org/assets/public/dissemination/AD_01_Module4_v_1_0_20240918.pdf" xlink:type="simple">https://interparestrustai.org/assets/public/dissemination/AD_01_Module4_v_1_0_20240918.pdf</text:a></text:p>
          </table:table-cell>
          <table:table-cell table:number-columns-repeated="3"/>
          <table:table-cell office:value-type="string" calcext:value-type="string">
            <text:p>Dossier à visée pédagogique sur l'IA pour les profesionnels des archives : apprendre à utiliser l'IA pour automatiser le traitement des archives iconograohiques + portée critique </text:p>
          </table:table-cell>
          <table:table-cell office:value-type="string" calcext:value-type="string">
            <text:p>Query by image content</text:p>
            <text:p>Archipanion </text:p>
          </table:table-cell>
          <table:table-cell table:number-columns-repeated="16372"/>
        </table:table-row>
        <table:table-row table:style-name="ro3">
          <table:table-cell office:value-type="string" calcext:value-type="string">
            <text:p>On Barriers to Archival Audio Processing </text:p>
          </table:table-cell>
          <table:table-cell office:value-type="string" calcext:value-type="string">
            <text:p>Peter Sullivan</text:p>
            <text:p>Muhammad Abdul-Mageed</text:p>
          </table:table-cell>
          <table:table-cell office:value-type="string" calcext:value-type="string">
            <text:p>Indexation </text:p>
          </table:table-cell>
          <table:table-cell table:number-columns-repeated="3"/>
          <table:table-cell table:style-name="ce5" office:value-type="string" calcext:value-type="string">
            <text:p><text:a xlink:href="https://arxiv.org/pdf/2507.08768" xlink:type="simple">https://arxiv.org/pdf/2507.08768 </text:a></text:p>
          </table:table-cell>
          <table:table-cell office:value-type="string" calcext:value-type="string">
            <text:p>lu</text:p>
          </table:table-cell>
          <table:table-cell/>
          <table:table-cell office:value-type="string" calcext:value-type="string">
            <text:p>notions_indexation.tex/ notions_IA/ problématique</text:p>
          </table:table-cell>
          <table:table-cell office:value-type="string" calcext:value-type="string">
            <text:p>Article publié dans le cadre du projet interpares trust AI sur le test dess outils d’identification de langue et reconnaissance de locuteurs sur des archives de l’UNESCO. </text:p>
            <text:p>La reconnaissance des langues fonctionne plutot bien, mais pas la reconnaissance d'une même voix dans le temps. </text:p>
          </table:table-cell>
          <table:table-cell office:value-type="string" calcext:value-type="string">
            <text:p>Whisper Large V3 (Open AI) identification de la langue</text:p>
            <text:p>Massively Multilingual Speech (meta)</text:p>
            <text:p>WeSpeaker ResNet34-LM : reconnaissance de locuteurs</text:p>
          </table:table-cell>
          <table:table-cell table:number-columns-repeated="16372"/>
        </table:table-row>
        <table:table-row table:style-name="ro3">
          <table:table-cell office:value-type="string" calcext:value-type="string">
            <text:p>Indexation iconographique et intelligence artificielle </text:p>
          </table:table-cell>
          <table:table-cell office:value-type="string" calcext:value-type="string">
            <text:p>Pierre Husson</text:p>
          </table:table-cell>
          <table:table-cell office:value-type="string" calcext:value-type="string">
            <text:p>Indexation </text:p>
          </table:table-cell>
          <table:table-cell office:value-type="string" calcext:value-type="string">
            <text:p>Lu</text:p>
          </table:table-cell>
          <table:table-cell/>
          <table:table-cell office:value-type="string" calcext:value-type="string">
            <text:p>notions_indexation.tex/Indexation documentaire et indexation iconographique</text:p>
          </table:table-cell>
          <table:table-cell table:style-name="ce5" office:value-type="string" calcext:value-type="string">
            <text:p><text:a xlink:href="https://dumas.ccsd.cnrs.fr/dumas-05387482v1/document" xlink:type="simple">https://dumas.ccsd.cnrs.fr/dumas-05387482v1/document</text:a></text:p>
          </table:table-cell>
          <table:table-cell office:value-type="string" calcext:value-type="string">
            <text:p>Lu</text:p>
          </table:table-cell>
          <table:table-cell/>
          <table:table-cell office:value-type="string" calcext:value-type="string">
            <text:p>notions_indexation.tex/Indexation documentaire et indexation iconographique</text:p>
          </table:table-cell>
          <table:table-cell office:value-type="string" calcext:value-type="string">
            <text:p>Expérimentation d’indexation automatique par IA sur collection RETIF (peintures italiennes). Une des conclusions = GPT4 est le meilleur outil pour l’indexation automatique par vocabulaire contrôlé</text:p>
            <text:p/>
          </table:table-cell>
          <table:table-cell table:number-columns-repeated="4"/>
          <table:table-cell office:value-type="string" calcext:value-type="string">
            <text:p>Lu</text:p>
          </table:table-cell>
          <table:table-cell/>
          <table:table-cell office:value-type="string" calcext:value-type="string">
            <text:p>notions_indexation.tex/Indexation documentaire et indexation iconographique</text:p>
          </table:table-cell>
          <table:table-cell office:value-type="string" calcext:value-type="string">
            <text:p>oui</text:p>
          </table:table-cell>
          <table:table-cell table:number-columns-repeated="16365"/>
        </table:table-row>
        <table:table-row table:style-name="ro2">
          <table:table-cell office:value-type="string" calcext:value-type="string">
            <text:p>Comparative Analysis of Image, Video, and Audio</text:p>
            <text:p>Classifiers for Automated News Video Segmentation</text:p>
          </table:table-cell>
          <table:table-cell office:value-type="string" calcext:value-type="string">
            <text:p>Jonathan Attard</text:p>
            <text:p>Dylan Seychell</text:p>
          </table:table-cell>
          <table:table-cell/>
          <table:table-cell office:value-type="string" calcext:value-type="string">
            <text:p>lu</text:p>
          </table:table-cell>
          <table:table-cell/>
          <table:table-cell office:value-type="string" calcext:value-type="string">
            <text:p>IA_cinema/ notions_indexation</text:p>
          </table:table-cell>
          <table:table-cell table:style-name="ce5" office:value-type="string" calcext:value-type="string">
            <text:p><text:a xlink:href="https://arxiv.org/pdf/2503.21848v1" xlink:type="simple">https://arxiv.org/pdf/2503.21848v1</text:a></text:p>
          </table:table-cell>
          <table:table-cell office:value-type="string" calcext:value-type="string">
            <text:p>lu</text:p>
          </table:table-cell>
          <table:table-cell/>
          <table:table-cell office:value-type="string" calcext:value-type="string">
            <text:p>IA_cinema</text:p>
          </table:table-cell>
          <table:table-cell office:value-type="string" calcext:value-type="string">
            <text:p>Article qui compare différentes approches IA pour segmenter automatiquement les journaux télévisés. </text:p>
            <text:p>Objectif : diviser un flux vidéo en séquences logiques et étiquetées </text:p>
          </table:table-cell>
          <table:table-cell table:number-columns-repeated="16373"/>
        </table:table-row>
        <table:table-row table:style-name="ro5">
          <table:table-cell office:value-type="string" calcext:value-type="string">
            <text:p>ViViT: A Video Vision Transformer</text:p>
          </table:table-cell>
          <table:table-cell office:value-type="string" calcext:value-type="string">
            <text:p>Anurag Arnab Mostafa Dehghani Georg Heigold Chen Sun Mario Luciˇ Cordelia Schmid</text:p>
          </table:table-cell>
          <table:table-cell office:value-type="string" calcext:value-type="string">
            <text:p>Indexation </text:p>
          </table:table-cell>
          <table:table-cell office:value-type="string" calcext:value-type="string">
            <text:p>lu</text:p>
          </table:table-cell>
          <table:table-cell/>
          <table:table-cell office:value-type="string" calcext:value-type="string">
            <text:p>IA_cinema</text:p>
          </table:table-cell>
          <table:table-cell table:style-name="ce5" office:value-type="string" calcext:value-type="string">
            <text:p><text:a xlink:href="https://arxiv.org/pdf/2103.15691" xlink:type="simple">https://arxiv.org/pdf/2103.15691</text:a></text:p>
          </table:table-cell>
          <table:table-cell table:number-columns-repeated="3"/>
          <table:table-cell office:value-type="string" calcext:value-type="string">
            <text:p>article qui présente ViViT: A Video Vision Transformer : une architecture basée sur les mécanismes d’auto attention pour l’analyse des vidéos. L'enjeu est de traiter la dimension temporelle de la vidéo et de gérer l'explosion du nombre de tokens (unités de données) générées par une séquences d’images. </text:p>
          </table:table-cell>
          <table:table-cell table:number-columns-repeated="16373"/>
        </table:table-row>
        <table:table-row table:style-name="ro2">
          <table:table-cell office:value-type="string" calcext:value-type="string">
            <text:p>Le traitement des sources historiques par la vision artificielle : l'exemple des manuscrits d'astronomie de tradition ptoléméenne</text:p>
          </table:table-cell>
          <table:table-cell table:number-columns-repeated="2"/>
          <table:table-cell office:value-type="string" calcext:value-type="string">
            <text:p>en cours, p66</text:p>
          </table:table-cell>
          <table:table-cell/>
          <table:table-cell office:value-type="string" calcext:value-type="string">
            <text:p>IA notions/ IA cinema</text:p>
          </table:table-cell>
          <table:table-cell table:style-name="ce5"/>
          <table:table-cell table:number-columns-repeated="16377"/>
        </table:table-row>
        <table:table-row table:style-name="ro1">
          <table:table-cell office:value-type="string" calcext:value-type="string">
            <text:p>Computational and Experimental Approaches to Visual Aesthetics</text:p>
          </table:table-cell>
          <table:table-cell table:number-columns-repeated="2"/>
          <table:table-cell office:value-type="string" calcext:value-type="string">
            <text:p>lu</text:p>
          </table:table-cell>
          <table:table-cell table:number-columns-repeated="2"/>
          <table:table-cell table:style-name="ce5" office:value-type="string" calcext:value-type="string">
            <text:p><text:a xlink:href="https://www.frontiersin.org/journals/computational-neuroscience/articles/10.3389/fncom.2017.00102/full" xlink:type="simple">https://www.frontiersin.org/journals/computational-neuroscience/articles/10.3389/fncom.2017.00102/full </text:a></text:p>
          </table:table-cell>
          <table:table-cell table:number-columns-repeated="16377"/>
        </table:table-row>
        <table:table-row table:style-name="ro3">
          <table:table-cell office:value-type="string" calcext:value-type="string">
            <text:p>Scene Separation &amp; Data Selection: Temporal Segmentation</text:p>
            <text:p>Algorithm for Real-Time Video Stream Analysis</text:p>
          </table:table-cell>
          <table:table-cell office:value-type="string" calcext:value-type="string">
            <text:p>Yuelin Xin</text:p>
            <text:p>Zihan Zhou</text:p>
            <text:p>and Yuxuan Xia</text:p>
          </table:table-cell>
          <table:table-cell office:value-type="string" calcext:value-type="string">
            <text:p>Indexation </text:p>
          </table:table-cell>
          <table:table-cell office:value-type="string" calcext:value-type="string">
            <text:p>lu</text:p>
          </table:table-cell>
          <table:table-cell table:number-columns-repeated="2"/>
          <table:table-cell table:style-name="ce5" office:value-type="string" calcext:value-type="string">
            <text:p><text:a xlink:href="https://arxiv.org/pdf/2308.00210" xlink:type="simple">https://arxiv.org/pdf/2308.00210</text:a></text:p>
          </table:table-cell>
          <table:table-cell table:number-columns-repeated="3"/>
          <table:table-cell office:value-type="string" calcext:value-type="string">
            <text:p>Présentation de <text:s/>2SDS (Scene Separation and Data Selection), un algorithme qui analyse les vidéos dans leur dimension temporelle. (utilisé en complément d'un CNN). Il sépare une vidéo en scènes, et sélectionne une représentation pour chaque scène, pour qu'un CNN puisse mieux les interpréter. </text:p>
          </table:table-cell>
          <table:table-cell table:number-columns-repeated="16373"/>
        </table:table-row>
        <table:table-row table:style-name="ro2">
          <table:table-cell office:value-type="string" calcext:value-type="string">
            <text:p>Deep Clustering for Unsupervised Learning of Visual Features</text:p>
            <text:p/>
          </table:table-cell>
          <table:table-cell table:number-columns-repeated="2"/>
          <table:table-cell office:value-type="string" calcext:value-type="string">
            <text:p>lu</text:p>
          </table:table-cell>
          <table:table-cell table:number-columns-repeated="2"/>
          <table:table-cell table:style-name="ce5" office:value-type="string" calcext:value-type="string">
            <text:p><text:a xlink:href="https://link.springer.com/chapter/10.1007/978-3-030-01264-9_9" xlink:type="simple">https://link.springer.com/chapter/10.1007/978-3-030-01264-9_9 </text:a></text:p>
          </table:table-cell>
          <table:table-cell table:number-columns-repeated="16377"/>
        </table:table-row>
        <table:table-row table:style-name="ro2">
          <table:table-cell office:value-type="string" calcext:value-type="string">
            <text:p>Supervised versus unsupervised learning: What's the difference?</text:p>
            <text:p/>
          </table:table-cell>
          <table:table-cell table:number-columns-repeated="2"/>
          <table:table-cell office:value-type="string" calcext:value-type="string">
            <text:p>lu</text:p>
          </table:table-cell>
          <table:table-cell table:number-columns-repeated="2"/>
          <table:table-cell table:style-name="ce5" office:value-type="string" calcext:value-type="string">
            <text:p><text:a xlink:href="https://www.ibm.com/think/topics/supervised-vs-unsupervised-learning" xlink:type="simple">https://www.ibm.com/think/topics/supervised-vs-unsupervised-learning </text:a></text:p>
          </table:table-cell>
          <table:table-cell table:number-columns-repeated="16377"/>
        </table:table-row>
        <table:table-row table:style-name="ro3">
          <table:table-cell office:value-type="string" calcext:value-type="string">
            <text:p>A Comprehensive Review of Image Line Segment Detection and Description: Taxonomies, Comparisons, and Challenges</text:p>
            <text:p/>
          </table:table-cell>
          <table:table-cell table:number-columns-repeated="2"/>
          <table:table-cell office:value-type="string" calcext:value-type="string">
            <text:p>lu</text:p>
          </table:table-cell>
          <table:table-cell table:number-columns-repeated="2"/>
          <table:table-cell table:style-name="ce5" office:value-type="string" calcext:value-type="string">
            <text:p><text:a xlink:href="https://arxiv.org/abs/2305.00264" xlink:type="simple">https://arxiv.org/abs/2305.00264 </text:a></text:p>
          </table:table-cell>
          <table:table-cell table:number-columns-repeated="16377"/>
        </table:table-row>
        <table:table-row table:style-name="ro2">
          <table:table-cell office:value-type="string" calcext:value-type="string">
            <text:p>Explorer des corpus d’images. L’IA au service du patrimoine</text:p>
            <text:p/>
          </table:table-cell>
          <table:table-cell table:number-columns-repeated="2"/>
          <table:table-cell office:value-type="string" calcext:value-type="string">
            <text:p>lu</text:p>
          </table:table-cell>
          <table:table-cell table:number-columns-repeated="2"/>
          <table:table-cell table:style-name="ce5" office:value-type="string" calcext:value-type="string">
            <text:p><text:a xlink:href="https://bnf.hypotheses.org/2809" xlink:type="simple">https://bnf.hypotheses.org/2809 </text:a></text:p>
          </table:table-cell>
          <table:table-cell table:number-columns-repeated="16377"/>
        </table:table-row>
        <table:table-row table:style-name="ro1">
          <table:table-cell table:style-name="ce10" office:value-type="string" calcext:value-type="string">
            <text:p>DigInPix: Visual Named-Entities Identification in Images and Videos</text:p>
          </table:table-cell>
          <table:table-cell table:number-columns-repeated="2"/>
          <table:table-cell office:value-type="string" calcext:value-type="string">
            <text:p>lu</text:p>
          </table:table-cell>
          <table:table-cell/>
          <table:table-cell office:value-type="string" calcext:value-type="string">
            <text:p>IA cinéma</text:p>
          </table:table-cell>
          <table:table-cell table:style-name="ce5" office:value-type="string" calcext:value-type="string">
            <text:p><text:a xlink:href="https://inria.hal.science/hal-01182780v1/document" xlink:type="simple">https://inria.hal.science/hal-01182780v1/document</text:a></text:p>
          </table:table-cell>
          <table:table-cell table:number-columns-repeated="16377"/>
        </table:table-row>
        <table:table-row table:style-name="ro1">
          <table:table-cell table:style-name="ce10" office:value-type="string" calcext:value-type="string">
            <text:p>Amalia.js : an Open-Source Metadata Driven HTML5 Multimedia Player</text:p>
          </table:table-cell>
          <table:table-cell table:number-columns-repeated="2"/>
          <table:table-cell office:value-type="string" calcext:value-type="string">
            <text:p>En cours </text:p>
          </table:table-cell>
          <table:table-cell table:number-columns-repeated="2"/>
          <table:table-cell table:style-name="ce5" office:value-type="string" calcext:value-type="string">
            <text:p><text:a xlink:href="https://www.herve.name/research/nherve_amalia_js.pdf" xlink:type="simple">https://www.herve.name/research/nherve_amalia_js.pdf</text:a></text:p>
          </table:table-cell>
          <table:table-cell table:number-columns-repeated="16377"/>
        </table:table-row>
        <table:table-row table:style-name="ro2">
          <table:table-cell office:value-type="string" calcext:value-type="string">
            <text:p>Unsupervised Layered Image Decomposition into Object Prototypes</text:p>
            <text:p/>
          </table:table-cell>
          <table:table-cell table:number-columns-repeated="5"/>
          <table:table-cell table:style-name="ce5" office:value-type="string" calcext:value-type="string">
            <text:p><text:a xlink:href="https://arxiv.org/abs/2104.14575" xlink:type="simple">https://arxiv.org/abs/2104.14575 </text:a></text:p>
          </table:table-cell>
          <table:table-cell table:number-columns-repeated="16377"/>
        </table:table-row>
        <table:table-row table:style-name="ro2">
          <table:table-cell office:value-type="string" calcext:value-type="string">
            <text:p>Image-to-Image Retrieval by Learning Similarity between Scene Graphs</text:p>
            <text:p/>
          </table:table-cell>
          <table:table-cell table:number-columns-repeated="5"/>
          <table:table-cell table:style-name="ce5" office:value-type="string" calcext:value-type="string">
            <text:p><text:a xlink:href="https://arxiv.org/abs/2012.14700" xlink:type="simple">https://arxiv.org/abs/2012.14700 </text:a></text:p>
          </table:table-cell>
          <table:table-cell table:number-columns-repeated="16377"/>
        </table:table-row>
        <table:table-row table:style-name="ro3">
          <table:table-cell office:value-type="string" calcext:value-type="string">
            <text:p>TDSNet: A temporal difference based network for video semantic segmentation</text:p>
          </table:table-cell>
          <table:table-cell office:value-type="string" calcext:value-type="string">
            <text:p>Haochen Yuan</text:p>
            <text:p>Junjie Peng </text:p>
            <text:p>Zesu Cai </text:p>
          </table:table-cell>
          <table:table-cell office:value-type="string" calcext:value-type="string">
            <text:p>Indexation </text:p>
          </table:table-cell>
          <table:table-cell office:value-type="string" calcext:value-type="string">
            <text:p>En cours </text:p>
          </table:table-cell>
          <table:table-cell/>
          <table:table-cell office:value-type="string" calcext:value-type="string">
            <text:p>Segmentation </text:p>
          </table:table-cell>
          <table:table-cell table:style-name="ce5" office:value-type="string" calcext:value-type="string">
            <text:p><text:a xlink:href="https://www.sciencedirect.com/science/article/abs/pii/S0020025524012490" xlink:type="simple">https://www.sciencedirect.com/science/article/abs/pii/S0020025524012490</text:a></text:p>
          </table:table-cell>
          <table:table-cell table:number-columns-repeated="3"/>
          <table:table-cell office:value-type="string" calcext:value-type="string">
            <text:p>Article qui présente TDSNet (Temporal Difference Segmentation Network), un modèle de segmentation sémantique de vidéos qui se base sur l'analyse de la différence entre les images. </text:p>
          </table:table-cell>
          <table:table-cell table:number-columns-repeated="16373"/>
        </table:table-row>
        <table:table-row table:style-name="ro3">
          <table:table-cell office:value-type="string" calcext:value-type="string">
            <text:p>Temporal video scene segmentation using deep-learning</text:p>
            <text:p/>
          </table:table-cell>
          <table:table-cell office:value-type="string" calcext:value-type="string">
            <text:p>Tiago Henrique Trojahn </text:p>
            <text:p>Rudinei Goularte </text:p>
          </table:table-cell>
          <table:table-cell office:value-type="string" calcext:value-type="string">
            <text:p>Indexation </text:p>
          </table:table-cell>
          <table:table-cell table:number-columns-repeated="3"/>
          <table:table-cell table:style-name="ce5" office:value-type="string" calcext:value-type="string">
            <text:p><text:a xlink:href="https://link.springer.com/article/10.1007/s11042-020-10450-2" xlink:type="simple">https://link.springer.com/article/10.1007/s11042-020-10450-2</text:a></text:p>
          </table:table-cell>
          <table:table-cell table:number-columns-repeated="3"/>
          <table:table-cell office:value-type="string" calcext:value-type="string">
            <text:p>Article qui traite de la segmentation temporelle de vidéos basée sur le deep learning multimodal combinant plusieurs types de données (audio et vidéo) et en combinant deux types de modèles : CNN pour les caractéristiques visuelles et RNN pour les caractéristiques temporelles. </text:p>
          </table:table-cell>
          <table:table-cell table:number-columns-repeated="16373"/>
        </table:table-row>
        <table:table-row table:style-name="ro3">
          <table:table-cell office:value-type="string" calcext:value-type="string">
            <text:p>Multimodal early fusion operators for temporal video scene segmentation tasks</text:p>
            <text:p/>
          </table:table-cell>
          <table:table-cell office:value-type="string" calcext:value-type="string">
            <text:p>Antonio A. R. Beserra </text:p>
            <text:p>Rudinei Goularte </text:p>
          </table:table-cell>
          <table:table-cell office:value-type="string" calcext:value-type="string">
            <text:p>Indexation </text:p>
          </table:table-cell>
          <table:table-cell table:number-columns-repeated="3"/>
          <table:table-cell table:style-name="ce5" office:value-type="string" calcext:value-type="string">
            <text:p><text:a xlink:href="https://link.springer.com/article/10.1007/s11042-023-14953-6?fromPaywallRec=true" xlink:type="simple">https://link.springer.com/article/10.1007/s11042-023-14953-6?fromPaywallRec=true</text:a></text:p>
          </table:table-cell>
          <table:table-cell table:number-columns-repeated="3"/>
          <table:table-cell office:value-type="string" calcext:value-type="string">
            <text:p>Article sur la segmentation temporelle de séquences vidéo (TVSS), qui propose de simplifier la fusion de données multimodales et proposant la fusion multimodale précoce. Ce type de fusion est effectué avant la segmentation</text:p>
          </table:table-cell>
          <table:table-cell table:number-columns-repeated="16373"/>
        </table:table-row>
        <table:table-row table:style-name="ro4">
          <table:table-cell office:value-type="string" calcext:value-type="string">
            <text:p>Automatic video scene segmentation</text:p>
            <text:p>based on spatial-temporal clues and</text:p>
            <text:p>rhythm</text:p>
          </table:table-cell>
          <table:table-cell office:value-type="string" calcext:value-type="string">
            <text:p>Walid Mahdi and Liming Chen</text:p>
            <text:p>Mohsen Ardebilian</text:p>
          </table:table-cell>
          <table:table-cell office:value-type="string" calcext:value-type="string">
            <text:p>Indexation </text:p>
          </table:table-cell>
          <table:table-cell table:number-columns-repeated="3"/>
          <table:table-cell table:style-name="ce5" office:value-type="string" calcext:value-type="string">
            <text:p><text:a xlink:href="https://arxiv.org/pdf/1412.4470" xlink:type="simple">https://arxiv.org/pdf/1412.4470</text:a></text:p>
          </table:table-cell>
          <table:table-cell table:number-columns-repeated="3"/>
          <table:table-cell office:value-type="string" calcext:value-type="string">
            <text:p>Article qui propose une méthode pour segmenter automatiquement des flux vidéo en différentes séquences fondée sur des indices spatio temporels (relations entre images), et le rythme des plans (durée des plans, montage). </text:p>
          </table:table-cell>
          <table:table-cell table:number-columns-repeated="16373"/>
        </table:table-row>
        <table:table-row table:style-name="ro6">
          <table:table-cell office:value-type="string" calcext:value-type="string">
            <text:p>Conversational AI-Enhanced Exploration System to Query Large-Scale Digitised</text:p>
            <text:p>Collections of Natural History Museums</text:p>
          </table:table-cell>
          <table:table-cell office:value-type="string" calcext:value-type="string">
            <text:p>YIYUAN WANG</text:p>
            <text:p>ANDREW JOHNSTON, </text:p>
            <text:p>ZOË SADOKIERSKI, </text:p>
            <text:p>RHIANNON STEPHENS,</text:p>
            <text:p>SHANE T. AHYONG, </text:p>
          </table:table-cell>
          <table:table-cell office:value-type="string" calcext:value-type="string">
            <text:p>NLP</text:p>
          </table:table-cell>
          <table:table-cell table:number-columns-repeated="3"/>
          <table:table-cell table:style-name="ce5" office:value-type="string" calcext:value-type="string">
            <text:p><text:a xlink:href="https://arxiv.org/pdf/2603.10285" xlink:type="simple">https://arxiv.org/pdf/2603.10285</text:a></text:p>
          </table:table-cell>
          <table:table-cell table:number-columns-repeated="3"/>
          <table:table-cell office:value-type="string" calcext:value-type="string">
            <text:p>Description du déploiement de l’IA pour interroger des spécimens en langage naturel, couplé à une carte interactive. Architecture technique qui peut être transposé aux archives audiovisuelles. </text:p>
          </table:table-cell>
          <table:table-cell table:style-name="ce5"/>
          <table:table-cell office:value-type="string" calcext:value-type="string">
            <text:p>Text to SQL </text:p>
            <text:p>Function calling </text:p>
          </table:table-cell>
          <table:table-cell table:number-columns-repeated="16371"/>
        </table:table-row>
        <table:table-row table:style-name="ro2">
          <table:table-cell office:value-type="string" calcext:value-type="string">
            <text:p>Annif : indexation automatique à al bibliothèque nationale de finlande</text:p>
          </table:table-cell>
          <table:table-cell office:value-type="string" calcext:value-type="string">
            <text:p>Osma Suominen</text:p>
          </table:table-cell>
          <table:table-cell office:value-type="string" calcext:value-type="string">
            <text:p>Indexation </text:p>
          </table:table-cell>
          <table:table-cell office:value-type="string" calcext:value-type="string">
            <text:p>lu</text:p>
          </table:table-cell>
          <table:table-cell/>
          <table:table-cell office:value-type="string" calcext:value-type="string">
            <text:p>notions_indexation.tex/Indexation documentaire</text:p>
          </table:table-cell>
          <table:table-cell table:style-name="ce5" office:value-type="string" calcext:value-type="string">
            <text:p><text:a xlink:href="https://publications-prairial.fr/arabesques/index.php?id=605" xlink:type="simple">https://publications-prairial.fr/arabesques/index.php?id=605</text:a></text:p>
          </table:table-cell>
          <table:table-cell office:value-type="string" calcext:value-type="string">
            <text:p>lu</text:p>
          </table:table-cell>
          <table:table-cell/>
          <table:table-cell office:value-type="string" calcext:value-type="string">
            <text:p>notions_indexation.tex/Indexation documentaire</text:p>
          </table:table-cell>
          <table:table-cell table:style-name="ce8" office:value-type="string" calcext:value-type="string">
            <text:p>Article du créateur de Annif : outil d’indexation automatique opensource qui prend un document textuel en entrée et retourne une liste de mots clés issus de vocabulaires controlés. Dispo sur github et exposé via une API REST.</text:p>
          </table:table-cell>
          <table:table-cell table:number-columns-repeated="4"/>
          <table:table-cell office:value-type="string" calcext:value-type="string">
            <text:p>lu</text:p>
          </table:table-cell>
          <table:table-cell/>
          <table:table-cell office:value-type="string" calcext:value-type="string">
            <text:p>notions_indexation.tex/Indexation documentaire</text:p>
          </table:table-cell>
          <table:table-cell office:value-type="string" calcext:value-type="string">
            <text:p>oui</text:p>
          </table:table-cell>
          <table:table-cell table:number-columns-repeated="16365"/>
        </table:table-row>
        <table:table-row table:style-name="ro4">
          <table:table-cell office:value-type="string" calcext:value-type="string">
            <text:p>LLaVA-Video: Video Instruction Tuning With Synthetic Data</text:p>
          </table:table-cell>
          <table:table-cell/>
          <table:table-cell office:value-type="string" calcext:value-type="string">
            <text:p>Indexation </text:p>
          </table:table-cell>
          <table:table-cell table:number-columns-repeated="3"/>
          <table:table-cell table:style-name="ce5" office:value-type="string" calcext:value-type="string">
            <text:p><text:a xlink:href="https://arxiv.org/pdf/2410.02713" xlink:type="simple">https://arxiv.org/pdf/2410.02713</text:a></text:p>
          </table:table-cell>
          <table:table-cell table:number-columns-repeated="3"/>
          <table:table-cell table:style-name="ce8" office:value-type="string" calcext:value-type="string">
            <text:p>Mise à disposition du jeu de données  LLaVA-Video-178K et de son LLM LLaVA-Video. Le jeu de données contient 3 types de contenus : descriptions, questions-réponses, questions à choix multiples. </text:p>
            <text:p>présentation de LLava-video slowfast : méthode qui induit plus de frames et moins de token, mieux répartis. </text:p>
            <text:p>Architecture unifiée image et vidéo </text:p>
          </table:table-cell>
          <table:table-cell table:number-columns-repeated="2"/>
          <table:table-cell office:value-type="string" calcext:value-type="string">
            <text:p>Language bind</text:p>
          </table:table-cell>
          <table:table-cell table:number-columns-repeated="16370"/>
        </table:table-row>
        <table:table-row table:style-name="ro7">
          <table:table-cell office:value-type="string" calcext:value-type="string">
            <text:p>Case study: AI in screen archives</text:p>
          </table:table-cell>
          <table:table-cell/>
          <table:table-cell office:value-type="string" calcext:value-type="string">
            <text:p>Indexation </text:p>
          </table:table-cell>
          <table:table-cell table:number-columns-repeated="3"/>
          <table:table-cell table:style-name="ce5" office:value-type="string" calcext:value-type="string">
            <text:p><text:a xlink:href="https://www.bfi.org.uk/industry-data-insights/reports/ai-screen-sector-perspectives-paths-forward" xlink:type="simple">https://www.bfi.org.uk/industry-data-insights/reports/ai-screen-sector-perspectives-paths-forward</text:a></text:p>
          </table:table-cell>
          <table:table-cell table:number-columns-repeated="3"/>
          <table:table-cell table:style-name="ce8" office:value-type="string" calcext:value-type="string">
            <text:p>The BFI national archive (p.22) : experimentations avec le speech-to-text, NER, description et compréhension vidéo. </text:p>
          </table:table-cell>
          <table:table-cell/>
          <table:table-cell office:value-type="string" calcext:value-type="string">
            <text:p>EntityFishing</text:p>
            <text:p>Refined</text:p>
            <text:p>Qwen2-VL </text:p>
            <text:p>LLaVA-Video</text:p>
            <text:p>Whisper</text:p>
          </table:table-cell>
          <table:table-cell/>
          <table:table-cell table:style-name="ce5" office:value-type="string" calcext:value-type="string">
            <text:p><text:a xlink:href="https://arxiv.org/abs/2409.12191" xlink:type="simple">https://arxiv.org/abs/2409.12191</text:a></text:p>
          </table:table-cell>
          <table:table-cell table:number-columns-repeated="16369"/>
        </table:table-row>
        <table:table-row table:style-name="ro8">
          <table:table-cell office:value-type="string" calcext:value-type="string">
            <text:p>Content-Based Video Retrieval in Historical</text:p>
            <text:p>Collections of the German Broadcasting Archive</text:p>
          </table:table-cell>
          <table:table-cell office:value-type="string" calcext:value-type="string">
            <text:p>Markus Mühling</text:p>
            <text:p>Manja Meister</text:p>
            <text:p>Nikolaus Korfhage</text:p>
            <text:p>Jörg Wehling</text:p>
            <text:p>Angelika Hörth</text:p>
            <text:p>Ralph Ewerth</text:p>
            <text:p>Bernd Freisleben</text:p>
          </table:table-cell>
          <table:table-cell office:value-type="string" calcext:value-type="string">
            <text:p>Indexation </text:p>
          </table:table-cell>
          <table:table-cell table:number-columns-repeated="3"/>
          <table:table-cell table:style-name="ce5" office:value-type="string" calcext:value-type="string">
            <text:p><text:a xlink:href="https://arxiv.org/pdf/1702.03790" xlink:type="simple">https://arxiv.org/pdf/1702.03790</text:a></text:p>
          </table:table-cell>
          <table:table-cell table:number-columns-repeated="3"/>
          <table:table-cell table:style-name="ce8" office:value-type="string" calcext:value-type="string">
            <text:p> Description en détail d’un système de retrieval vidéo déployé sur 2500 heures d’archives télévisuelles de la RDA à l'aide d'un CNN multi label fine tuné sur googlenet. </text:p>
            <text:p>Le modèle est construit sur une étude des requêtes utilisateurs : ce qu'ils cherchent, ce qu'ils ne trouvent pas...</text:p>
          </table:table-cell>
          <table:table-cell/>
          <table:table-cell office:value-type="string" calcext:value-type="string">
            <text:p>CNN</text:p>
            <text:p>Googlenet</text:p>
            <text:p>Tesseract</text:p>
          </table:table-cell>
          <table:table-cell office:value-type="string" calcext:value-type="string">
            <text:p>OCR</text:p>
            <text:p>semantic hashing</text:p>
            <text:p>algorithme MSER</text:p>
            <text:p/>
          </table:table-cell>
          <table:table-cell table:number-columns-repeated="16370"/>
        </table:table-row>
        <table:table-row table:style-name="ro3">
          <table:table-cell office:value-type="string" calcext:value-type="string">
            <text:p/>
            <text:p>Crosspoint and Amplify will manage the automatic metadata of the RTVE Archive using AI</text:p>
          </table:table-cell>
          <table:table-cell/>
          <table:table-cell office:value-type="string" calcext:value-type="string">
            <text:p>Indexation </text:p>
          </table:table-cell>
          <table:table-cell table:number-columns-repeated="3"/>
          <table:table-cell table:style-name="ce5" office:value-type="string" calcext:value-type="string">
            <text:p><text:a xlink:href="https://www.panoramaaudiovisual.com/en/2025/09/04/crosspoint-and-amplify-will-manage-the-automatic-metadata-of-the-rtve-archive-using-ai/" xlink:type="simple">https://www.panoramaaudiovisual.com/en/2025/09/04/crosspoint-and-amplify-will-manage-the-automatic-metadata-of-the-rtve-archive-using-ai/</text:a></text:p>
          </table:table-cell>
          <table:table-cell table:number-columns-repeated="3"/>
          <table:table-cell table:style-name="ce8" office:value-type="string" calcext:value-type="string">
            <text:p>Projet de la RTVE d'utiliser Crosspoint (basé sur Amplify), pour indexer automatiquement les archives audiovisuelles : transcription d'audio, NER, extraction de mots clés, classification automatique, production de résumés, segmentation sémantique. </text:p>
          </table:table-cell>
          <table:table-cell/>
          <table:table-cell office:value-type="string" calcext:value-type="string">
            <text:p>Crosspoint</text:p>
            <text:p>Amplify Seiri</text:p>
            <text:p>Memnon</text:p>
          </table:table-cell>
          <table:table-cell office:value-type="string" calcext:value-type="string">
            <text:p>OCR</text:p>
            <text:p>NER</text:p>
            <text:p/>
          </table:table-cell>
          <table:table-cell table:number-columns-repeated="16370"/>
        </table:table-row>
        <table:table-row table:style-name="ro9">
          <table:table-cell office:value-type="string" calcext:value-type="string">
            <text:p>AI-driven Metadata Extraction and Semantic Search for Audiovisual Archives</text:p>
            <text:p/>
          </table:table-cell>
          <table:table-cell office:value-type="string" calcext:value-type="string">
            <text:p>André Rattinger </text:p>
            <text:p>Giacomo AlliataKirell </text:p>
            <text:p>BenziSarah Kenderdine</text:p>
          </table:table-cell>
          <table:table-cell office:value-type="string" calcext:value-type="string">
            <text:p>Indexation</text:p>
          </table:table-cell>
          <table:table-cell table:number-columns-repeated="3"/>
          <table:table-cell table:style-name="ce5" office:value-type="string" calcext:value-type="string">
            <text:p><text:a xlink:href="https://library.imaging.org/archiving/articles/22/1/21" xlink:type="simple">https://library.imaging.org/archiving/articles/22/1/21 </text:a></text:p>
          </table:table-cell>
          <table:table-cell table:number-columns-repeated="3"/>
          <table:table-cell table:style-name="ce8" office:value-type="string" calcext:value-type="string">
            <text:p>Description du système archivevault et de la méthodologie utilisée pour extraire automatiquement des métadonnées depuis des archives audiovisuelles. </text:p>
            <text:p>Notamment utilisé par les archives de la RTS.  </text:p>
          </table:table-cell>
          <table:table-cell/>
          <table:table-cell office:value-type="string" calcext:value-type="string">
            <text:p>ArchiveVault</text:p>
          </table:table-cell>
          <table:table-cell office:value-type="string" calcext:value-type="string">
            <text:p>NER (spaCY)</text:p>
            <text:p>Reconnaissance vocale et transcription (WhisperX)</text:p>
            <text:p>pgvector </text:p>
            <text:p>Openpifpaf</text:p>
          </table:table-cell>
          <table:table-cell table:number-columns-repeated="16370"/>
        </table:table-row>
        <table:table-row table:style-name="ro2">
          <table:table-cell office:value-type="string" calcext:value-type="string">
            <text:p>Artificial Intelligence at the service of the RTS Audiovisual Archives</text:p>
          </table:table-cell>
          <table:table-cell office:value-type="string" calcext:value-type="string">
            <text:p>Pietro Rezzonico,</text:p>
          </table:table-cell>
          <table:table-cell office:value-type="string" calcext:value-type="string">
            <text:p>Indexation</text:p>
          </table:table-cell>
          <table:table-cell table:number-columns-repeated="3"/>
          <table:table-cell table:style-name="ce5" office:value-type="string" calcext:value-type="string">
            <text:p><text:a xlink:href="https://fiatifta.org/awards-editions/awards-2019/" xlink:type="simple">https://fiatifta.org/awards-editions/awards-2019/</text:a></text:p>
          </table:table-cell>
          <table:table-cell table:number-columns-repeated="3"/>
          <table:table-cell table:style-name="ce8" office:value-type="string" calcext:value-type="string">
            <text:p>Les archives de la RTS ont mis en place la reconnaissance faciale, recherche visuelle, et classification automatique. Un peu plus d'infos dans cette vidéo : </text:p>
            <text:p>https://www.youtube.com/watch?v=Cp-Sd0KQ-SA </text:p>
          </table:table-cell>
          <table:table-cell table:number-columns-repeated="16373"/>
        </table:table-row>
        <table:table-row table:style-name="ro10">
          <table:table-cell office:value-type="string" calcext:value-type="string">
            <text:p>La recherche avec IA</text:p>
          </table:table-cell>
          <table:table-cell office:value-type="string" calcext:value-type="string">
            <text:p>Amorce</text:p>
          </table:table-cell>
          <table:table-cell office:value-type="string" calcext:value-type="string">
            <text:p>NLP</text:p>
          </table:table-cell>
          <table:table-cell table:number-columns-repeated="3"/>
          <table:table-cell table:style-name="ce5" office:value-type="string" calcext:value-type="string">
            <text:p><text:a xlink:href="https://www.amorce.eu/projets-la-recherche-avec-ia-1535-1041-0-0.html" xlink:type="simple">https://www.amorce.eu/projets-la-recherche-avec-ia-1535-1041-0-0.html
https://archipanion.amorce.eu/fr </text:a></text:p>
          </table:table-cell>
          <table:table-cell table:number-columns-repeated="3"/>
          <table:table-cell table:style-name="ce8" office:value-type="string" calcext:value-type="string">
            <text:p>La plateforme Amorce a mis en place une recherche en langage naturel pour les archives audiovisuelles avec Archipanion</text:p>
          </table:table-cell>
          <table:table-cell/>
          <table:table-cell office:value-type="string" calcext:value-type="string">
            <text:p>Archipanion (recherche visuelle assistée par IA, extraction de données structurées. </text:p>
            <text:p>https://www.archipanion.com/fr/  </text:p>
          </table:table-cell>
          <table:table-cell table:number-columns-repeated="16371"/>
        </table:table-row>
        <table:table-row table:style-name="ro1">
          <table:table-cell office:value-type="string" calcext:value-type="string">
            <text:p>Traitements IA à l'INA</text:p>
          </table:table-cell>
          <table:table-cell office:value-type="string" calcext:value-type="string">
            <text:p>INA</text:p>
          </table:table-cell>
          <table:table-cell office:value-type="string" calcext:value-type="string">
            <text:p>Indexation</text:p>
          </table:table-cell>
          <table:table-cell table:number-columns-repeated="3"/>
          <table:table-cell table:style-name="ce5" office:value-type="string" calcext:value-type="string">
            <text:p><text:a xlink:href="https://data.ina.fr/traitements-ia" xlink:type="simple">https://data.ina.fr/traitements-ia</text:a></text:p>
          </table:table-cell>
          <table:table-cell table:number-columns-repeated="3"/>
          <table:table-cell table:style-name="ce8" office:value-type="string" calcext:value-type="string">
            <text:p>Présentation des traitements IA à l'INA comprenant : analyse du son, transcriptions automatiques, reconnaissance d'entités nommées. </text:p>
          </table:table-cell>
          <table:table-cell table:number-columns-repeated="16373"/>
        </table:table-row>
        <table:table-row table:style-name="ro11">
          <table:table-cell office:value-type="string" calcext:value-type="string">
            <text:p>CamemBERT: a Tasty French Language Model</text:p>
          </table:table-cell>
          <table:table-cell office:value-type="string" calcext:value-type="string">
            <text:p>Louis Martin</text:p>
            <text:p> Benjamin Muller Pedro Javier Ortiz Suárez</text:p>
            <text:p>Yoann Dupont Laurent Romary Éric Villemonte de la Clergerie</text:p>
            <text:p>Djamé Seddah Benoît Sagot</text:p>
          </table:table-cell>
          <table:table-cell office:value-type="string" calcext:value-type="string">
            <text:p>NLP</text:p>
          </table:table-cell>
          <table:table-cell table:number-columns-repeated="3"/>
          <table:table-cell table:style-name="ce5" office:value-type="string" calcext:value-type="string">
            <text:p><text:a xlink:href="https://inria.hal.science/hal-02889805/document" xlink:type="simple">https://inria.hal.science/hal-02889805/document</text:a></text:p>
          </table:table-cell>
          <table:table-cell table:number-columns-repeated="3"/>
          <table:table-cell table:style-name="ce8" office:value-type="string" calcext:value-type="string">
            <text:p>Article sur le modèle de langage camemBERT entrainé en français. </text:p>
          </table:table-cell>
          <table:table-cell table:number-columns-repeated="16373"/>
        </table:table-row>
        <table:table-row table:style-name="ro2">
          <table:table-cell office:value-type="string" calcext:value-type="string">
            <text:p>Qu’est ce que l’indexation de documents ? Guide complet et automatisation</text:p>
          </table:table-cell>
          <table:table-cell office:value-type="string" calcext:value-type="string">
            <text:p>Alexandre Baudon</text:p>
          </table:table-cell>
          <table:table-cell office:value-type="string" calcext:value-type="string">
            <text:p>Indexation </text:p>
          </table:table-cell>
          <table:table-cell table:number-columns-repeated="3"/>
          <table:table-cell table:style-name="ce5" office:value-type="string" calcext:value-type="string">
            <text:p><text:a xlink:href="https://deltic.fr/indexation-documents/" xlink:type="simple">https://deltic.fr/indexation-documents/</text:a></text:p>
          </table:table-cell>
          <table:table-cell table:number-columns-repeated="3"/>
          <table:table-cell office:value-type="string" calcext:value-type="string">
            <text:p>Article général qui présente les grands principe de l'indexation de documents et le challenge que l'automatisation de ce processus représente. </text:p>
          </table:table-cell>
          <table:table-cell table:number-columns-repeated="16373"/>
        </table:table-row>
        <table:table-row table:style-name="ro2">
          <table:table-cell office:value-type="string" calcext:value-type="string">
            <text:p>Utilisation du contexte pour l’indexation Sémantique des images et vidéos</text:p>
          </table:table-cell>
          <table:table-cell office:value-type="string" calcext:value-type="string">
            <text:p>Abdelkader Hamadi</text:p>
          </table:table-cell>
          <table:table-cell office:value-type="string" calcext:value-type="string">
            <text:p>Indexation</text:p>
          </table:table-cell>
          <table:table-cell table:number-columns-repeated="3"/>
          <table:table-cell table:style-name="ce5" office:value-type="string" calcext:value-type="string">
            <text:p><text:a xlink:href="https://hal.science/tel-01137526v1" xlink:type="simple">https://hal.science/tel-01137526v1</text:a></text:p>
          </table:table-cell>
          <table:table-cell table:number-columns-repeated="3"/>
          <table:table-cell office:value-type="string" calcext:value-type="string">
            <text:p>Thèse qui étudie les moyens en places et à mettre en place afin de créer une indexation automatisée intégrant des notions sémantiques. C'est à dire une indexation basée sur la compréhension d'un film/d'un image par l'IA. </text:p>
          </table:table-cell>
          <table:table-cell table:number-columns-repeated="16373"/>
        </table:table-row>
        <table:table-row table:style-name="ro2">
          <table:table-cell table:style-name="ce6" office:value-type="string" calcext:value-type="string">
            <text:p>Traitement automatique du langage naturel avec Python – Le NLP avec spaCy et NLTK</text:p>
          </table:table-cell>
          <table:table-cell office:value-type="string" calcext:value-type="string">
            <text:p>Benoît Prieur</text:p>
          </table:table-cell>
          <table:table-cell office:value-type="string" calcext:value-type="string">
            <text:p>NLP</text:p>
          </table:table-cell>
          <table:table-cell table:number-columns-repeated="3"/>
          <table:table-cell table:style-name="ce5" office:value-type="string" calcext:value-type="string">
            <text:p><text:a xlink:href="https://hal.science/hal-04610717v1" xlink:type="simple">https://hal.science/hal-04610717v1</text:a></text:p>
          </table:table-cell>
          <table:table-cell table:number-columns-repeated="3"/>
          <table:table-cell office:value-type="string" calcext:value-type="string">
            <text:p>Ouvrage disponible uniquement l'achat, le lien ne comporte que le résumé, qui présente deux bibliothèques python particulièrement utile pour le NLP.</text:p>
          </table:table-cell>
          <table:table-cell office:value-type="string" calcext:value-type="string">
            <text:p>SPACY et NLTK</text:p>
          </table:table-cell>
          <table:table-cell office:value-type="string" calcext:value-type="string">
            <text:p>NLP</text:p>
          </table:table-cell>
          <table:table-cell table:number-columns-repeated="16371"/>
        </table:table-row>
        <table:table-row table:style-name="ro2">
          <table:table-cell office:value-type="string" calcext:value-type="string">
            <text:p>Qu'est ce que le NLP ?</text:p>
          </table:table-cell>
          <table:table-cell office:value-type="string" calcext:value-type="string">
            <text:p>Cole Stryker et Jim Holdsworth</text:p>
          </table:table-cell>
          <table:table-cell office:value-type="string" calcext:value-type="string">
            <text:p>NLP</text:p>
          </table:table-cell>
          <table:table-cell table:number-columns-repeated="3"/>
          <table:table-cell table:style-name="ce5" office:value-type="string" calcext:value-type="string">
            <text:p><text:a xlink:href="https://www.ibm.com/fr-fr/think/topics/natural-language-processing" xlink:type="simple">https://www.ibm.com/fr-fr/think/topics/natural-language-processing</text:a></text:p>
          </table:table-cell>
          <table:table-cell table:number-columns-repeated="3"/>
          <table:table-cell office:value-type="string" calcext:value-type="string">
            <text:p>Article de IBM permettant de présenter et de comprendre les bases du NLP. </text:p>
          </table:table-cell>
          <table:table-cell table:number-columns-repeated="16373"/>
        </table:table-row>
        <table:table-row table:style-name="ro2">
          <table:table-cell office:value-type="string" calcext:value-type="string">
            <text:p>TRECVID 2024 : Evaluating video search, captionning and activity recognition</text:p>
          </table:table-cell>
          <table:table-cell office:value-type="string" calcext:value-type="string">
            <text:p>George Awad</text:p>
          </table:table-cell>
          <table:table-cell office:value-type="string" calcext:value-type="string">
            <text:p>Indexation</text:p>
          </table:table-cell>
          <table:table-cell table:number-columns-repeated="3"/>
          <table:table-cell table:style-name="ce5" office:value-type="string" calcext:value-type="string">
            <text:p><text:a xlink:href="https://trec.nist.gov/pubs/trec33/papers/Overview_avs_vtt_actev.pdf" xlink:type="simple">https://trec.nist.gov/pubs/trec33/papers/Overview_avs_vtt_actev.pdf</text:a></text:p>
          </table:table-cell>
          <table:table-cell table:number-columns-repeated="3"/>
          <table:table-cell table:style-name="ce4" office:value-type="string" calcext:value-type="string">
            <text:p><text:span text:style-name="T1">TRECVID est une publication annuelle de </text:span><text:span text:style-name="T2">Benchmark</text:span><text:span text:style-name="T3"> dans le domaine de l'application d'IA sur des vidéos et images pour leurs traitement.</text:span></text:p>
          </table:table-cell>
          <table:table-cell table:number-columns-repeated="16373"/>
        </table:table-row>
        <table:table-row table:style-name="ro7">
          <table:table-cell office:value-type="string" calcext:value-type="string">
            <text:p>Changing the Paradigm from Dynamic Queries to LLM-generated SQL Queries with Human Intervention</text:p>
          </table:table-cell>
          <table:table-cell office:value-type="string" calcext:value-type="string">
            <text:p>Ambre Assore, Hyeon Jeon, Sungbok Shin, Jean-Daniel Fekete</text:p>
          </table:table-cell>
          <table:table-cell office:value-type="string" calcext:value-type="string">
            <text:p>NLP</text:p>
          </table:table-cell>
          <table:table-cell table:number-columns-repeated="3"/>
          <table:table-cell table:style-name="ce5" office:value-type="string" calcext:value-type="string">
            <text:p><text:a xlink:href="https://hal.science/hal-05341025v1" xlink:type="simple">https://hal.science/hal-05341025v1</text:a></text:p>
          </table:table-cell>
          <table:table-cell table:number-columns-repeated="3"/>
          <table:table-cell office:value-type="string" calcext:value-type="string">
            <text:p>Article issus d'un Congrès, il présente l'utilisation possibl du LLM pour la génération automatisée de requête SQL sur une base de donnée médicale. </text:p>
          </table:table-cell>
          <table:table-cell table:number-columns-repeated="16373"/>
        </table:table-row>
        <table:table-row table:style-name="ro4">
          <table:table-cell table:style-name="ce6" office:value-type="string" calcext:value-type="string">
            <text:p>Think2SQL: Blueprinting Reward Density and Advantage Scaling for Effective Text-to-SQL Reasoning,</text:p>
          </table:table-cell>
          <table:table-cell office:value-type="string" calcext:value-type="string">
            <text:p>Simone Papicchio, Simone Rossi, Luca Cagliero, Paolo Papotti</text:p>
          </table:table-cell>
          <table:table-cell office:value-type="string" calcext:value-type="string">
            <text:p>NLP</text:p>
          </table:table-cell>
          <table:table-cell table:number-columns-repeated="3"/>
          <table:table-cell table:style-name="ce5" office:value-type="string" calcext:value-type="string">
            <text:p><text:a xlink:href="https://hal.science/hal-05523999v1" xlink:type="simple">https://hal.science/hal-05523999v1</text:a></text:p>
          </table:table-cell>
          <table:table-cell table:number-columns-repeated="3"/>
          <table:table-cell table:style-name="ce4" office:value-type="string" calcext:value-type="string">
            <text:p><text:span text:style-name="T1">Article présentant les améliorations possibles d'un pipeline classique de </text:span><text:span text:style-name="T2">text-to-SQL</text:span></text:p>
          </table:table-cell>
          <table:table-cell table:number-columns-repeated="16373"/>
        </table:table-row>
        <table:table-row table:style-name="ro1">
          <table:table-cell office:value-type="string" calcext:value-type="string">
            <text:p>Interroger vos bases en langage naturel</text:p>
          </table:table-cell>
          <table:table-cell/>
          <table:table-cell office:value-type="string" calcext:value-type="string">
            <text:p>NLP</text:p>
          </table:table-cell>
          <table:table-cell table:number-columns-repeated="3"/>
          <table:table-cell table:style-name="ce5" office:value-type="string" calcext:value-type="string">
            <text:p><text:a xlink:href="https://flowt.fr/blog/text-to-sql-ia-generative-interroger-bases-donnees-langage-naturel/" xlink:type="simple">https://flowt.fr/blog/text-to-sql-ia-generative-interroger-bases-donnees-langage-naturel/</text:a></text:p>
          </table:table-cell>
          <table:table-cell table:number-columns-repeated="3"/>
          <table:table-cell table:style-name="ce4" office:value-type="string" calcext:value-type="string">
            <text:p><text:span text:style-name="T1">Article web qui récapitule l'essentiel d'un pipeline </text:span><text:span text:style-name="T2">Text-to-SQL</text:span><text:span text:style-name="T3"> et qui présente des options de pipeline utilisable</text:span></text:p>
          </table:table-cell>
          <table:table-cell office:value-type="string" calcext:value-type="string">
            <text:p>VANA AI , LANGCHAIN SQL</text:p>
          </table:table-cell>
          <table:table-cell table:number-columns-repeated="16372"/>
        </table:table-row>
        <table:table-row table:style-name="ro7">
          <table:table-cell office:value-type="string" calcext:value-type="string">
            <text:p>Structural deep encoding for tabl question answering</text:p>
          </table:table-cell>
          <table:table-cell office:value-type="string" calcext:value-type="string">
            <text:p>Raphaël Mouraviee, Benjamin Piwowarski, Sylvain Lamprier</text:p>
          </table:table-cell>
          <table:table-cell office:value-type="string" calcext:value-type="string">
            <text:p>NLP</text:p>
          </table:table-cell>
          <table:table-cell table:number-columns-repeated="3"/>
          <table:table-cell table:style-name="ce5" office:value-type="string" calcext:value-type="string">
            <text:p><text:a xlink:href="https://hal.sorbonne-universite.fr/hal-05392142/file/2025.findings-acl.121.pdf" xlink:type="simple">https://hal.sorbonne-universite.fr/hal-05392142/file/2025.findings-acl.121.pdf</text:a></text:p>
          </table:table-cell>
          <table:table-cell table:number-columns-repeated="3"/>
          <table:table-cell table:style-name="ce4" office:value-type="string" calcext:value-type="string">
            <text:p><text:span text:style-name="T1">Article qui présente les fruits du projet TaBERT. Expose les difficultés et challenge à relever quant à l'application d'un NLP reposant sur des </text:span><text:span text:style-name="T2">transformers</text:span><text:span text:style-name="T3"> sur des données tabulaires. </text:span></text:p>
          </table:table-cell>
          <table:table-cell office:value-type="string" calcext:value-type="string">
            <text:p>BERT</text:p>
          </table:table-cell>
          <table:table-cell office:value-type="string" calcext:value-type="string">
            <text:p>Transformers</text:p>
          </table:table-cell>
          <table:table-cell table:number-columns-repeated="16371"/>
        </table:table-row>
        <table:table-row table:style-name="ro8">
          <table:table-cell office:value-type="string" calcext:value-type="string">
            <text:p>Logical and Physical Optimizations for SQL query execution over large language models</text:p>
          </table:table-cell>
          <table:table-cell office:value-type="string" calcext:value-type="string">
            <text:p>Dario Satriani, Enzo Veltri, Donatello Santoro, Sara Rosato, Simone Varriale, Paolo Papotti</text:p>
          </table:table-cell>
          <table:table-cell office:value-type="string" calcext:value-type="string">
            <text:p>NLP</text:p>
          </table:table-cell>
          <table:table-cell table:number-columns-repeated="3"/>
          <table:table-cell table:style-name="ce5" office:value-type="string" calcext:value-type="string">
            <text:p><text:a xlink:href="https://hal.science/hal-05034648v1" xlink:type="simple">https://hal.science/hal-05034648v1</text:a></text:p>
          </table:table-cell>
          <table:table-cell table:number-columns-repeated="3"/>
          <table:table-cell office:value-type="string" calcext:value-type="string">
            <text:p>Article qui propose une manière de fiabiliser les résultats obtenus par interrogation d'un LLM sur une base de donnée. Expose les difficultées repérée et des solutions à mettre en place afin de fiabiliser les résultats.</text:p>
          </table:table-cell>
          <table:table-cell office:value-type="string" calcext:value-type="string">
            <text:p>LLM, Galois </text:p>
          </table:table-cell>
          <table:table-cell table:number-columns-repeated="16372"/>
        </table:table-row>
        <table:table-row table:style-name="ro2">
          <table:table-cell office:value-type="string" calcext:value-type="string">
            <text:p>Comment générer du SQL à partir de texte avec les LLMs ? </text:p>
          </table:table-cell>
          <table:table-cell office:value-type="string" calcext:value-type="string">
            <text:p>Franck Scandolera</text:p>
          </table:table-cell>
          <table:table-cell office:value-type="string" calcext:value-type="string">
            <text:p>NLP</text:p>
          </table:table-cell>
          <table:table-cell table:number-columns-repeated="3"/>
          <table:table-cell table:style-name="ce5" office:value-type="string" calcext:value-type="string">
            <text:p><text:a xlink:href="https://elearning.formations-analytics.com/programmation/comment-generer-du-sql-a-partir-de-texte-avec-les-llms/" xlink:type="simple">https://elearning.formations-analytics.com/programmation/comment-generer-du-sql-a-partir-de-texte-avec-les-llms/</text:a></text:p>
          </table:table-cell>
          <table:table-cell table:number-columns-repeated="3"/>
          <table:table-cell table:style-name="ce4" office:value-type="string" calcext:value-type="string">
            <text:p><text:span text:style-name="T1">Article permettant de faire un point sur le </text:span><text:span text:style-name="T2">text-to-sql</text:span><text:span text:style-name="T3"> et de présenter différents outils et alternatives pour la génération de SQL à partir de requête en langage naturel via LLMs</text:span></text:p>
          </table:table-cell>
          <table:table-cell office:value-type="string" calcext:value-type="string">
            <text:p>LLM</text:p>
          </table:table-cell>
          <table:table-cell table:number-columns-repeated="16372"/>
        </table:table-row>
        <table:table-row table:style-name="ro3">
          <table:table-cell office:value-type="string" calcext:value-type="string">
            <text:p>Interroger la mémoire d'entreprise par l'IA : le RAG face aux archives orales. Enjeux et limites pour l'histoire appliquée</text:p>
          </table:table-cell>
          <table:table-cell office:value-type="string" calcext:value-type="string">
            <text:p>Bénédicte Tuza</text:p>
          </table:table-cell>
          <table:table-cell office:value-type="string" calcext:value-type="string">
            <text:p>Indexation </text:p>
          </table:table-cell>
          <table:table-cell table:number-columns-repeated="3"/>
          <table:table-cell table:style-name="ce5" office:value-type="string" calcext:value-type="string">
            <text:p><text:a xlink:href="https://dumas.ccsd.cnrs.fr/dumas-05390427v1/file/ENC-PSL_M2TNAH_TUZA_Bénédicte.pdf" xlink:type="simple">https://dumas.ccsd.cnrs.fr/dumas-05390427v1/file/ENC-PSL_M2TNAH_TUZA_B%C3%A9n%C3%A9dicte.pdf</text:a></text:p>
          </table:table-cell>
          <table:table-cell table:number-columns-repeated="3"/>
          <table:table-cell table:style-name="ce4" office:value-type="string" calcext:value-type="string">
            <text:p><text:span text:style-name="T1">Mémoire soutenu en 2025 par Bénédicte Tuza pour l'obtention de son diplôme Technologies Numériques Appliquées à l'Histoire. Il fait le tour sur l'utilisation possible du RAG dans les archives. Extrêmement intéressant pour comprendre comment un RAG fonctionne et les limites de cette technologies. Le RAG étant au centre de  l'indexation comme du </text:span><text:span text:style-name="T2">text-to-sql.</text:span></text:p>
          </table:table-cell>
          <table:table-cell table:number-columns-repeated="16373"/>
        </table:table-row>
        <table:table-row table:style-name="ro7">
          <table:table-cell table:style-name="ce4" office:value-type="string" calcext:value-type="string">
            <text:p><text:span text:style-name="T1">Battle of the Large Language Models : Dolly vs LLaMA vs Vicuna vs Guanaco vs Bard vs ChatGPT - A </text:span><text:span text:style-name="T2">text-too-SQL</text:span><text:span text:style-name="T3"> Parsing Comparaison</text:span></text:p>
          </table:table-cell>
          <table:table-cell office:value-type="string" calcext:value-type="string">
            <text:p>Shuo Sun, Yuchen Zhang, Jiahuan Yan, Yuze Gao, Donovan Ong, Bin Chen, Jian Su</text:p>
          </table:table-cell>
          <table:table-cell office:value-type="string" calcext:value-type="string">
            <text:p>NLP</text:p>
          </table:table-cell>
          <table:table-cell table:number-columns-repeated="3"/>
          <table:table-cell table:style-name="ce5" office:value-type="string" calcext:value-type="string">
            <text:p><text:a xlink:href="https://arxivv.org/abs/2310.10190" xlink:type="simple">https://arxivv.org/abs/2310.10190</text:a></text:p>
          </table:table-cell>
          <table:table-cell table:number-columns-repeated="3"/>
          <table:table-cell office:value-type="string" calcext:value-type="string">
            <text:p>Article de comparaison de différents LLMs en fonction de leurs capacité à générer une requête SQL valide et correspondant à une requête utilisateur formulée en Langage Naturel. </text:p>
          </table:table-cell>
          <table:table-cell office:value-type="string" calcext:value-type="string">
            <text:p>Dolly, LLaMA, Vicuna, Guanaco, Bard, ChatGPT</text:p>
          </table:table-cell>
          <table:table-cell table:number-columns-repeated="16372"/>
        </table:table-row>
        <table:table-row table:style-name="ro3">
          <table:table-cell table:style-name="ce7" office:value-type="string" calcext:value-type="string">
            <text:p>Cinéma &amp; IA : Incorporer une intelligence artificielle pour (ré)écrire l’histoire du cinéma ? Une exploration de méthodes et d’analyses possibles</text:p>
          </table:table-cell>
          <table:table-cell office:value-type="string" calcext:value-type="string">
            <text:p>Beatriz-Tadeo Fuica</text:p>
          </table:table-cell>
          <table:table-cell office:value-type="string" calcext:value-type="string">
            <text:p>Indexation </text:p>
          </table:table-cell>
          <table:table-cell table:number-columns-repeated="3"/>
          <table:table-cell table:style-name="ce5" office:value-type="string" calcext:value-type="string">
            <text:p><text:a xlink:href="https://inalelab.hypotheses.org/4192" xlink:type="simple">https://inalelab.hypotheses.org/4192</text:a></text:p>
          </table:table-cell>
          <table:table-cell table:number-columns-repeated="3"/>
          <table:table-cell office:value-type="string" calcext:value-type="string">
            <text:p>Article surtout utile pour sa large bibliographie vers d'autres projets, avancées et concepts dans l'application d'IA au monde des images animés.</text:p>
          </table:table-cell>
          <table:table-cell table:number-columns-repeated="16373"/>
        </table:table-row>
        <table:table-row table:style-name="ro2">
          <table:table-cell office:value-type="string" calcext:value-type="string">
            <text:p>SNOOP : moteurs de recherche d'objets visuels</text:p>
          </table:table-cell>
          <table:table-cell office:value-type="string" calcext:value-type="string">
            <text:p>INA</text:p>
          </table:table-cell>
          <table:table-cell office:value-type="string" calcext:value-type="string">
            <text:p>Indexation </text:p>
          </table:table-cell>
          <table:table-cell table:number-columns-repeated="3"/>
          <table:table-cell table:style-name="ce5" office:value-type="string" calcext:value-type="string">
            <text:p><text:a xlink:href="https://inalelab.hypotheses.org/642" xlink:type="simple">https://inalelab.hypotheses.org/642</text:a></text:p>
          </table:table-cell>
          <table:table-cell table:number-columns-repeated="3"/>
          <table:table-cell office:value-type="string" calcext:value-type="string">
            <text:p>Comme précédemment, cet article est assez peu bavard mais contient de la bibliographie pouvant être intéressant sur le projet SNOOP mis en place par l'INA. IA de reconnaissance d'objets. </text:p>
          </table:table-cell>
          <table:table-cell table:number-columns-repeated="16373"/>
        </table:table-row>
        <table:table-row table:style-name="ro2">
          <table:table-cell table:style-name="ce4" office:value-type="string" calcext:value-type="string">
            <text:p><text:span text:style-name="T1">Content Enhanced BERT-based </text:span><text:span text:style-name="T2">Text-to-SQL </text:span><text:span text:style-name="T3">Generation</text:span></text:p>
          </table:table-cell>
          <table:table-cell office:value-type="string" calcext:value-type="string">
            <text:p>Tong Guo, Huilin Gao</text:p>
          </table:table-cell>
          <table:table-cell office:value-type="string" calcext:value-type="string">
            <text:p>NLP</text:p>
          </table:table-cell>
          <table:table-cell table:number-columns-repeated="3"/>
          <table:table-cell table:style-name="ce5" office:value-type="string" calcext:value-type="string">
            <text:p><text:a xlink:href="https://arxiv.org/abs/1910.07179" xlink:type="simple">https://arxiv.org/abs/1910.07179 </text:a></text:p>
          </table:table-cell>
          <table:table-cell table:number-columns-repeated="3"/>
          <table:table-cell office:value-type="string" calcext:value-type="string">
            <text:p>Article d'approfondissement de la technologie BERT pour la génération de SQL à partir de texte. </text:p>
          </table:table-cell>
          <table:table-cell table:number-columns-repeated="16373"/>
        </table:table-row>
        <table:table-row table:style-name="ro7">
          <table:table-cell office:value-type="string" calcext:value-type="string">
            <text:p>Des usages archivistiques pour l'intelligence artificielle : le cas de l'automatisation de l'inventaire des archivesà la Chambre des Députés du Grand-Duché de Luxembourg</text:p>
          </table:table-cell>
          <table:table-cell office:value-type="string" calcext:value-type="string">
            <text:p>Sarah Marcq</text:p>
          </table:table-cell>
          <table:table-cell office:value-type="string" calcext:value-type="string">
            <text:p>Indexation </text:p>
          </table:table-cell>
          <table:table-cell table:number-columns-repeated="3"/>
          <table:table-cell table:style-name="ce5" office:value-type="string" calcext:value-type="string">
            <text:p><text:a xlink:href="https://dumas.ccsd.cnrs.fr/dumas-04765262" xlink:type="simple">https://dumas.ccsd.cnrs.fr/dumas-04765262</text:a></text:p>
          </table:table-cell>
          <table:table-cell table:number-columns-repeated="3"/>
          <table:table-cell office:value-type="string" calcext:value-type="string">
            <text:p>Mémoire soutenu en 2024 par Sarah Marcq pour l'obtention de son diplôme Technologie Numériques Appliquées à l'Histoire, il présente les méthodes de traitement mise en place pour l'automatisation du traitement des archives de la Chambre des Députés du Grand-Duché de Luxembourg. Très intéressant car elle s'appuie sur différentes technologies d'IA et balaye toute la richesse et complexité d'un tel projet. N'inclus pas de travail sur des vidéos.</text:p>
          </table:table-cell>
          <table:table-cell/>
          <table:table-cell office:value-type="string" calcext:value-type="string">
            <text:p>HTR, LLM, NEL,, NER, NLP, OCR, Embeddings, speech to tetx, token, topic modelling, RAG</text:p>
          </table:table-cell>
          <table:table-cell table:number-columns-repeated="16371"/>
        </table:table-row>
        <table:table-row table:style-name="ro2">
          <table:table-cell office:value-type="string" calcext:value-type="string">
            <text:p>Digital Humanities and Natural Language Processing : "Je t'aime... Moi non plus" </text:p>
          </table:table-cell>
          <table:table-cell office:value-type="string" calcext:value-type="string">
            <text:p>Thierry Poibeau, Pablo Ruiz</text:p>
          </table:table-cell>
          <table:table-cell office:value-type="string" calcext:value-type="string">
            <text:p>NLP</text:p>
          </table:table-cell>
          <table:table-cell table:number-columns-repeated="3"/>
          <table:table-cell table:style-name="ce5" office:value-type="string" calcext:value-type="string">
            <text:p><text:a xlink:href="https://hal.science/hal-02970302" xlink:type="simple">https://hal.science/hal-02970302</text:a></text:p>
          </table:table-cell>
          <table:table-cell table:number-columns-repeated="3"/>
          <table:table-cell table:style-name="ce4" office:value-type="string" calcext:value-type="string">
            <text:p><text:span text:style-name="T1">Article qui a pour objet de présenter différentes technologies NLP et la manière de les utiliser dans les Humanités Numériques, ou </text:span><text:span text:style-name="T2">Digital Humanities. </text:span><text:span text:style-name="T3">Part d'un constat d'une fiable utilisation de cette technologie et vise à la rendre plus "populaire' dans le monde des humanités numériques. </text:span></text:p>
          </table:table-cell>
          <table:table-cell/>
          <table:table-cell office:value-type="string" calcext:value-type="string">
            <text:p>NLP</text:p>
          </table:table-cell>
          <table:table-cell table:number-columns-repeated="16371"/>
        </table:table-row>
        <table:table-row table:style-name="ro2">
          <table:table-cell office:value-type="string" calcext:value-type="string">
            <text:p>Le traitement automatique des langues pour les sciences sociales. Quelques éléments de réflexion à partir d'expériences récentes</text:p>
          </table:table-cell>
          <table:table-cell office:value-type="string" calcext:value-type="string">
            <text:p>Thierry Poibeau </text:p>
          </table:table-cell>
          <table:table-cell office:value-type="string" calcext:value-type="string">
            <text:p>NLP</text:p>
          </table:table-cell>
          <table:table-cell table:number-columns-repeated="3"/>
          <table:table-cell table:style-name="ce5" office:value-type="string" calcext:value-type="string">
            <text:p><text:a xlink:href="https://shs.cairn.info/revue-reseaux-2014-6-page-25" xlink:type="simple">https://shs.cairn.info/revue-reseaux-2014-6-page-25</text:a></text:p>
          </table:table-cell>
          <table:table-cell table:number-columns-repeated="3"/>
          <table:table-cell office:value-type="string" calcext:value-type="string">
            <text:p>Article de 2014 qui propose des pistes de réflexions quant à l'évolution et l'utilisatioon du NLP </text:p>
          </table:table-cell>
          <table:table-cell table:number-columns-repeated="16373"/>
        </table:table-row>
        <table:table-row table:style-name="ro2">
          <table:table-cell office:value-type="string" calcext:value-type="string">
            <text:p>Object ddetection : combining YOLO and SAM2 for Enhanced Video Segmentation</text:p>
          </table:table-cell>
          <table:table-cell office:value-type="string" calcext:value-type="string">
            <text:p>Genet Gessessew</text:p>
          </table:table-cell>
          <table:table-cell office:value-type="string" calcext:value-type="string">
            <text:p>Indexation </text:p>
          </table:table-cell>
          <table:table-cell table:number-columns-repeated="3"/>
          <table:table-cell table:style-name="ce5" office:value-type="string" calcext:value-type="string">
            <text:p><text:a xlink:href="https://medium.com/@genet.gessessew/supercharging-object-detection-combining-yolo-and-sam2-for-enhanced-video-segmentation-3a8c5e603430" xlink:type="simple">https://medium.com/@genet.gessessew/supercharging-object-detection-combining-yolo-and-sam2-for-enhanced-video-segmentation-3a8c5e603430</text:a></text:p>
          </table:table-cell>
          <table:table-cell table:number-columns-repeated="3"/>
          <table:table-cell office:value-type="string" calcext:value-type="string">
            <text:p>Article WEB qui présent l'intérêt, et la réalisation technique, de combiner un modèle YOLO et SAM2 pour la segmentation de vidéos. </text:p>
          </table:table-cell>
          <table:table-cell table:number-columns-repeated="16373"/>
        </table:table-row>
        <table:table-row table:style-name="ro2">
          <table:table-cell office:value-type="string" calcext:value-type="string">
            <text:p>Qu'est ce que la recherche intelligente ?</text:p>
          </table:table-cell>
          <table:table-cell office:value-type="string" calcext:value-type="string">
            <text:p>IBM</text:p>
          </table:table-cell>
          <table:table-cell office:value-type="string" calcext:value-type="string">
            <text:p>NLP</text:p>
          </table:table-cell>
          <table:table-cell table:number-columns-repeated="3"/>
          <table:table-cell table:style-name="ce5" office:value-type="string" calcext:value-type="string">
            <text:p><text:a xlink:href="https://www.ibm.com/fr-fr/think/topics/intelligent-search" xlink:type="simple">https://www.ibm.com/fr-fr/think/topics/intelligent-search</text:a></text:p>
          </table:table-cell>
          <table:table-cell table:number-columns-repeated="3"/>
          <table:table-cell office:value-type="string" calcext:value-type="string">
            <text:p>Article WEB de IBM qui explique les bases de la recherche intelligente. C'est à dire un moteur de recherche qui repose sur le NLP et l'indexation de contenu à partir de bases de données afin de faciliter les recherches</text:p>
          </table:table-cell>
          <table:table-cell/>
          <table:table-cell office:value-type="string" calcext:value-type="string">
            <text:p>NLP </text:p>
          </table:table-cell>
          <table:table-cell table:number-columns-repeated="16371"/>
        </table:table-row>
        <table:table-row table:style-name="ro12">
          <table:table-cell office:value-type="string" calcext:value-type="string">
            <text:p>Review on Natural Language Processing Base on Different Techniques</text:p>
          </table:table-cell>
          <table:table-cell office:value-type="string" calcext:value-type="string">
            <text:p>Dastan Hussen Maulud, Siddeeq Y Ameen, Naaman Omar, Shakir Fattah Kak, Zryan Najat Rashid, Hajar Maseeh Yasin, Ibrahim Mahmood Ibrahim, Azar Abid Salih, Nareen O, M.Salim, Dindar Mikaeel Ahmed</text:p>
          </table:table-cell>
          <table:table-cell office:value-type="string" calcext:value-type="string">
            <text:p>NLP</text:p>
          </table:table-cell>
          <table:table-cell table:number-columns-repeated="3"/>
          <table:table-cell table:style-name="ce5" office:value-type="string" calcext:value-type="string">
            <text:p><text:a xlink:href="https://scispace.com/pdf/review-on-natural-language-processing-based-on-different-2qpw7nmbi4.pdf" xlink:type="simple">https://scispace.com/pdf/review-on-natural-language-processing-based-on-different-2qpw7nmbi4.pdf</text:a></text:p>
          </table:table-cell>
          <table:table-cell table:number-columns-repeated="3"/>
          <table:table-cell office:value-type="string" calcext:value-type="string">
            <text:p>Article qui met en comparaison différentes techniques d'application et d'entraïnement de différents NLP. La comparaison se fait le niveau de précision atteint par chaque méthdologies.</text:p>
          </table:table-cell>
          <table:table-cell/>
          <table:table-cell office:value-type="string" calcext:value-type="string">
            <text:p>NLP</text:p>
          </table:table-cell>
          <table:table-cell table:number-columns-repeated="16371"/>
        </table:table-row>
        <table:table-row table:style-name="ro3">
          <table:table-cell office:value-type="string" calcext:value-type="string">
            <text:p>SAM2 : Segment Anything in images and videos</text:p>
          </table:table-cell>
          <table:table-cell office:value-type="string" calcext:value-type="string">
            <text:p>Nikhila Ravi, Valentin Gabeur, Yuan-Ting Hu</text:p>
          </table:table-cell>
          <table:table-cell office:value-type="string" calcext:value-type="string">
            <text:p>Indexation </text:p>
          </table:table-cell>
          <table:table-cell table:number-columns-repeated="3"/>
          <table:table-cell table:style-name="ce5" office:value-type="string" calcext:value-type="string">
            <text:p><text:a xlink:href="https://arxiv.org/abs/2408.00714" xlink:type="simple">https://arxiv.org/abs/2408.00714</text:a></text:p>
          </table:table-cell>
          <table:table-cell table:number-columns-repeated="3"/>
          <table:table-cell office:value-type="string" calcext:value-type="string">
            <text:p>Article détaillé présentant l'outil SAM2. Permet d'en comprendre toute la complexité, les apports et limites de l'outil. </text:p>
          </table:table-cell>
          <table:table-cell office:value-type="string" calcext:value-type="string">
            <text:p>SAM2</text:p>
          </table:table-cell>
          <table:table-cell table:number-columns-repeated="16372"/>
        </table:table-row>
        <table:table-row table:style-name="ro3">
          <table:table-cell office:value-type="string" calcext:value-type="string">
            <text:p>Segment Anything for Video : A comprehensiv review of video object segmentation and tracking form Past to Future</text:p>
          </table:table-cell>
          <table:table-cell office:value-type="string" calcext:value-type="string">
            <text:p>Guoping Xu, Jayaram K. Udupa, Yajun Yu</text:p>
          </table:table-cell>
          <table:table-cell office:value-type="string" calcext:value-type="string">
            <text:p>Indexation </text:p>
          </table:table-cell>
          <table:table-cell table:number-columns-repeated="3"/>
          <table:table-cell table:style-name="ce5" office:value-type="string" calcext:value-type="string">
            <text:p><text:a xlink:href="https://arxiv.org/abs/2507.22792" xlink:type="simple">https://arxiv.org/abs/2507.22792</text:a></text:p>
          </table:table-cell>
          <table:table-cell table:number-columns-repeated="3"/>
          <table:table-cell office:value-type="string" calcext:value-type="string">
            <text:p>Examine l'application des technologies SAM et SAM2 et l'évolution qu'elle représennte dans le domaine. Permet aussi de comprendre comme SAM et SAM2 s'appliquent àà des films historiques et/ou des films créer pour le steaming.</text:p>
          </table:table-cell>
          <table:table-cell office:value-type="string" calcext:value-type="string">
            <text:p>SAM et SAM2</text:p>
          </table:table-cell>
          <table:table-cell table:number-columns-repeated="16372"/>
        </table:table-row>
        <table:table-row table:style-name="ro2">
          <table:table-cell office:value-type="string" calcext:value-type="string">
            <text:p>Watching historical films through AI : Reflections on Image Retrieval from heritage collection</text:p>
          </table:table-cell>
          <table:table-cell/>
          <table:table-cell office:value-type="string" calcext:value-type="string">
            <text:p>Indexation </text:p>
          </table:table-cell>
          <table:table-cell table:number-columns-repeated="3"/>
          <table:table-cell table:style-name="ce5" office:value-type="string" calcext:value-type="string">
            <text:p><text:a xlink:href="https://cinergie.unibo.it/article/view/13082" xlink:type="simple">https://cinergie.unibo.it/article/view/13082</text:a></text:p>
          </table:table-cell>
          <table:table-cell table:number-columns-repeated="3"/>
          <table:table-cell table:style-name="ce4" office:value-type="string" calcext:value-type="string">
            <text:p><text:span text:style-name="T1">Cet article vise à montrer comment l'IA peut être utilisé par les historiens du cinéma dans leurs travaux de recherches. Pour cela, l'article se concentre sur un état des lieux de l'IA appliqué aux vidéos et s'attarde sur différentes technologies comme SNOOP </text:span><text:span text:style-name="T2">(INA).</text:span></text:p>
          </table:table-cell>
          <table:table-cell office:value-type="string" calcext:value-type="string">
            <text:p>SNOOP</text:p>
          </table:table-cell>
          <table:table-cell table:number-columns-repeated="16372"/>
        </table:table-row>
        <table:table-row table:style-name="ro7">
          <table:table-cell office:value-type="string" calcext:value-type="string">
            <text:p>FairMOT : On the Fairness of Detection and Re-Identification in Multiple Object Tracking</text:p>
          </table:table-cell>
          <table:table-cell table:style-name="ce6" office:value-type="string" calcext:value-type="string">
            <text:p>Yifu Zhang, Chunyu Wang, Xinggang Wang, Wenjun Zeng, Wenyu Liu</text:p>
          </table:table-cell>
          <table:table-cell office:value-type="string" calcext:value-type="string">
            <text:p>Indexation </text:p>
          </table:table-cell>
          <table:table-cell table:number-columns-repeated="3"/>
          <table:table-cell table:style-name="ce5" office:value-type="string" calcext:value-type="string">
            <text:p><text:a xlink:href="https://arxiv.org/abs/2004.01888" xlink:type="simple">https://arxiv.org/abs/2004.01888</text:a></text:p>
          </table:table-cell>
          <table:table-cell table:number-columns-repeated="3"/>
          <table:table-cell table:style-name="ce4" office:value-type="string" calcext:value-type="string">
            <text:p><text:span text:style-name="T1">Article de présentation de l'outil FairMOT, les challenges qu'il relève, ces apports et limites. S'inscrit dans les MOTs, champs d'études pour le suivis, ou </text:span><text:span text:style-name="T2">tracking</text:span><text:span text:style-name="T3">, de différentes entités dans la même vidéos. </text:span></text:p>
          </table:table-cell>
          <table:table-cell table:number-columns-repeated="16373"/>
        </table:table-row>
        <table:table-row table:style-name="ro7">
          <table:table-cell table:style-name="ce7" office:value-type="string" calcext:value-type="string">
            <text:p>Seg2Track-SAM2: SAM2-based Multi-object Tracking and Segmentation</text:p>
          </table:table-cell>
          <table:table-cell table:style-name="ce4" office:value-type="string" calcext:value-type="string">
            <text:p>Diogo Mendonça, Tiago Barros, Cristiano Premebida, Urbano J. Nunes</text:p>
          </table:table-cell>
          <table:table-cell office:value-type="string" calcext:value-type="string">
            <text:p>Indexation </text:p>
          </table:table-cell>
          <table:table-cell table:number-columns-repeated="3"/>
          <table:table-cell table:style-name="ce5" office:value-type="string" calcext:value-type="string">
            <text:p><text:a xlink:href="https://arxiv.org/abs/2509.11772" xlink:type="simple">https://arxiv.org/abs/2509.11772</text:a></text:p>
          </table:table-cell>
          <table:table-cell table:number-columns-repeated="3"/>
          <table:table-cell table:style-name="ce4" office:value-type="string" calcext:value-type="string">
            <text:p><text:span text:style-name="T1">Présentation d'un </text:span><text:span text:style-name="T2">framework</text:span><text:span text:style-name="T3"> basé sur l'utilisation de deux librairies python afin de faire du suivis de cibles mutliples dans une vidéo et de fiabiliser ces résultats dans la durée.</text:span></text:p>
          </table:table-cell>
          <table:table-cell table:number-columns-repeated="16373"/>
        </table:table-row>
        <table:table-row table:style-name="ro8">
          <table:table-cell table:style-name="ce7" office:value-type="string" calcext:value-type="string">
            <text:p>Group Generalized Mean Pooling for Vision Transformer</text:p>
          </table:table-cell>
          <table:table-cell table:style-name="ce4" office:value-type="string" calcext:value-type="string">
            <text:p>Byungsoo Ko, Han-Gyu Kim, Byeongho Heo, Sangdoo Yun, Sanghyuk Chun, Geonmo Gu, Wonjae Kim</text:p>
          </table:table-cell>
          <table:table-cell office:value-type="string" calcext:value-type="string">
            <text:p>Indexation </text:p>
          </table:table-cell>
          <table:table-cell table:number-columns-repeated="3"/>
          <table:table-cell table:style-name="ce5" office:value-type="string" calcext:value-type="string">
            <text:p><text:a xlink:href="https://arxiv.org/abs/2212.04114" xlink:type="simple">https://arxiv.org/abs/2212.04114</text:a></text:p>
          </table:table-cell>
          <table:table-cell table:number-columns-repeated="3"/>
          <table:table-cell office:value-type="string" calcext:value-type="string">
            <text:p>Article de présentation du concept de GeM afin de fiabiliser la reconnaissance de l'architecture afin d'identifier un lieu. </text:p>
          </table:table-cell>
          <table:table-cell table:number-columns-repeated="16373"/>
        </table:table-row>
        <table:table-row table:style-name="ro7">
          <table:table-cell table:style-name="ce7" office:value-type="string" calcext:value-type="string">
            <text:p>PIGEON: Predicting Image Geolocations</text:p>
          </table:table-cell>
          <table:table-cell table:style-name="ce4" office:value-type="string" calcext:value-type="string">
            <text:p>Lukas Haas, Michal Skreta, Silas Alberti, Chelsea Finn</text:p>
          </table:table-cell>
          <table:table-cell office:value-type="string" calcext:value-type="string">
            <text:p>Indexation </text:p>
          </table:table-cell>
          <table:table-cell table:number-columns-repeated="3"/>
          <table:table-cell table:style-name="ce5" office:value-type="string" calcext:value-type="string">
            <text:p><text:a xlink:href="https://arxiv.org/abs/2307.05845" xlink:type="simple">https://arxiv.org/abs/2307.05845</text:a></text:p>
          </table:table-cell>
          <table:table-cell table:number-columns-repeated="3"/>
          <table:table-cell office:value-type="string" calcext:value-type="string">
            <text:p>Présentation d'un outil IA neuronal basé sur différentes technologies afin de pouvvoir estimer une position géographique. Entraîné sur les données de Géoguesseur, il utilise l'analyse de texte et d'image. </text:p>
          </table:table-cell>
          <table:table-cell office:value-type="string" calcext:value-type="string">
            <text:p>Transformers, OCR</text:p>
          </table:table-cell>
          <table:table-cell table:number-columns-repeated="16372"/>
        </table:table-row>
        <table:table-row table:style-name="ro1">
          <table:table-cell/>
          <table:table-cell table:style-name="ce6"/>
          <table:table-cell table:number-columns-repeated="4"/>
          <table:table-cell table:style-name="ce5"/>
          <table:table-cell table:number-columns-repeated="16377"/>
        </table:table-row>
        <table:table-row table:style-name="ro2">
          <table:table-cell office:value-type="string" calcext:value-type="string">
            <text:p>Europeana enrichies its data with the AAT</text:p>
          </table:table-cell>
          <table:table-cell table:number-columns-repeated="5"/>
          <table:table-cell table:style-name="ce5" office:value-type="string" calcext:value-type="string">
            <text:p><text:a xlink:href="https://pro.europeana.eu/page/europeana-aat" xlink:type="simple">https://pro.europeana.eu/page/europeana-aat</text:a></text:p>
          </table:table-cell>
          <table:table-cell table:number-columns-repeated="3"/>
          <table:table-cell office:value-type="string" calcext:value-type="string">
            <text:p>Présentation d'un projet mené par Europeana, plateforme européenne numérique, qui vise a concilier indexation automatique par IA et utilisation des Thésaurus notamment l'AAT du GETTY. </text:p>
          </table:table-cell>
          <table:table-cell table:number-columns-repeated="16373"/>
        </table:table-row>
        <table:table-row table:style-name="ro2">
          <table:table-cell office:value-type="string" calcext:value-type="string">
            <text:p>Préparer les archives pour l'ère de l'IA </text:p>
          </table:table-cell>
          <table:table-cell office:value-type="string" calcext:value-type="string">
            <text:p>Memoriav</text:p>
          </table:table-cell>
          <table:table-cell office:value-type="string" calcext:value-type="string">
            <text:p>Indexation </text:p>
          </table:table-cell>
          <table:table-cell table:number-columns-repeated="3"/>
          <table:table-cell table:style-name="ce5" office:value-type="string" calcext:value-type="string">
            <text:p><text:a xlink:href="https://memoriav.ch/fr/actualite/preparer-les-archives-pour-lere-de-lia" xlink:type="simple">https://memoriav.ch/fr/actualite/preparer-les-archives-pour-lere-de-lia</text:a></text:p>
          </table:table-cell>
          <table:table-cell table:number-columns-repeated="3"/>
          <table:table-cell table:style-name="ce4" office:value-type="string" calcext:value-type="string">
            <text:p><text:span text:style-name="T1">Article qui présente des recommandations publiées depuis début 2026 afin par </text:span><text:span text:style-name="T2">Archives &amp; Records Association</text:span><text:span text:style-name="T3"> afin d'aider les archivistes dans cette transition. Cet article reprend les grandes lignes et en souligne l'intérêt pour les archives audiovisuel. </text:span></text:p>
          </table:table-cell>
          <table:table-cell table:number-columns-repeated="16373"/>
        </table:table-row>
        <table:table-row table:style-name="ro7">
          <table:table-cell table:style-name="ce7" office:value-type="string" calcext:value-type="string">
            <text:p>BERT: Pre-training of Deep Bidirectional Transformers for Language Understanding</text:p>
          </table:table-cell>
          <table:table-cell office:value-type="string" calcext:value-type="string">
            <text:p>Jacob Devlin, Mig-Wei Chang, Kenton Lee, Kristina Toutanova</text:p>
          </table:table-cell>
          <table:table-cell office:value-type="string" calcext:value-type="string">
            <text:p>NLP</text:p>
          </table:table-cell>
          <table:table-cell table:number-columns-repeated="3"/>
          <table:table-cell table:style-name="ce5" office:value-type="string" calcext:value-type="string">
            <text:p><text:a xlink:href="https://arxiv.org/abs/1810.04805" xlink:type="simple">https://arxiv.org/abs/1810.04805 </text:a></text:p>
          </table:table-cell>
          <table:table-cell table:number-columns-repeated="3"/>
          <table:table-cell office:value-type="string" calcext:value-type="string">
            <text:p>Article de présentation du projet BERT et de ses avancées. il s'attarde surtout sur l'entraînement du modèle, le besoin et l'objectif final. </text:p>
          </table:table-cell>
          <table:table-cell table:number-columns-repeated="16373"/>
        </table:table-row>
        <table:table-row table:style-name="ro7">
          <table:table-cell table:style-name="ce7" office:value-type="string" calcext:value-type="string">
            <text:p>TaBERT: Pretraining for Joint Understanding of Textual and Tabular Data</text:p>
          </table:table-cell>
          <table:table-cell table:style-name="ce4" office:value-type="string" calcext:value-type="string">
            <text:p>Pengcheng Yin, Graham Neubig, Wen-tau Yih, Sebastian Riedel</text:p>
          </table:table-cell>
          <table:table-cell office:value-type="string" calcext:value-type="string">
            <text:p>NLP</text:p>
          </table:table-cell>
          <table:table-cell table:number-columns-repeated="3"/>
          <table:table-cell table:style-name="ce5" office:value-type="string" calcext:value-type="string">
            <text:p><text:a xlink:href="https://arxiv.org/abs/2005.08314" xlink:type="simple">https://arxiv.org/abs/2005.08314</text:a></text:p>
          </table:table-cell>
          <table:table-cell table:number-columns-repeated="3"/>
          <table:table-cell table:style-name="ce9" office:value-type="string" calcext:value-type="string">
            <text:p><text:span text:style-name="T4">Article qui présente une reprise et amélioration du projet BERT et des technologies mises en places pour se faire. Pousse le modèle BERT jusqu'à la compréhension de base de données </text:span><text:span text:style-name="T5">(tables/colonnes)</text:span><text:span text:style-name="T6">.</text:span></text:p>
          </table:table-cell>
          <table:table-cell table:number-columns-repeated="16373"/>
        </table:table-row>
        <table:table-row table:style-name="ro3">
          <table:table-cell office:value-type="string" calcext:value-type="string">
            <text:p>Saint George on a Bike</text:p>
          </table:table-cell>
          <table:table-cell/>
          <table:table-cell office:value-type="string" calcext:value-type="string">
            <text:p>Indexation</text:p>
          </table:table-cell>
          <table:table-cell table:number-columns-repeated="3"/>
          <table:table-cell table:style-name="ce5" office:value-type="string" calcext:value-type="string">
            <text:p><text:a xlink:href="https://www.digitaltreasures.eu/wp-content/uploads/2021/12/What-AI-can-bring-to-GLAM-Artem-Reshetnikov.pdf" xlink:type="simple">https://www.digitaltreasures.eu/wp-content/uploads/2021/12/What-AI-can-bring-to-GLAM-Artem-Reshetnikov.pdf</text:a></text:p>
          </table:table-cell>
          <table:table-cell table:number-columns-repeated="3"/>
          <table:table-cell table:style-name="ce4" office:value-type="string" calcext:value-type="string">
            <text:p><text:span text:style-name="T1">Article de présentation du projet IA </text:span><text:span text:style-name="T2">Saint George on a Bike.</text:span><text:span text:style-name="T3"> Ce souhaite permettre à l'IA de faire de l'indexation à l'aide de thésaurus. L'idée est de permettre à l'IA de s'adapter à son contexte historique, reconnaîtres des formes et des concepts à partir de ces dernières afin de lié ce concept au mots correspondant dans le Thésaurus</text:span></text:p>
          </table:table-cell>
          <table:table-cell table:number-columns-repeated="16373"/>
        </table:table-row>
        <table:table-row table:style-name="ro1">
          <table:table-cell table:style-name="ce4" office:value-type="string" calcext:value-type="string">
            <text:p><text:span text:style-name="T1">Google Cloud </text:span><text:span text:style-name="T2">Text-to-SQL</text:span><text:span text:style-name="T3"> for Gemini 2.5</text:span></text:p>
          </table:table-cell>
          <table:table-cell office:value-type="string" calcext:value-type="string">
            <text:p>Google</text:p>
          </table:table-cell>
          <table:table-cell office:value-type="string" calcext:value-type="string">
            <text:p>NLP</text:p>
          </table:table-cell>
          <table:table-cell table:number-columns-repeated="3"/>
          <table:table-cell table:style-name="ce5" office:value-type="string" calcext:value-type="string">
            <text:p><text:a xlink:href="https://cloud.google.com/blog/fr/products/bases-de-donnees/comment-obtenir-du-code-sql-de-qualite-avec-lia-decryptage-des-techniques-de-text-to-sql" xlink:type="simple">https://cloud.google.com/blog/fr/products/bases-de-donnees/comment-obtenir-du-code-sql-de-qualite-avec-lia-decryptage-des-techniques-de-text-to-sql</text:a></text:p>
          </table:table-cell>
          <table:table-cell table:number-columns-repeated="3"/>
          <table:table-cell table:style-name="ce4" office:value-type="string" calcext:value-type="string">
            <text:p><text:span text:style-name="T1">Google avec son IA Gémini à réussi à développer et intégré un pipeline </text:span><text:span text:style-name="T2">text-to-SQL</text:span><text:span text:style-name="T3"> afin de générer des requêtes SQL à la volée sur des bases SQL</text:span></text:p>
          </table:table-cell>
          <table:table-cell table:style-name="ce5"/>
          <table:table-cell table:number-columns-repeated="16372"/>
        </table:table-row>
        <table:table-row table:style-name="ro3">
          <table:table-cell office:value-type="string" calcext:value-type="string">
            <text:p>Animer une base de connaissance : des ontologies aux modèles d'IA génératives</text:p>
          </table:table-cell>
          <table:table-cell office:value-type="string" calcext:value-type="string">
            <text:p>Peter Stockinger</text:p>
          </table:table-cell>
          <table:table-cell office:value-type="string" calcext:value-type="string">
            <text:p>Indexation </text:p>
          </table:table-cell>
          <table:table-cell table:number-columns-repeated="3"/>
          <table:table-cell table:style-name="ce5" office:value-type="string" calcext:value-type="string">
            <text:p><text:a xlink:href="https://arxiv.org/pdf/2509.01304" xlink:type="simple">https://arxiv.org/pdf/2509.01304</text:a></text:p>
          </table:table-cell>
          <table:table-cell table:number-columns-repeated="3"/>
          <table:table-cell table:style-name="ce4" office:value-type="string" calcext:value-type="string">
            <text:p><text:span text:style-name="T1">Article qui explore différents environements mis en place par différentes structures pour utiliser l'IA à des fins d'assitances.à l'indexation. Il explore notamment l'environement </text:span><text:span text:style-name="T2">okapi</text:span><text:span text:style-name="T3"> de l'INA qui permet d'extraire des index, de suggérer des mots clés, des propriétés ou encore de localiser des découpage de vidéos tout en observant un Thésaurus. </text:span></text:p>
          </table:table-cell>
          <table:table-cell table:number-columns-repeated="16373"/>
        </table:table-row>
        <table:table-row table:style-name="ro2">
          <table:table-cell office:value-type="string" calcext:value-type="string">
            <text:p>L'intelligence artificielle pour la valorisation des archives télévisuelles </text:p>
          </table:table-cell>
          <table:table-cell office:value-type="string" calcext:value-type="string">
            <text:p>B.Bsir</text:p>
          </table:table-cell>
          <table:table-cell office:value-type="string" calcext:value-type="string">
            <text:p>Indexation </text:p>
          </table:table-cell>
          <table:table-cell table:number-columns-repeated="3"/>
          <table:table-cell table:style-name="ce5" office:value-type="string" calcext:value-type="string">
            <text:p><text:a xlink:href="https://revues.imist.ma/index.php/JIS/article/view/54261/29964" xlink:type="simple">https://revues.imist.ma/index.php/JIS/article/view/54261/29964</text:a></text:p>
          </table:table-cell>
          <table:table-cell table:number-columns-repeated="3"/>
          <table:table-cell office:value-type="string" calcext:value-type="string">
            <text:p>Article qui présente un projet de gestion de collections d'archives télévisées par IA. L'objectif est de permettre l'automatisation de la mise à jour des données des archives.</text:p>
          </table:table-cell>
          <table:table-cell table:number-columns-repeated="16373"/>
        </table:table-row>
        <table:table-row table:style-name="ro3">
          <table:table-cell office:value-type="string" calcext:value-type="string">
            <text:p>Real time application to identifiy facial emotion using CNN and OpenCV</text:p>
          </table:table-cell>
          <table:table-cell table:style-name="ce6" office:value-type="string" calcext:value-type="string">
            <text:p>Sahabdeen Aysha Asra, K.H. Ramanayaka</text:p>
          </table:table-cell>
          <table:table-cell office:value-type="string" calcext:value-type="string">
            <text:p>Indexation </text:p>
          </table:table-cell>
          <table:table-cell table:number-columns-repeated="3"/>
          <table:table-cell table:style-name="ce5" office:value-type="string" calcext:value-type="string">
            <text:p><text:a xlink:href="https://irjss.com/index.php/journal/article/view/26" xlink:type="simple">https://irjss.com/index.php/journal/article/view/26</text:a></text:p>
          </table:table-cell>
          <table:table-cell table:number-columns-repeated="3"/>
          <table:table-cell office:value-type="string" calcext:value-type="string">
            <text:p>Article de recherches qui se concentrent sur la reconnaissance des émotions. Peut être utile afin d'envisager l'indexation de scène selon des thématiques basées sur des émotions "scènes tristes", "scènes de joie" etc. </text:p>
          </table:table-cell>
          <table:table-cell table:number-columns-repeated="16373"/>
        </table:table-row>
        <table:table-row table:style-name="ro4">
          <table:table-cell office:value-type="string" calcext:value-type="string">
            <text:p>The evolving Role of AI in Simulation-based Audiovisual Analysis </text:p>
          </table:table-cell>
          <table:table-cell office:value-type="string" calcext:value-type="string">
            <text:p>Selina Hassan, <text:s/>Ayesha Ahmed, Faisal Wassim Ismael</text:p>
          </table:table-cell>
          <table:table-cell office:value-type="string" calcext:value-type="string">
            <text:p>Indexation </text:p>
          </table:table-cell>
          <table:table-cell table:number-columns-repeated="3"/>
          <table:table-cell table:style-name="ce5" office:value-type="string" calcext:value-type="string">
            <text:p><text:a xlink:href="https://pmc.ncbi.nlm.nih.gov/articles/PMC13091622/" xlink:type="simple">https://pmc.ncbi.nlm.nih.gov/articles/PMC13091622/</text:a></text:p>
          </table:table-cell>
          <table:table-cell table:number-columns-repeated="3"/>
          <table:table-cell office:value-type="string" calcext:value-type="string">
            <text:p>Article qui expose les limites de l'indexation par IA, notamment l'indexation totalement automatisée.</text:p>
          </table:table-cell>
          <table:table-cell table:number-columns-repeated="16373"/>
        </table:table-row>
        <table:table-row table:style-name="ro3">
          <table:table-cell office:value-type="string" calcext:value-type="string">
            <text:p>Projet OKAPI</text:p>
          </table:table-cell>
          <table:table-cell office:value-type="string" calcext:value-type="string">
            <text:p>Equipe de recherche de l'INA</text:p>
          </table:table-cell>
          <table:table-cell office:value-type="string" calcext:value-type="string">
            <text:p>Indexation</text:p>
          </table:table-cell>
          <table:table-cell table:number-columns-repeated="3"/>
          <table:table-cell table:style-name="ce5" office:value-type="string" calcext:value-type="string">
            <text:p><text:a xlink:href="https://www.ina.fr/institut-national-audiovisuel/equipe-recherche/projet-okapi" xlink:type="simple">https://www.ina.fr/institut-national-audiovisuel/equipe-recherche/projet-okapi</text:a></text:p>
          </table:table-cell>
          <table:table-cell table:number-columns-repeated="3"/>
          <table:table-cell office:value-type="string" calcext:value-type="string">
            <text:p>Article qui expose très rapidement ce qu'est le projet OKAPI de l'INA, sa portée et sa composition, et propose quelques liens vers des articles en lien avec ce projet. </text:p>
          </table:table-cell>
          <table:table-cell table:number-columns-repeated="16373"/>
        </table:table-row>
        <table:table-row table:style-name="ro4">
          <table:table-cell office:value-type="string" calcext:value-type="string">
            <text:p>Automatic Detection of Intro and Credits in Video using CLIP and Multihead Attention</text:p>
            <text:p/>
          </table:table-cell>
          <table:table-cell office:value-type="string" calcext:value-type="string">
            <text:p>Vasilii Korolkov, Andrey Yanchenko</text:p>
            <text:p/>
          </table:table-cell>
          <table:table-cell office:value-type="string" calcext:value-type="string">
            <text:p>Indexation</text:p>
          </table:table-cell>
          <table:table-cell table:number-columns-repeated="3"/>
          <table:table-cell table:style-name="ce5" office:value-type="string" calcext:value-type="string">
            <text:p><text:a xlink:href="https://arxiv.org/abs/2504.09738" xlink:type="simple">https://arxiv.org/abs/2504.09738</text:a></text:p>
          </table:table-cell>
          <table:table-cell table:number-columns-repeated="3"/>
          <table:table-cell table:style-name="ce4" office:value-type="string" calcext:value-type="string">
            <text:p><text:span text:style-name="T1">Article qui propose une nouvelle manière de reconnaître et isoler les génériques d'un films de manière automatique dans l'objectif de pouvoir en extraire toutes les métadonnées disponibles </text:span><text:span text:style-name="T2">(titre, réalisateurs, acteur, etc) </text:span></text:p>
          </table:table-cell>
          <table:table-cell table:number-columns-repeated="16373"/>
        </table:table-row>
        <table:table-row table:style-name="ro2">
          <table:table-cell office:value-type="string" calcext:value-type="string">
            <text:p>How to extract Metadata from Scannned document using OCR</text:p>
          </table:table-cell>
          <table:table-cell office:value-type="string" calcext:value-type="string">
            <text:p>Fast.io editorial Team</text:p>
          </table:table-cell>
          <table:table-cell office:value-type="string" calcext:value-type="string">
            <text:p>Indexation</text:p>
          </table:table-cell>
          <table:table-cell table:number-columns-repeated="3"/>
          <table:table-cell table:style-name="ce5" office:value-type="string" calcext:value-type="string">
            <text:p><text:a xlink:href="https://fast.io/resources/ocr-metadata-extraction-scanned-documents/" xlink:type="simple">https://fast.io/resources/ocr-metadata-extraction-scanned-documents/</text:a></text:p>
          </table:table-cell>
          <table:table-cell table:number-columns-repeated="3"/>
          <table:table-cell table:style-name="ce4" office:value-type="string" calcext:value-type="string">
            <text:p><text:span text:style-name="T1">Article présentant le </text:span><text:span text:style-name="T2">pipeline</text:span><text:span text:style-name="T3"> à mettre en place afinn d'extraire de la métadonnés depuis des documents numériques, comme des vidéos.</text:span></text:p>
          </table:table-cell>
          <table:table-cell office:value-type="string" calcext:value-type="string">
            <text:p>ExifTool, PDFPlumber, Apache Tika, </text:p>
          </table:table-cell>
          <table:table-cell office:value-type="string" calcext:value-type="string">
            <text:p>OCR</text:p>
          </table:table-cell>
          <table:table-cell table:number-columns-repeated="16371"/>
        </table:table-row>
        <table:table-row table:style-name="ro2">
          <table:table-cell office:value-type="string" calcext:value-type="string">
            <text:p>L'indexation automatique des archives audiovisuelles privées au prisme des Linked Open Data </text:p>
          </table:table-cell>
          <table:table-cell office:value-type="string" calcext:value-type="string">
            <text:p>Lénaïk Leyoudec</text:p>
          </table:table-cell>
          <table:table-cell office:value-type="string" calcext:value-type="string">
            <text:p>Indexation </text:p>
          </table:table-cell>
          <table:table-cell table:number-columns-repeated="3"/>
          <table:table-cell table:style-name="ce5" office:value-type="string" calcext:value-type="string">
            <text:p><text:a xlink:href="https://intelligibilite-numerique.numerev.com/numeros/n-1-2020/14-l-indexation-automatique-des-archives-audiovisuelles-privees-au-prisme-des-linked-open-data-analyse-semiotique-de-l-architexte-famille" xlink:type="simple">https://intelligibilite-numerique.numerev.com/numeros/n-1-2020/14-l-indexation-automatique-des-archives-audiovisuelles-privees-au-prisme-des-linked-open-data-analyse-semiotique-de-l-architexte-famille</text:a></text:p>
          </table:table-cell>
          <table:table-cell table:number-columns-repeated="3"/>
          <table:table-cell office:value-type="string" calcext:value-type="string">
            <text:p>Article scientifique qui envisage l'indexation automatique dans le cadre de la donnée liée, du web sémantique. L'idée est de mettre l'IA en relation avec des bases de données afin de passer de la transcription de donnnée bruts à une réelle indexation conceptuelle. </text:p>
          </table:table-cell>
          <table:table-cell table:number-columns-repeated="16373"/>
        </table:table-row>
        <table:table-row table:style-name="ro7">
          <table:table-cell office:value-type="string" calcext:value-type="string">
            <text:p>A Comprehensive Survey of Deep Learning for Image Captioning</text:p>
          </table:table-cell>
          <table:table-cell office:value-type="string" calcext:value-type="string">
            <text:p>MD Zakir Hossain, Ferdous Sohel, Mohd Fairuz, Shiratuddin, Hamid laga</text:p>
          </table:table-cell>
          <table:table-cell office:value-type="string" calcext:value-type="string">
            <text:p>Indexation</text:p>
          </table:table-cell>
          <table:table-cell table:number-columns-repeated="3"/>
          <table:table-cell table:style-name="ce5" office:value-type="string" calcext:value-type="string">
            <text:p><text:a xlink:href="https://dl.acm.org/doi/abs/10.1145/3295748?fbclid=IwAR0Yyw_nl2PpaX7ek78wCrh9TBHqa7ytSW5w_Fz4sv5-sx3jAHEYabCvt9c" xlink:type="simple">https://dl.acm.org/doi/abs/10.1145/3295748?fbclid=IwAR0Yyw_nl2PpaX7ek78wCrh9TBHqa7ytSW5w_Fz4sv5-sx3jAHEYabCvt9c</text:a></text:p>
          </table:table-cell>
          <table:table-cell table:number-columns-repeated="3"/>
          <table:table-cell table:style-name="ce4" office:value-type="string" calcext:value-type="string">
            <text:p><text:span text:style-name="T1">Article scientifique qui fait un état des lieux des techniques et technologies de Deep Learning utilisées aujourd'hui pour l'</text:span><text:span text:style-name="T2">image captionning </text:span><text:span text:style-name="T3">qui est la description automatisée d'image.  Chaque techniques et technologies est examinée pour comprendre son fonctionnement et but puis analysé pour souligner sa performance. Les techniques et technologie sont ensuite mis en comparaison afin d'avoir une vue d'ensemble.</text:span></text:p>
          </table:table-cell>
          <table:table-cell office:value-type="string" calcext:value-type="string">
            <text:p>BLIP-2</text:p>
          </table:table-cell>
          <table:table-cell table:number-columns-repeated="16372"/>
        </table:table-row>
        <table:table-row table:style-name="ro3">
          <table:table-cell office:value-type="string" calcext:value-type="string">
            <text:p>BLIP-2: Bootstrapping Language-Image Pre-training with Frozen Image Encoders and Large Language Models</text:p>
            <text:p/>
          </table:table-cell>
          <table:table-cell office:value-type="string" calcext:value-type="string">
            <text:p>Junnan Li, Dongxu Li, Silvio Savarese, Steven Hoi</text:p>
          </table:table-cell>
          <table:table-cell office:value-type="string" calcext:value-type="string">
            <text:p>Indexation </text:p>
          </table:table-cell>
          <table:table-cell table:number-columns-repeated="3"/>
          <table:table-cell table:style-name="ce5" office:value-type="string" calcext:value-type="string">
            <text:p><text:a xlink:href="https://arxiv.org/abs/2301.12597" xlink:type="simple">https://arxiv.org/abs/2301.12597</text:a></text:p>
          </table:table-cell>
          <table:table-cell table:number-columns-repeated="3"/>
          <table:table-cell table:style-name="ce4" office:value-type="string" calcext:value-type="string">
            <text:p><text:span text:style-name="T1">Article de présentation de l'outil BLIP-2 qui est un outil de pré entraînement d'IA pour l'analyse des vidéos et donc l''</text:span><text:span text:style-name="T2">image captionning.</text:span><text:span text:style-name="T3"> </text:span></text:p>
          </table:table-cell>
          <table:table-cell table:number-columns-repeated="16373"/>
        </table:table-row>
        <table:table-row table:style-name="ro2">
          <table:table-cell office:value-type="string" calcext:value-type="string">
            <text:p>Stratégie vidéo et IA : les 10 tendances qui vont marquer 2026</text:p>
          </table:table-cell>
          <table:table-cell office:value-type="string" calcext:value-type="string">
            <text:p>Etienne Caillebotte</text:p>
          </table:table-cell>
          <table:table-cell office:value-type="string" calcext:value-type="string">
            <text:p>Indexation</text:p>
          </table:table-cell>
          <table:table-cell table:number-columns-repeated="3"/>
          <table:table-cell table:style-name="ce5" office:value-type="string" calcext:value-type="string">
            <text:p><text:a xlink:href="https://www.blogdumoderateur.com/strategie-video-ia-10-tendances-marquer-2026/" xlink:type="simple">https://www.blogdumoderateur.com/strategie-video-ia-10-tendances-marquer-2026/</text:a></text:p>
          </table:table-cell>
          <table:table-cell table:number-columns-repeated="3"/>
          <table:table-cell office:value-type="string" calcext:value-type="string">
            <text:p>Article général qui présente les nouvelles technologies dans l'univers de l'analyses des images animés par IA prévue pour 2026. Très intéressant afin de faire un point sur les évolutions à venir et l'impact qu'elles peuvent avoir.</text:p>
          </table:table-cell>
          <table:table-cell/>
          <table:table-cell office:value-type="string" calcext:value-type="string">
            <text:p>AI slop, GEO et AEO, </text:p>
          </table:table-cell>
          <table:table-cell table:number-columns-repeated="16371"/>
        </table:table-row>
        <table:table-row table:style-name="ro8">
          <table:table-cell office:value-type="string" calcext:value-type="string">
            <text:p>A novel NLP-driven approach for enriching artefact descriptions, provenance, and entities in cultural heritage</text:p>
          </table:table-cell>
          <table:table-cell office:value-type="string" calcext:value-type="string">
            <text:p>Sara Ferro, Riccardo Giovanelli, Madison Leeson, Michela De Bernardin &amp; Arianna Traviglia</text:p>
          </table:table-cell>
          <table:table-cell office:value-type="string" calcext:value-type="string">
            <text:p>NLP</text:p>
          </table:table-cell>
          <table:table-cell table:number-columns-repeated="3"/>
          <table:table-cell table:style-name="ce5" office:value-type="string" calcext:value-type="string">
            <text:p><text:a xlink:href="https://link.springer.com/article/10.1007/s00521-025-11449-2" xlink:type="simple">https://link.springer.com/article/10.1007/s00521-025-11449-2</text:a></text:p>
          </table:table-cell>
          <table:table-cell table:number-columns-repeated="3"/>
          <table:table-cell office:value-type="string" calcext:value-type="string">
            <text:p>Article qui explique le projet RITHMS qui consistait à construire une base SQL structurée à partir de donnée textuelle brutes à l'aide de LLM et de NLP</text:p>
          </table:table-cell>
          <table:table-cell table:number-columns-repeated="16373"/>
        </table:table-row>
        <table:table-row table:style-name="ro5">
          <table:table-cell office:value-type="string" calcext:value-type="string">
            <text:p>LEAF-SQL: Level-wise Exploration with Adaptive Fine-graining for Text-to-SQL Skeleton Prediction</text:p>
          </table:table-cell>
          <table:table-cell office:value-type="string" calcext:value-type="string">
            <text:p>Zhao Tan, Xiping Liu, Qing Shu, Qizhi Wan, Dexi Liu, Changxuan Wan</text:p>
            <text:p/>
          </table:table-cell>
          <table:table-cell office:value-type="string" calcext:value-type="string">
            <text:p>NLP</text:p>
          </table:table-cell>
          <table:table-cell table:number-columns-repeated="3"/>
          <table:table-cell table:style-name="ce5" office:value-type="string" calcext:value-type="string">
            <text:p><text:a xlink:href="https://arxiv.org/abs/2605.09295" xlink:type="simple">https://arxiv.org/abs/2605.09295</text:a></text:p>
          </table:table-cell>
          <table:table-cell table:number-columns-repeated="3"/>
          <table:table-cell table:style-name="ce4" office:value-type="string" calcext:value-type="string">
            <text:p><text:span text:style-name="T1">Une des grandes difficultés du </text:span><text:span text:style-name="T2">text-to-sql </text:span><text:span text:style-name="T3">c'est la génération de requête complexe. Pour cela, des </text:span><text:span text:style-name="T2">pipelines</text:span><text:span text:style-name="T3"> mettent à disposition des squelettes de requêtes afin que le LLM puisse partir d'une base fiable. Cet article vise à proposer un </text:span><text:span text:style-name="T2">pipeline</text:span><text:span text:style-name="T3"> plus solie et fiable pour l'intégration et l'utilisation de ces requêtes squelettes.</text:span></text:p>
          </table:table-cell>
          <table:table-cell table:number-columns-repeated="16373"/>
        </table:table-row>
        <table:table-row table:style-name="ro6">
          <table:table-cell office:value-type="string" calcext:value-type="string">
            <text:p>FINER-SQL: Boosting Small Language Models for Text-to-SQL</text:p>
          </table:table-cell>
          <table:table-cell office:value-type="string" calcext:value-type="string">
            <text:p>Thanh Dat Hoang, Thanh Trung Huynh, Matthias Weidlich, Thanh Tam Nguyen, Tong Chen, Hongzhi Yin, Quoc Viet Hung Nguyen</text:p>
          </table:table-cell>
          <table:table-cell office:value-type="string" calcext:value-type="string">
            <text:p>NLP</text:p>
          </table:table-cell>
          <table:table-cell table:number-columns-repeated="3"/>
          <table:table-cell table:style-name="ce5" office:value-type="string" calcext:value-type="string">
            <text:p><text:a xlink:href="https://arxiv.org/abs/2605.03465" xlink:type="simple">https://arxiv.org/abs/2605.03465</text:a></text:p>
          </table:table-cell>
          <table:table-cell table:number-columns-repeated="3"/>
          <table:table-cell table:style-name="ce4" office:value-type="string" calcext:value-type="string">
            <text:p><text:span text:style-name="T1">Article scientifique qui proposer des solutions afin de pousser l'efficacité de petits moodèles de langues à leurs maximums sur du </text:span><text:span text:style-name="T2">text-to-sql</text:span><text:span text:style-name="T3">. L'idée générale est d'explorer des moyens de compenser le faible raisonement qu'offrent ces petits modèles de langues. Le moyen pensé est un framework de renforcement d'apprentissage de ces petits modèles en optimisant leurs capacités. </text:span><text:span text:style-name="T2">Ministral, LLAMA, GEMMA, GPT-4o Mini sont des petits modèles de langues ou SLMs en opposition à LLMs.</text:span></text:p>
          </table:table-cell>
          <table:table-cell table:number-columns-repeated="16373"/>
        </table:table-row>
        <table:table-row table:style-name="ro8">
          <table:table-cell office:value-type="string" calcext:value-type="string">
            <text:p>FlexSQL: Flexible Exploration and Execution Make Better Text-to-SQL Agents</text:p>
          </table:table-cell>
          <table:table-cell office:value-type="string" calcext:value-type="string">
            <text:p>Quang Hieu Pham, Yang He, Ping Nie, Canwen Xu, Davood Rafiei, Yuepeng Wang, Xi Ye, Jocelyn Qiaochu Chen</text:p>
          </table:table-cell>
          <table:table-cell office:value-type="string" calcext:value-type="string">
            <text:p>NLP</text:p>
          </table:table-cell>
          <table:table-cell table:number-columns-repeated="3"/>
          <table:table-cell table:style-name="ce5" office:value-type="string" calcext:value-type="string">
            <text:p><text:a xlink:href="https://arxiv.org/abs/2605.02815" xlink:type="simple">https://arxiv.org/abs/2605.02815</text:a></text:p>
          </table:table-cell>
          <table:table-cell table:number-columns-repeated="3"/>
          <table:table-cell table:style-name="ce4" office:value-type="string" calcext:value-type="string">
            <text:p><text:span text:style-name="T1">Cet article souligne que dans un pipeline </text:span><text:span text:style-name="T2">text-to-sql</text:span><text:span text:style-name="T3"> classique, l'interprétation de la base de donnée est faites en amont et parfois avec des erreurs de lectures et/ou de compréhension. Cela peut amener à fausser les requêtes générées. Ici , il est proposé un agent IA qui permettrait de fiabiliser la génératio de requête en créant un processus itératif d'analyse de la base SQL à différents moments afin de détecter de potentielles erreurs non détectées, etc. </text:span></text:p>
          </table:table-cell>
          <table:table-cell table:number-columns-repeated="16373"/>
        </table:table-row>
        <table:table-row table:style-name="ro5">
          <table:table-cell office:value-type="string" calcext:value-type="string">
            <text:p>SQLStructEval: Structural Evaluation of LLM Text-to-SQL Generation</text:p>
          </table:table-cell>
          <table:table-cell office:value-type="string" calcext:value-type="string">
            <text:p>Yixi Zhou, Fan Zhang, Zhiqiao Guo, Yu Chen, Haipeng Zhang, Preslav Nakov, Zhuohan Xie</text:p>
          </table:table-cell>
          <table:table-cell office:value-type="string" calcext:value-type="string">
            <text:p>NLP</text:p>
          </table:table-cell>
          <table:table-cell table:number-columns-repeated="3"/>
          <table:table-cell table:style-name="ce5" office:value-type="string" calcext:value-type="string">
            <text:p><text:a xlink:href="https://arxiv.org/abs/2604.06736" xlink:type="simple">https://arxiv.org/abs/2604.06736</text:a></text:p>
          </table:table-cell>
          <table:table-cell table:number-columns-repeated="3"/>
          <table:table-cell table:style-name="ce4" office:value-type="string" calcext:value-type="string">
            <text:p><text:span text:style-name="T1">Cet article se concentre sur le fait que les requêtes générées par LLM sont parfois syntaxiquement mauvaise et/ou soumises à de trop grande variations sur des changements minimes lors du requêtage en langage naturel. L'article précédent avait pour solution d'augmenter la fréquence d'analyser de la base SQL. Cet article propose une solution alternative. Un </text:span><text:span text:style-name="T2">framework </text:span><text:span text:style-name="T3">qui analyse le squelette des requêtes générées, les corriges et surtout les homogénéise en contrôlant plus les changements fait par le LLM sur des requêtes en langage naturel différentes. </text:span></text:p>
          </table:table-cell>
          <table:table-cell table:number-columns-repeated="16373"/>
        </table:table-row>
        <table:table-row table:style-name="ro13">
          <table:table-cell office:value-type="string" calcext:value-type="string">
            <text:p>Can AI Agents Answer Your Data Questions? A Benchmark for Data Agents</text:p>
          </table:table-cell>
          <table:table-cell office:value-type="string" calcext:value-type="string">
            <text:p>Ruiying Ma, Shreya Shankar, Ruiqi Chen, Yiming Lin, Sepanta Zeighami, Rajoshi Ghosh, Abhinav Gupta, Anushrut Gupta, Tanmai Gopal, Aditya G. Parameswaran</text:p>
          </table:table-cell>
          <table:table-cell office:value-type="string" calcext:value-type="string">
            <text:p>NLP</text:p>
          </table:table-cell>
          <table:table-cell table:number-columns-repeated="3"/>
          <table:table-cell table:style-name="ce5" office:value-type="string" calcext:value-type="string">
            <text:p><text:a xlink:href="https://arxiv.org/abs/2603.20576" xlink:type="simple">https://arxiv.org/abs/2603.20576</text:a></text:p>
          </table:table-cell>
          <table:table-cell table:number-columns-repeated="3"/>
          <table:table-cell table:style-name="ce4" office:value-type="string" calcext:value-type="string">
            <text:p><text:span text:style-name="T1">Article de réflexions sur la capacité des agent IA à faire du </text:span><text:span text:style-name="T2">text-to-SQL</text:span><text:span text:style-name="T3"> sur nos données et benchmark fait via un outil, </text:span><text:span text:style-name="T2">Data Agent Benchmark</text:span><text:span text:style-name="T3">,  sur 5 LLMs. </text:span></text:p>
          </table:table-cell>
          <table:table-cell table:number-columns-repeated="16373"/>
        </table:table-row>
        <table:table-row table:style-name="ro7">
          <table:table-cell office:value-type="string" calcext:value-type="string">
            <text:p>Draft-Refine-Optimize: Self-Evolved Learning for Natural Language to MongoDB Query Generation</text:p>
          </table:table-cell>
          <table:table-cell office:value-type="string" calcext:value-type="string">
            <text:p>Mingwei Ye, Jiaxi Zhuang, Mingjun Xu, Linfeng Zhang, Guolin Ke, Hengxing Cai</text:p>
          </table:table-cell>
          <table:table-cell office:value-type="string" calcext:value-type="string">
            <text:p>NLP-nosql</text:p>
          </table:table-cell>
          <table:table-cell table:number-columns-repeated="3"/>
          <table:table-cell table:style-name="ce5" office:value-type="string" calcext:value-type="string">
            <text:p><text:a xlink:href="https://arxiv.org/abs/2604.13045" xlink:type="simple">https://arxiv.org/abs/2604.13045</text:a></text:p>
          </table:table-cell>
          <table:table-cell table:number-columns-repeated="3"/>
          <table:table-cell table:style-name="ce4" office:value-type="string" calcext:value-type="string">
            <text:p><text:span text:style-name="T1">Cet article interroge la manière d'intégrer le </text:span><text:span text:style-name="T2">text-to-SQL </text:span><text:span text:style-name="T3">à des environements </text:span><text:span text:style-name="T2">No-SQL</text:span><text:span text:style-name="T3"> comme MongoDB. </text:span></text:p>
          </table:table-cell>
          <table:table-cell table:number-columns-repeated="16373"/>
        </table:table-row>
        <table:table-row table:style-name="ro8">
          <table:table-cell office:value-type="string" calcext:value-type="string">
            <text:p>Bridging the Gap: Enabling Natural Language Queries for NoSQL Databases through Text-to-NoSQL Translation</text:p>
          </table:table-cell>
          <table:table-cell office:value-type="string" calcext:value-type="string">
            <text:p>Jinwei Lu, Yuanfeng Song, Zhiqian Qin, Haodi Zhang, Chen Zhang, Raymond Chi-Wing Wong</text:p>
          </table:table-cell>
          <table:table-cell office:value-type="string" calcext:value-type="string">
            <text:p>NLP-nosql</text:p>
          </table:table-cell>
          <table:table-cell table:number-columns-repeated="3"/>
          <table:table-cell table:style-name="ce5" office:value-type="string" calcext:value-type="string">
            <text:p><text:a xlink:href="https://arxiv.org/html/2502.11201v1" xlink:type="simple">https://arxiv.org/html/2502.11201v1</text:a></text:p>
          </table:table-cell>
          <table:table-cell table:number-columns-repeated="3"/>
          <table:table-cell table:style-name="ce4" office:value-type="string" calcext:value-type="string">
            <text:p><text:span text:style-name="T1">Article qui propose d'appliquer et adapter le pipeline </text:span><text:span text:style-name="T2">text-to-sql</text:span><text:span text:style-name="T3"> à une base de donnée noSQL. Les outils restent les mêmes et le concept global également. Il présente un nouvel outil, SMART qui est conçu pour les conversionsdu langage naturel vers le nosql. Le pipeline proposé semble prendre en charge la convertion d'une base SQL en noSQL en amont du process, une étape supplémentaire qui n'existe pas dans le pipeline </text:span><text:span text:style-name="T2">text-to-sql</text:span><text:span text:style-name="T3"> de base. </text:span></text:p>
          </table:table-cell>
          <table:table-cell table:style-name="ce4" office:value-type="string" calcext:value-type="string">
            <text:p><text:span text:style-name="T1">TEND </text:span><text:span text:style-name="T2">(text-to-nosql-dataset)</text:span><text:span text:style-name="T3">, SLM, RAG, SMART</text:span></text:p>
          </table:table-cell>
          <table:table-cell table:number-columns-repeated="16372"/>
        </table:table-row>
        <table:table-row table:style-name="ro1">
          <table:table-cell office:value-type="string" calcext:value-type="string">
            <text:p>Text to NSQL </text:p>
          </table:table-cell>
          <table:table-cell office:value-type="string" calcext:value-type="string">
            <text:p>Query Loop</text:p>
          </table:table-cell>
          <table:table-cell office:value-type="string" calcext:value-type="string">
            <text:p>NLP</text:p>
          </table:table-cell>
          <table:table-cell table:number-columns-repeated="3"/>
          <table:table-cell table:style-name="ce5" office:value-type="string" calcext:value-type="string">
            <text:p><text:a xlink:href="https://docs.queryloop.ai/features/text-to-nosql/" xlink:type="simple">https://docs.queryloop.ai/features/text-to-nosql/</text:a></text:p>
          </table:table-cell>
          <table:table-cell table:number-columns-repeated="3"/>
          <table:table-cell table:style-name="ce4" office:value-type="string" calcext:value-type="string">
            <text:p><text:span text:style-name="T1">Article qui présente le pipeline déployé par l'outil QueryLoop afin de faire de la conversion </text:span><text:span text:style-name="T2">text-to-nosql. </text:span><text:span text:style-name="T3">Présente. également les outils utilisé.</text:span></text:p>
          </table:table-cell>
          <table:table-cell office:value-type="string" calcext:value-type="string">
            <text:p>GPT-4o-mini model, MongoDB</text:p>
          </table:table-cell>
          <table:table-cell table:number-columns-repeated="16372"/>
        </table:table-row>
        <table:table-row table:style-name="ro5">
          <table:table-cell office:value-type="string" calcext:value-type="string">
            <text:p>BERT Model-based Natural Language to NoSQL Query Conversion using Deep Learning Approach</text:p>
            <text:p/>
          </table:table-cell>
          <table:table-cell office:value-type="string" calcext:value-type="string">
            <text:p>Kazi Mojammel Hossen, Mohammed Nasir Uddin, Minhazul Arefin, Md Ashraf Uddin</text:p>
          </table:table-cell>
          <table:table-cell office:value-type="string" calcext:value-type="string">
            <text:p>NLP-nosql</text:p>
          </table:table-cell>
          <table:table-cell table:number-columns-repeated="3"/>
          <table:table-cell table:style-name="ce5" office:value-type="string" calcext:value-type="string">
            <text:p><text:a xlink:href="https://www.researchgate.net/publication/369057820_BERT_Model-based_Natural_Language_to_NoSQL_Query_Conversion_using_Deep_Learning_Approach" xlink:type="simple">https://www.researchgate.net/publication/369057820_BERT_Model-based_Natural_Language_to_NoSQL_Query_Conversion_using_Deep_Learning_Approach</text:a></text:p>
          </table:table-cell>
          <table:table-cell table:number-columns-repeated="3"/>
          <table:table-cell table:style-name="ce4" office:value-type="string" calcext:value-type="string">
            <text:p><text:span text:style-name="T1">Cet article propose de revisiter le </text:span><text:span text:style-name="T2">text-to-SQL</text:span><text:span text:style-name="T3"> afin de l'adapter aux bases NoSQL en partant de l'origine de ce pipeline : le modèle BERT. Le modèle BERT est repris et combiné à des réseaux de neuronnes profonds afin de pouvoir convertir des requêtes formulée en langage naturel en requête NoSQL. Article très détaillé sur le procédé mis en place et les résultats obtenus. </text:span></text:p>
          </table:table-cell>
          <table:table-cell table:number-columns-repeated="16373"/>
        </table:table-row>
        <table:table-row table:style-name="ro3">
          <table:table-cell office:value-type="string" calcext:value-type="string">
            <text:p>Natural language querying on NoSQL Databases : Opportunities and Challenges</text:p>
          </table:table-cell>
          <table:table-cell office:value-type="string" calcext:value-type="string">
            <text:p>Wenlong Zhang, Tian Shi, Ping Wang</text:p>
          </table:table-cell>
          <table:table-cell office:value-type="string" calcext:value-type="string">
            <text:p>NLP-nosql</text:p>
          </table:table-cell>
          <table:table-cell table:number-columns-repeated="3"/>
          <table:table-cell table:style-name="ce5" office:value-type="string" calcext:value-type="string">
            <text:p><text:a xlink:href="https://ieeexplore.ieee.org/document/10825998" xlink:type="simple">https://ieeexplore.ieee.org/document/10825998</text:a></text:p>
          </table:table-cell>
          <table:table-cell table:number-columns-repeated="3"/>
          <table:table-cell office:value-type="string" calcext:value-type="string">
            <text:p>Article de réflexion sur les défis et potentiels solutions quant à l'interrogation en langage naturel d'une base de donnée NoSQL. Très utiles pour explorer les piste d'avenirs.</text:p>
          </table:table-cell>
          <table:table-cell table:number-columns-repeated="16373"/>
        </table:table-row>
        <table:table-row table:style-name="ro4">
          <table:table-cell office:value-type="string" calcext:value-type="string">
            <text:p>The futur of database queries : evaluating text-to-SQL and text-to-noSQL with AI</text:p>
          </table:table-cell>
          <table:table-cell office:value-type="string" calcext:value-type="string">
            <text:p>Auzair - Medium</text:p>
          </table:table-cell>
          <table:table-cell office:value-type="string" calcext:value-type="string">
            <text:p>NLP-nosql</text:p>
          </table:table-cell>
          <table:table-cell table:number-columns-repeated="3"/>
          <table:table-cell table:style-name="ce5" office:value-type="string" calcext:value-type="string">
            <text:p><text:a xlink:href="https://medium.com/@auzair2011/the-future-of-database-queries-evaluating-text-to-sql-and-text-to-nosql-with-ai-bcb4e767cfee" xlink:type="simple">https://medium.com/@auzair2011/the-future-of-database-queries-evaluating-text-to-sql-and-text-to-nosql-with-ai-bcb4e767cfee</text:a></text:p>
          </table:table-cell>
          <table:table-cell table:number-columns-repeated="3"/>
          <table:table-cell table:style-name="ce4" office:value-type="string" calcext:value-type="string">
            <text:p><text:span text:style-name="T1">Article qui permet de comparer les deux approches, les deux pipelines, en expliquant leurs différences, et qui se focus sur l'application d'un piepline approprié à une base MongoDB. Il semblerait que le principal challenge soit dans la gestion des pipelines d'agrégations propre à MongoDB, en dehors de ça la structure reste identique ou presque. Fait aussi une remarque général : le </text:span><text:span text:style-name="T2">text-to-SQL</text:span><text:span text:style-name="T3"> est aujourd'hui mieux maitriser et développé que le </text:span><text:span text:style-name="T2">text-to-noSQL. </text:span><text:span text:style-name="T3">Ainsi, ce nouveau pipeline à tendance à être plus lent et moins précis à cause de son aspect expérimental et nouveau. </text:span></text:p>
          </table:table-cell>
          <table:table-cell table:number-columns-repeated="16373"/>
        </table:table-row>
        <table:table-row table:style-name="ro3">
          <table:table-cell office:value-type="string" calcext:value-type="string">
            <text:p>Natural language interface for NoSQL document-oriented database</text:p>
          </table:table-cell>
          <table:table-cell office:value-type="string" calcext:value-type="string">
            <text:p>?</text:p>
          </table:table-cell>
          <table:table-cell office:value-type="string" calcext:value-type="string">
            <text:p>NLP-nosql</text:p>
          </table:table-cell>
          <table:table-cell table:number-columns-repeated="3"/>
          <table:table-cell table:style-name="ce5" office:value-type="string" calcext:value-type="string">
            <text:p><text:a xlink:href="https://link.springer.com/chapter/10.1007/978-3-032-18857-1_45" xlink:type="simple">https://link.springer.com/chapter/10.1007/978-3-032-18857-1_45</text:a></text:p>
          </table:table-cell>
          <table:table-cell table:number-columns-repeated="3"/>
          <table:table-cell table:style-name="ce4" office:value-type="string" calcext:value-type="string">
            <text:p><text:span text:style-name="T1">Article qui nourris la réflexion autour de la création d'un pipeline </text:span><text:span text:style-name="T2">text-to-noSQL</text:span><text:span text:style-name="T3"> avec un focus sur les databse orientée documents en NoSQL </text:span><text:span text:style-name="T2">(MongoDB en est une)</text:span><text:span text:style-name="T3">. L'idée de l'article est de trouver des pistes afin de développer un IA capable de comprendre le NoSQL, ce qui n'est pas encore largement le cas, afin de comprendre ainsi ces bases de données. </text:span></text:p>
          </table:table-cell>
          <table:table-cell table:number-columns-repeated="16373"/>
        </table:table-row>
        <table:table-row table:style-name="ro6">
          <table:table-cell office:value-type="string" calcext:value-type="string">
            <text:p>Query intelligence : A natural language interface to SQL and NoSQL databases using AI</text:p>
          </table:table-cell>
          <table:table-cell office:value-type="string" calcext:value-type="string">
            <text:p>Suraj Kiran Chougale, Sanket Sarjerao More-Patil, Udaysinh Uttamrav Patil, Varad Shailesh Bhise, Mrs. Trupti H. Mulik</text:p>
          </table:table-cell>
          <table:table-cell office:value-type="string" calcext:value-type="string">
            <text:p>NLP-nosql</text:p>
          </table:table-cell>
          <table:table-cell table:number-columns-repeated="3"/>
          <table:table-cell table:style-name="ce5" office:value-type="string" calcext:value-type="string">
            <text:p><text:a xlink:href="https://www.irjmets.com/upload_newfiles/irjmets80500063449/paper_file/irjmets80500063449.pdf" xlink:type="simple">https://www.irjmets.com/upload_newfiles/irjmets80500063449/paper_file/irjmets80500063449.pdf</text:a></text:p>
          </table:table-cell>
          <table:table-cell table:number-columns-repeated="3"/>
          <table:table-cell table:style-name="ce4" office:value-type="string" calcext:value-type="string">
            <text:p><text:span text:style-name="T1">Article de réflexion et de proposition de solutions sur l'accès et l'interrogeabilité des bases de données par l'intelligence artificielle. L'article mène deux axes : le </text:span><text:span text:style-name="T2">text-to-sql</text:span><text:span text:style-name="T3"> avec l'application LangChain SQL et le </text:span><text:span text:style-name="T2">text-to-noSQL</text:span></text:p>
          </table:table-cell>
          <table:table-cell table:number-columns-repeated="16373"/>
        </table:table-row>
        <table:table-row table:style-name="ro3">
          <table:table-cell office:value-type="string" calcext:value-type="string">
            <text:p>Natural Language to NoSQL query conversion using deep learning</text:p>
          </table:table-cell>
          <table:table-cell office:value-type="string" calcext:value-type="string">
            <text:p>?</text:p>
          </table:table-cell>
          <table:table-cell office:value-type="string" calcext:value-type="string">
            <text:p>NLP-nosql</text:p>
          </table:table-cell>
          <table:table-cell table:number-columns-repeated="3"/>
          <table:table-cell table:style-name="ce5" office:value-type="string" calcext:value-type="string">
            <text:p><text:a xlink:href="https://papers.ssrn.com/sol3/papers.cfm?abstract_id=3436631" xlink:type="simple">https://papers.ssrn.com/sol3/papers.cfm?abstract_id=3436631</text:a></text:p>
          </table:table-cell>
          <table:table-cell table:number-columns-repeated="3"/>
          <table:table-cell office:value-type="string" calcext:value-type="string">
            <text:p>Article qui propose une réflexion sur la manière d'utiliser le deep learning et des réseaux de neuronnes profonds pour la traduction d'une requête en langage naturel en langage NoSQL. L'article va jusqu'à proposé un système d'utilisation de ces réseaux de neuronnes profonds qui ont déjà fait leurs preuves sur MongoDB. </text:p>
          </table:table-cell>
          <table:table-cell table:number-columns-repeated="16373"/>
        </table:table-row>
        <table:table-row table:style-name="ro2">
          <table:table-cell office:value-type="string" calcext:value-type="string">
            <text:p>Natural Language Processing with NoSQL</text:p>
          </table:table-cell>
          <table:table-cell office:value-type="string" calcext:value-type="string">
            <text:p>Meegle</text:p>
          </table:table-cell>
          <table:table-cell office:value-type="string" calcext:value-type="string">
            <text:p>NLP-nosql</text:p>
          </table:table-cell>
          <table:table-cell table:number-columns-repeated="3"/>
          <table:table-cell table:style-name="ce5" office:value-type="string" calcext:value-type="string">
            <text:p><text:a xlink:href="https://www.meegle.com/en_us/topics/nosql/natural-language-processing-with-nosql" xlink:type="simple">https://www.meegle.com/en_us/topics/nosql/natural-language-processing-with-nosql</text:a></text:p>
          </table:table-cell>
          <table:table-cell table:number-columns-repeated="3"/>
          <table:table-cell table:style-name="ce4" office:value-type="string" calcext:value-type="string">
            <text:p><text:span text:style-name="T1">Article qui explique comment appliquer du traitement NLP à une base de données NoSQL. Il présente les points d'attentions, quelques recommandations et tips, quelques exemples de process à mettre en place et différentes profondeurs de traitements </text:span><text:span text:style-name="T2">(basique/avancée)</text:span></text:p>
          </table:table-cell>
          <table:table-cell table:number-columns-repeated="16373"/>
        </table:table-row>
        <table:table-row table:style-name="ro1" table:number-rows-repeated="1048473">
          <table:table-cell table:number-columns-repeated="16384"/>
        </table:table-row>
        <table:table-row table:style-name="ro1">
          <table:table-cell table:number-columns-repeated="16384"/>
        </table:table-row>
      </table:table>
      <table:table table:name="NLP" table:style-name="ta4">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8" table:default-cell-style-name="ce1"/>
        <table:table-column table:style-name="co9" table:default-cell-style-name="ce1"/>
        <table:table-column table:style-name="co1" table:number-columns-repeated="2" table:default-cell-style-name="ce1"/>
        <table:table-column table:style-name="co1" table:number-columns-repeated="16375" table:default-cell-style-name="Default"/>
        <table:table-row table:style-name="ro1" table:number-rows-repeated="2">
          <table:table-cell table:number-columns-repeated="16384"/>
        </table:table-row>
        <table:table-row table:style-name="ro1">
          <table:table-cell table:style-name="ce3" office:value-type="string" calcext:value-type="string">
            <text:p>Titre</text:p>
          </table:table-cell>
          <table:table-cell table:style-name="ce2" office:value-type="string" calcext:value-type="string">
            <text:p>Auteur</text:p>
          </table:table-cell>
          <table:table-cell table:style-name="ce3" office:value-type="string" calcext:value-type="string">
            <text:p>Sujet</text:p>
          </table:table-cell>
          <table:table-cell table:style-name="ce3" office:value-type="string" calcext:value-type="string">
            <text:p>Lien</text:p>
          </table:table-cell>
          <table:table-cell table:style-name="ce3" office:value-type="string" calcext:value-type="string">
            <text:p>Résumé</text:p>
          </table:table-cell>
          <table:table-cell table:style-name="ce3" office:value-type="string" calcext:value-type="string">
            <text:p>Outils cités</text:p>
          </table:table-cell>
          <table:table-cell table:style-name="ce3" office:value-type="string" calcext:value-type="string">
            <text:p>Technologies citées</text:p>
          </table:table-cell>
          <table:table-cell table:number-columns-repeated="16377"/>
        </table:table-row>
        <table:table-row table:style-name="ro3">
          <table:table-cell office:value-type="string" calcext:value-type="string">
            <text:p>AI Meets Archives: The Future of Machine Learning in Cultural Heritage</text:p>
          </table:table-cell>
          <table:table-cell office:value-type="string" calcext:value-type="string">
            <text:p>Stacey Patton</text:p>
          </table:table-cell>
          <table:table-cell office:value-type="string" calcext:value-type="string">
            <text:p>NLP, HTR</text:p>
          </table:table-cell>
          <table:table-cell table:style-name="ce5" office:value-type="string" calcext:value-type="string">
            <text:p><text:a xlink:href="https://www.clir.org/2024/10/ai-meets-archives-the-future-of-machine-learning-in-cultural-heritage/" xlink:type="simple">https://www.clir.org/2024/10/ai-meets-archives-the-future-of-machine-learning-in-cultural-heritage/</text:a></text:p>
          </table:table-cell>
          <table:table-cell office:value-type="string" calcext:value-type="string">
            <text:p>Réflexion sur l'usage de l'IA dans le secteur GLAM</text:p>
          </table:table-cell>
          <table:table-cell/>
          <table:table-cell office:value-type="string" calcext:value-type="string">
            <text:p>NLP</text:p>
            <text:p>HTR</text:p>
            <text:p/>
          </table:table-cell>
          <table:table-cell table:number-columns-repeated="16377"/>
        </table:table-row>
        <table:table-row table:style-name="ro4">
          <table:table-cell office:value-type="string" calcext:value-type="string">
            <text:p>AI in Audiovisual Archives</text:p>
            <text:p/>
          </table:table-cell>
          <table:table-cell office:value-type="string" calcext:value-type="string">
            <text:p>Randi Cecchine</text:p>
          </table:table-cell>
          <table:table-cell office:value-type="string" calcext:value-type="string">
            <text:p>Indexation</text:p>
          </table:table-cell>
          <table:table-cell table:style-name="ce5" office:value-type="string" calcext:value-type="string">
            <text:p><text:a xlink:href="https://www.beeldengeluid.nl/en/research/blog/ai-audiovisual-archives" xlink:type="simple">https://www.beeldengeluid.nl/en/research/blog/ai-audiovisual-archives</text:a></text:p>
          </table:table-cell>
          <table:table-cell office:value-type="string" calcext:value-type="string">
            <text:p>Réflexion critique sur les projets existants et leurs limites : projet SEMIA, sound &amp; vision néerlandais</text:p>
            <text:p>Principe de layering d'outils IA. </text:p>
          </table:table-cell>
          <table:table-cell office:value-type="string" calcext:value-type="string">
            <text:p>INA segmenter </text:p>
            <text:p>PySceneDetect</text:p>
            <text:p>Azure video indexer</text:p>
            <text:p>Google reverse image search</text:p>
          </table:table-cell>
          <table:table-cell office:value-type="string" calcext:value-type="string">
            <text:p>ASR</text:p>
            <text:p>OCR</text:p>
          </table:table-cell>
          <table:table-cell table:number-columns-repeated="16377"/>
        </table:table-row>
        <table:table-row table:style-name="ro2">
          <table:table-cell office:value-type="string" calcext:value-type="string">
            <text:p>Bringing AI into the Audiovisual Archive</text:p>
          </table:table-cell>
          <table:table-cell office:value-type="string" calcext:value-type="string">
            <text:p>Randi Cecchine</text:p>
          </table:table-cell>
          <table:table-cell/>
          <table:table-cell table:style-name="ce5" office:value-type="string" calcext:value-type="string">
            <text:p><text:a xlink:href="https://www.beeldengeluid.nl/en/research/blog/bringing-ai-audiovisual-archive" xlink:type="simple">https://www.beeldengeluid.nl/en/research/blog/bringing-ai-audiovisual-archive</text:a></text:p>
          </table:table-cell>
          <table:table-cell office:value-type="string" calcext:value-type="string">
            <text:p>Analyse de projets utilisant l'IA pour leurs archives audiovisuelles : Vanderbilt University, AMPPD, and the Netherlands Institute for Sound &amp; Vision</text:p>
          </table:table-cell>
          <table:table-cell office:value-type="string" calcext:value-type="string">
            <text:p>Trint</text:p>
            <text:p>AWS NER</text:p>
          </table:table-cell>
          <table:table-cell table:number-columns-repeated="16378"/>
        </table:table-row>
        <table:table-row table:style-name="ro2">
          <table:table-cell office:value-type="string" calcext:value-type="string">
            <text:p>L'IA : quels défis pour les archives ?</text:p>
          </table:table-cell>
          <table:table-cell office:value-type="string" calcext:value-type="string">
            <text:p>Edouard Vasseur</text:p>
          </table:table-cell>
          <table:table-cell/>
          <table:table-cell table:style-name="ce5" office:value-type="string" calcext:value-type="string">
            <text:p><text:a xlink:href="https://shs.cairn.info/magazine-archimag-2025-hs81-page-8?lang=fr" xlink:type="simple">https://shs.cairn.info/magazine-archimag-2025-hs81-page-8?lang=fr</text:a></text:p>
          </table:table-cell>
          <table:table-cell office:value-type="string" calcext:value-type="string">
            <text:p>analyse de différents projets et des limites de l'usage de l'IA pour les archives. Les modèles entrainés en français sont moins performants. </text:p>
            <text:p>Projets cités : INA, interpares trust IA. </text:p>
          </table:table-cell>
          <table:table-cell table:number-columns-repeated="16379"/>
        </table:table-row>
        <table:table-row table:style-name="ro4">
          <table:table-cell office:value-type="string" calcext:value-type="string">
            <text:p>L'apprentissage automatique dans les archives :</text:p>
            <text:p>l'indexation en profondeur au service de l'accès aux</text:p>
            <text:p>archives</text:p>
          </table:table-cell>
          <table:table-cell office:value-type="string" calcext:value-type="string">
            <text:p>Jonas Arnold</text:p>
            <text:p>Martin Lüpold</text:p>
            <text:p>Lorenz Theilkäs</text:p>
            <text:p>Lambert Kansy</text:p>
          </table:table-cell>
          <table:table-cell office:value-type="string" calcext:value-type="string">
            <text:p>NLP/ indexation</text:p>
          </table:table-cell>
          <table:table-cell table:style-name="ce5" office:value-type="string" calcext:value-type="string">
            <text:p><text:a xlink:href="https://vsa-aas.ch/wp-content/uploads/2024/08/MachineLearning_im_Archiv_Whitepaper_2024-08-08_fr.pdf" xlink:type="simple">https://vsa-aas.ch/wp-content/uploads/2024/08/MachineLearning_im_Archiv_Whitepaper_2024-08-08_fr.pdf</text:a></text:p>
          </table:table-cell>
          <table:table-cell office:value-type="string" calcext:value-type="string">
            <text:p>cartographie l’ensemble des usages du ML dans les archives. </text:p>
            <text:p>Concept des métadonnées fluides : les métadonnées générées par ML évoluent en fonciton de l'évolution des algorithmes. </text:p>
            <text:p>projet mentionné : PBS learning media </text:p>
          </table:table-cell>
          <table:table-cell office:value-type="string" calcext:value-type="string">
            <text:p>Annif : outil d'indexation automatique </text:p>
            <text:p>Transkribus : HTR</text:p>
            <text:p>Vitrivr : recherche par images et par contenu</text:p>
          </table:table-cell>
          <table:table-cell office:value-type="string" calcext:value-type="string">
            <text:p>Query by example</text:p>
            <text:p/>
          </table:table-cell>
          <table:table-cell table:number-columns-repeated="16377"/>
        </table:table-row>
        <table:table-row table:style-name="ro2">
          <table:table-cell office:value-type="string" calcext:value-type="string">
            <text:p>AL/ML for Processing Imagebased Records in Archives</text:p>
          </table:table-cell>
          <table:table-cell office:value-type="string" calcext:value-type="string">
            <text:p>Interpares TrustAI</text:p>
          </table:table-cell>
          <table:table-cell office:value-type="string" calcext:value-type="string">
            <text:p>Indexation</text:p>
          </table:table-cell>
          <table:table-cell table:style-name="ce5" office:value-type="string" calcext:value-type="string">
            <text:p><text:a xlink:href="https://interparestrustai.org/assets/public/dissemination/AD_01_Module4_v_1_0_20240918.pdf" xlink:type="simple">https://interparestrustai.org/assets/public/dissemination/AD_01_Module4_v_1_0_20240918.pdf</text:a></text:p>
          </table:table-cell>
          <table:table-cell office:value-type="string" calcext:value-type="string">
            <text:p>Dossier à visée pédagogique sur l'IA pour les profesionnels des archives : apprendre à utiliser l'IA pour automatiser le traitement des archives iconograohiques + portée critique </text:p>
          </table:table-cell>
          <table:table-cell office:value-type="string" calcext:value-type="string">
            <text:p>Query by image content</text:p>
            <text:p>Archipanion </text:p>
          </table:table-cell>
          <table:table-cell table:number-columns-repeated="16378"/>
        </table:table-row>
        <table:table-row table:style-name="ro3">
          <table:table-cell office:value-type="string" calcext:value-type="string">
            <text:p>On Barriers to Archival Audio Processing </text:p>
          </table:table-cell>
          <table:table-cell office:value-type="string" calcext:value-type="string">
            <text:p>Peter Sullivan</text:p>
            <text:p>Muhammad Abdul-Mageed</text:p>
          </table:table-cell>
          <table:table-cell office:value-type="string" calcext:value-type="string">
            <text:p>Indexation </text:p>
          </table:table-cell>
          <table:table-cell table:style-name="ce5" office:value-type="string" calcext:value-type="string">
            <text:p><text:a xlink:href="https://arxiv.org/pdf/2507.08768" xlink:type="simple">https://arxiv.org/pdf/2507.08768 </text:a></text:p>
          </table:table-cell>
          <table:table-cell office:value-type="string" calcext:value-type="string">
            <text:p>Article publié dans le cadre du projet interpares trust AI sur le test dess outils d’identification de langue et reconnaissance de locuteurs sur des archives de l’UNESCO. </text:p>
            <text:p>La reconnaissance des langues fonctionne plutot bien, mais pas la reconnaissance d'une même voix dans le temps. </text:p>
          </table:table-cell>
          <table:table-cell office:value-type="string" calcext:value-type="string">
            <text:p>Whisper Large V3 (Open AI) identification de la langue</text:p>
            <text:p>Massively Multilingual Speech (meta)</text:p>
            <text:p>WeSpeaker ResNet34-LM : reconnaissance de locuteurs</text:p>
          </table:table-cell>
          <table:table-cell table:number-columns-repeated="16378"/>
        </table:table-row>
        <table:table-row table:style-name="ro3">
          <table:table-cell office:value-type="string" calcext:value-type="string">
            <text:p>Indexation iconographique et intelligence artificielle </text:p>
          </table:table-cell>
          <table:table-cell office:value-type="string" calcext:value-type="string">
            <text:p>Pierre Husson</text:p>
          </table:table-cell>
          <table:table-cell office:value-type="string" calcext:value-type="string">
            <text:p>Indexation </text:p>
          </table:table-cell>
          <table:table-cell table:style-name="ce5" office:value-type="string" calcext:value-type="string">
            <text:p><text:a xlink:href="https://dumas.ccsd.cnrs.fr/dumas-05387482v1/document" xlink:type="simple">https://dumas.ccsd.cnrs.fr/dumas-05387482v1/document</text:a></text:p>
          </table:table-cell>
          <table:table-cell office:value-type="string" calcext:value-type="string">
            <text:p>Expérimentation d’indexation automatique par IA sur collection RETIF (peintures italiennes). Une des conclusions = GPT4 est le meilleur outil pour l’indexation automatique par vocabulaire contrôlé</text:p>
            <text:p/>
          </table:table-cell>
          <table:table-cell table:number-columns-repeated="16379"/>
        </table:table-row>
        <table:table-row table:style-name="ro2">
          <table:table-cell office:value-type="string" calcext:value-type="string">
            <text:p>Comparative Analysis of Image, Video, and Audio</text:p>
            <text:p>Classifiers for Automated News Video Segmentation</text:p>
          </table:table-cell>
          <table:table-cell office:value-type="string" calcext:value-type="string">
            <text:p>Jonathan Attard</text:p>
            <text:p>Dylan Seychell</text:p>
          </table:table-cell>
          <table:table-cell/>
          <table:table-cell table:style-name="ce5" office:value-type="string" calcext:value-type="string">
            <text:p><text:a xlink:href="https://arxiv.org/pdf/2503.21848v1" xlink:type="simple">https://arxiv.org/pdf/2503.21848v1</text:a></text:p>
          </table:table-cell>
          <table:table-cell office:value-type="string" calcext:value-type="string">
            <text:p>Article qui compare différentes approches IA pour segmenter automatiquement les journaux télévisés. </text:p>
            <text:p>Objectif : diviser un flux vidéo en séquences logiques et étiquetées </text:p>
          </table:table-cell>
          <table:table-cell table:number-columns-repeated="16379"/>
        </table:table-row>
        <table:table-row table:style-name="ro5">
          <table:table-cell office:value-type="string" calcext:value-type="string">
            <text:p>ViViT: A Video Vision Transformer</text:p>
          </table:table-cell>
          <table:table-cell office:value-type="string" calcext:value-type="string">
            <text:p>Anurag Arnab Mostafa Dehghani Georg Heigold Chen Sun Mario Luciˇ Cordelia Schmid</text:p>
          </table:table-cell>
          <table:table-cell office:value-type="string" calcext:value-type="string">
            <text:p>Indexation </text:p>
          </table:table-cell>
          <table:table-cell table:style-name="ce5" office:value-type="string" calcext:value-type="string">
            <text:p><text:a xlink:href="https://arxiv.org/pdf/2103.15691" xlink:type="simple">https://arxiv.org/pdf/2103.15691</text:a></text:p>
          </table:table-cell>
          <table:table-cell office:value-type="string" calcext:value-type="string">
            <text:p>article qui présente ViViT: A Video Vision Transformer : une architecture basée sur les mécanismes d’auto attention pour l’analyse des vidéos. L'enjeu est de traiter la dimension temporelle de la vidéo et de gérer l'explosion du nombre de tokens (unités de données) générées par une séquences d’images. </text:p>
          </table:table-cell>
          <table:table-cell table:number-columns-repeated="16379"/>
        </table:table-row>
        <table:table-row table:style-name="ro3">
          <table:table-cell office:value-type="string" calcext:value-type="string">
            <text:p>Scene Separation &amp; Data Selection: Temporal Segmentation</text:p>
            <text:p>Algorithm for Real-Time Video Stream Analysis</text:p>
          </table:table-cell>
          <table:table-cell office:value-type="string" calcext:value-type="string">
            <text:p>Yuelin Xin</text:p>
            <text:p>Zihan Zhou</text:p>
            <text:p>and Yuxuan Xia</text:p>
          </table:table-cell>
          <table:table-cell office:value-type="string" calcext:value-type="string">
            <text:p>Indexation </text:p>
          </table:table-cell>
          <table:table-cell table:style-name="ce5" office:value-type="string" calcext:value-type="string">
            <text:p><text:a xlink:href="https://arxiv.org/pdf/2308.00210" xlink:type="simple">https://arxiv.org/pdf/2308.00210</text:a></text:p>
          </table:table-cell>
          <table:table-cell office:value-type="string" calcext:value-type="string">
            <text:p>Présentation de <text:s/>2SDS (Scene Separation and Data Selection), un algorithme qui analyse les vidéos dans leur dimension temporelle. (utilisé en complément d'un CNN). Il sépare une vidéo en scènes, et sélectionne une représentation pour chaque scène, pour qu'un CNN puisse mieux les interpréter. </text:p>
          </table:table-cell>
          <table:table-cell table:number-columns-repeated="16379"/>
        </table:table-row>
        <table:table-row table:style-name="ro3">
          <table:table-cell office:value-type="string" calcext:value-type="string">
            <text:p>TDSNet: A temporal difference based network for video semantic segmentation</text:p>
          </table:table-cell>
          <table:table-cell office:value-type="string" calcext:value-type="string">
            <text:p>Haochen Yuan</text:p>
            <text:p>Junjie Peng </text:p>
            <text:p>Zesu Cai </text:p>
          </table:table-cell>
          <table:table-cell office:value-type="string" calcext:value-type="string">
            <text:p>Indexation </text:p>
          </table:table-cell>
          <table:table-cell table:style-name="ce5" office:value-type="string" calcext:value-type="string">
            <text:p><text:a xlink:href="https://www.sciencedirect.com/science/article/abs/pii/S0020025524012490" xlink:type="simple">https://www.sciencedirect.com/science/article/abs/pii/S0020025524012490</text:a></text:p>
          </table:table-cell>
          <table:table-cell office:value-type="string" calcext:value-type="string">
            <text:p>Article qui présente TDSNet (Temporal Difference Segmentation Network), un modèle de segmentation sémantique de vidéos qui se base sur l'analyse de la différence entre les images. </text:p>
          </table:table-cell>
          <table:table-cell table:number-columns-repeated="16379"/>
        </table:table-row>
        <table:table-row table:style-name="ro3">
          <table:table-cell office:value-type="string" calcext:value-type="string">
            <text:p>Temporal video scene segmentation using deep-learning</text:p>
            <text:p/>
          </table:table-cell>
          <table:table-cell office:value-type="string" calcext:value-type="string">
            <text:p>Tiago Henrique Trojahn </text:p>
            <text:p>Rudinei Goularte </text:p>
          </table:table-cell>
          <table:table-cell office:value-type="string" calcext:value-type="string">
            <text:p>Indexation </text:p>
          </table:table-cell>
          <table:table-cell table:style-name="ce5" office:value-type="string" calcext:value-type="string">
            <text:p><text:a xlink:href="https://link.springer.com/article/10.1007/s11042-020-10450-2" xlink:type="simple">https://link.springer.com/article/10.1007/s11042-020-10450-2</text:a></text:p>
          </table:table-cell>
          <table:table-cell office:value-type="string" calcext:value-type="string">
            <text:p>Article qui traite de la segmentation temporelle de vidéos basée sur le deep learning multimodal combinant plusieurs types de données (audio et vidéo) et en combinant deux types de modèles : CNN pour les caractéristiques visuelles et RNN pour les caractéristiques temporelles. </text:p>
          </table:table-cell>
          <table:table-cell table:number-columns-repeated="16379"/>
        </table:table-row>
        <table:table-row table:style-name="ro3">
          <table:table-cell office:value-type="string" calcext:value-type="string">
            <text:p>Multimodal early fusion operators for temporal video scene segmentation tasks</text:p>
            <text:p/>
          </table:table-cell>
          <table:table-cell office:value-type="string" calcext:value-type="string">
            <text:p>Antonio A. R. Beserra </text:p>
            <text:p>Rudinei Goularte </text:p>
          </table:table-cell>
          <table:table-cell office:value-type="string" calcext:value-type="string">
            <text:p>Indexation </text:p>
          </table:table-cell>
          <table:table-cell table:style-name="ce5" office:value-type="string" calcext:value-type="string">
            <text:p><text:a xlink:href="https://link.springer.com/article/10.1007/s11042-023-14953-6?fromPaywallRec=true" xlink:type="simple">https://link.springer.com/article/10.1007/s11042-023-14953-6?fromPaywallRec=true</text:a></text:p>
          </table:table-cell>
          <table:table-cell office:value-type="string" calcext:value-type="string">
            <text:p>Article sur la segmentation temporelle de séquences vidéo (TVSS), qui propose de simplifier la fusion de données multimodales et proposant la fusion multimodale précoce. Ce type de fusion est effectué avant la segmentation</text:p>
          </table:table-cell>
          <table:table-cell table:number-columns-repeated="16379"/>
        </table:table-row>
        <table:table-row table:style-name="ro4">
          <table:table-cell office:value-type="string" calcext:value-type="string">
            <text:p>Automatic video scene segmentation</text:p>
            <text:p>based on spatial-temporal clues and</text:p>
            <text:p>rhythm</text:p>
          </table:table-cell>
          <table:table-cell office:value-type="string" calcext:value-type="string">
            <text:p>Walid Mahdi and Liming Chen</text:p>
            <text:p>Mohsen Ardebilian</text:p>
          </table:table-cell>
          <table:table-cell office:value-type="string" calcext:value-type="string">
            <text:p>Indexation </text:p>
          </table:table-cell>
          <table:table-cell table:style-name="ce5" office:value-type="string" calcext:value-type="string">
            <text:p><text:a xlink:href="https://arxiv.org/pdf/1412.4470" xlink:type="simple">https://arxiv.org/pdf/1412.4470</text:a></text:p>
          </table:table-cell>
          <table:table-cell office:value-type="string" calcext:value-type="string">
            <text:p>Article qui propose une méthode pour segmenter automatiquement des flux vidéo en différentes séquences fondée sur des indices spatio temporels (relations entre images), et le rythme des plans (durée des plans, montage). </text:p>
          </table:table-cell>
          <table:table-cell table:number-columns-repeated="16379"/>
        </table:table-row>
        <table:table-row table:style-name="ro6">
          <table:table-cell office:value-type="string" calcext:value-type="string">
            <text:p>Conversational AI-Enhanced Exploration System to Query Large-Scale Digitised</text:p>
            <text:p>Collections of Natural History Museums</text:p>
          </table:table-cell>
          <table:table-cell office:value-type="string" calcext:value-type="string">
            <text:p>YIYUAN WANG</text:p>
            <text:p>ANDREW JOHNSTON, </text:p>
            <text:p>ZOË SADOKIERSKI, </text:p>
            <text:p>RHIANNON STEPHENS,</text:p>
            <text:p>SHANE T. AHYONG, </text:p>
          </table:table-cell>
          <table:table-cell office:value-type="string" calcext:value-type="string">
            <text:p>NLP</text:p>
          </table:table-cell>
          <table:table-cell table:style-name="ce5" office:value-type="string" calcext:value-type="string">
            <text:p><text:a xlink:href="https://arxiv.org/pdf/2603.10285" xlink:type="simple">https://arxiv.org/pdf/2603.10285</text:a></text:p>
          </table:table-cell>
          <table:table-cell office:value-type="string" calcext:value-type="string">
            <text:p>Description du déploiement de l’IA pour interroger des spécimens en langage naturel, couplé à une carte interactive. Architecture technique qui peut être transposé aux archives audiovisuelles. </text:p>
          </table:table-cell>
          <table:table-cell table:style-name="ce5"/>
          <table:table-cell office:value-type="string" calcext:value-type="string">
            <text:p>Text to SQL </text:p>
            <text:p>Function calling </text:p>
          </table:table-cell>
          <table:table-cell table:number-columns-repeated="16377"/>
        </table:table-row>
        <table:table-row table:style-name="ro2">
          <table:table-cell office:value-type="string" calcext:value-type="string">
            <text:p>Annif : indexation automatique à al bibliothèque nationale de finlande</text:p>
          </table:table-cell>
          <table:table-cell office:value-type="string" calcext:value-type="string">
            <text:p>Osma Suominen</text:p>
          </table:table-cell>
          <table:table-cell office:value-type="string" calcext:value-type="string">
            <text:p>Indexation </text:p>
          </table:table-cell>
          <table:table-cell table:style-name="ce5" office:value-type="string" calcext:value-type="string">
            <text:p><text:a xlink:href="https://publications-prairial.fr/arabesques/index.php?id=605" xlink:type="simple">https://publications-prairial.fr/arabesques/index.php?id=605</text:a></text:p>
          </table:table-cell>
          <table:table-cell table:style-name="ce8" office:value-type="string" calcext:value-type="string">
            <text:p>Article du créateur de Annif : outil d’indexation automatique opensource qui prend un document textuel en entrée et retourne une liste de mots clés issus de vocabulaires controlés. Dispo sur github et exposé via une API REST.</text:p>
          </table:table-cell>
          <table:table-cell table:number-columns-repeated="16379"/>
        </table:table-row>
        <table:table-row table:style-name="ro4">
          <table:table-cell office:value-type="string" calcext:value-type="string">
            <text:p>LLaVA-Video: Video Instruction Tuning With Synthetic Data</text:p>
          </table:table-cell>
          <table:table-cell/>
          <table:table-cell office:value-type="string" calcext:value-type="string">
            <text:p>Indexation </text:p>
          </table:table-cell>
          <table:table-cell table:style-name="ce5" office:value-type="string" calcext:value-type="string">
            <text:p><text:a xlink:href="https://arxiv.org/pdf/2410.02713" xlink:type="simple">https://arxiv.org/pdf/2410.02713</text:a></text:p>
          </table:table-cell>
          <table:table-cell table:style-name="ce8" office:value-type="string" calcext:value-type="string">
            <text:p>Mise à disposition du jeu de données  LLaVA-Video-178K et de son LLM LLaVA-Video. Le jeu de données contient 3 types de contenus : descriptions, questions-réponses, questions à choix multiples. </text:p>
            <text:p>présentation de LLava-video slowfast : méthode qui induit plus de frames et moins de token, mieux répartis. </text:p>
            <text:p>Architecture unifiée image et vidéo </text:p>
          </table:table-cell>
          <table:table-cell table:number-columns-repeated="2"/>
          <table:table-cell office:value-type="string" calcext:value-type="string">
            <text:p>Language bind</text:p>
          </table:table-cell>
          <table:table-cell table:number-columns-repeated="16376"/>
        </table:table-row>
        <table:table-row table:style-name="ro7">
          <table:table-cell office:value-type="string" calcext:value-type="string">
            <text:p>Case study: AI in screen archives</text:p>
          </table:table-cell>
          <table:table-cell/>
          <table:table-cell office:value-type="string" calcext:value-type="string">
            <text:p>Indexation </text:p>
          </table:table-cell>
          <table:table-cell table:style-name="ce5" office:value-type="string" calcext:value-type="string">
            <text:p><text:a xlink:href="https://www.bfi.org.uk/industry-data-insights/reports/ai-screen-sector-perspectives-paths-forward" xlink:type="simple">https://www.bfi.org.uk/industry-data-insights/reports/ai-screen-sector-perspectives-paths-forward</text:a></text:p>
          </table:table-cell>
          <table:table-cell table:style-name="ce8" office:value-type="string" calcext:value-type="string">
            <text:p>The BFI national archive (p.22) : experimentations avec le speech-to-text, NER, description et compréhension vidéo. </text:p>
          </table:table-cell>
          <table:table-cell/>
          <table:table-cell office:value-type="string" calcext:value-type="string">
            <text:p>EntityFishing</text:p>
            <text:p>Refined</text:p>
            <text:p>Qwen2-VL </text:p>
            <text:p>LLaVA-Video</text:p>
            <text:p>Whisper</text:p>
          </table:table-cell>
          <table:table-cell/>
          <table:table-cell table:style-name="ce5" office:value-type="string" calcext:value-type="string">
            <text:p><text:a xlink:href="https://arxiv.org/abs/2409.12191" xlink:type="simple">https://arxiv.org/abs/2409.12191</text:a></text:p>
          </table:table-cell>
          <table:table-cell table:number-columns-repeated="16375"/>
        </table:table-row>
        <table:table-row table:style-name="ro8">
          <table:table-cell office:value-type="string" calcext:value-type="string">
            <text:p>Content-Based Video Retrieval in Historical</text:p>
            <text:p>Collections of the German Broadcasting Archive</text:p>
          </table:table-cell>
          <table:table-cell office:value-type="string" calcext:value-type="string">
            <text:p>Markus Mühling</text:p>
            <text:p>Manja Meister</text:p>
            <text:p>Nikolaus Korfhage</text:p>
            <text:p>Jörg Wehling</text:p>
            <text:p>Angelika Hörth</text:p>
            <text:p>Ralph Ewerth</text:p>
            <text:p>Bernd Freisleben</text:p>
          </table:table-cell>
          <table:table-cell office:value-type="string" calcext:value-type="string">
            <text:p>Indexation </text:p>
          </table:table-cell>
          <table:table-cell table:style-name="ce5" office:value-type="string" calcext:value-type="string">
            <text:p><text:a xlink:href="https://arxiv.org/pdf/1702.03790" xlink:type="simple">https://arxiv.org/pdf/1702.03790</text:a></text:p>
          </table:table-cell>
          <table:table-cell table:style-name="ce8" office:value-type="string" calcext:value-type="string">
            <text:p> Description en détail d’un système de retrieval vidéo déployé sur 2500 heures d’archives télévisuelles de la RDA à l'aide d'un CNN multi label fine tuné sur googlenet. </text:p>
            <text:p>Le modèle est construit sur une étude des requêtes utilisateurs : ce qu'ils cherchent, ce qu'ils ne trouvent pas...</text:p>
          </table:table-cell>
          <table:table-cell/>
          <table:table-cell office:value-type="string" calcext:value-type="string">
            <text:p>CNN</text:p>
            <text:p>Googlenet</text:p>
            <text:p>Tesseract</text:p>
          </table:table-cell>
          <table:table-cell office:value-type="string" calcext:value-type="string">
            <text:p>OCR</text:p>
            <text:p>semantic hashing</text:p>
            <text:p>algorithme MSER</text:p>
            <text:p/>
          </table:table-cell>
          <table:table-cell table:number-columns-repeated="16376"/>
        </table:table-row>
        <table:table-row table:style-name="ro3">
          <table:table-cell office:value-type="string" calcext:value-type="string">
            <text:p/>
            <text:p>Crosspoint and Amplify will manage the automatic metadata of the RTVE Archive using AI</text:p>
          </table:table-cell>
          <table:table-cell/>
          <table:table-cell office:value-type="string" calcext:value-type="string">
            <text:p>Indexation </text:p>
          </table:table-cell>
          <table:table-cell table:style-name="ce5" office:value-type="string" calcext:value-type="string">
            <text:p><text:a xlink:href="https://www.panoramaaudiovisual.com/en/2025/09/04/crosspoint-and-amplify-will-manage-the-automatic-metadata-of-the-rtve-archive-using-ai/" xlink:type="simple">https://www.panoramaaudiovisual.com/en/2025/09/04/crosspoint-and-amplify-will-manage-the-automatic-metadata-of-the-rtve-archive-using-ai/</text:a></text:p>
          </table:table-cell>
          <table:table-cell table:style-name="ce8" office:value-type="string" calcext:value-type="string">
            <text:p>Projet de la RTVE d'utiliser Crosspoint (basé sur Amplify), pour indexer automatiquement les archives audiovisuelles : transcription d'audio, NER, extraction de mots clés, classification automatique, production de résumés, segmentation sémantique. </text:p>
          </table:table-cell>
          <table:table-cell/>
          <table:table-cell office:value-type="string" calcext:value-type="string">
            <text:p>Crosspoint</text:p>
            <text:p>Amplify Seiri</text:p>
            <text:p>Memnon</text:p>
          </table:table-cell>
          <table:table-cell office:value-type="string" calcext:value-type="string">
            <text:p>OCR</text:p>
            <text:p>NER</text:p>
            <text:p/>
          </table:table-cell>
          <table:table-cell table:number-columns-repeated="16376"/>
        </table:table-row>
        <table:table-row table:style-name="ro9">
          <table:table-cell office:value-type="string" calcext:value-type="string">
            <text:p>AI-driven Metadata Extraction and Semantic Search for Audiovisual Archives</text:p>
            <text:p/>
          </table:table-cell>
          <table:table-cell office:value-type="string" calcext:value-type="string">
            <text:p>André Rattinger </text:p>
            <text:p>Giacomo AlliataKirell </text:p>
            <text:p>BenziSarah Kenderdine</text:p>
          </table:table-cell>
          <table:table-cell office:value-type="string" calcext:value-type="string">
            <text:p>Indexation</text:p>
          </table:table-cell>
          <table:table-cell table:style-name="ce5" office:value-type="string" calcext:value-type="string">
            <text:p><text:a xlink:href="https://library.imaging.org/archiving/articles/22/1/21" xlink:type="simple">https://library.imaging.org/archiving/articles/22/1/21 </text:a></text:p>
          </table:table-cell>
          <table:table-cell table:style-name="ce8" office:value-type="string" calcext:value-type="string">
            <text:p>Description du système archivevault et de la méthodologie utilisée pour extraire automatiquement des métadonnées depuis des archives audiovisuelles. </text:p>
            <text:p>Notamment utilisé par les archives de la RTS.  </text:p>
          </table:table-cell>
          <table:table-cell/>
          <table:table-cell office:value-type="string" calcext:value-type="string">
            <text:p>ArchiveVault</text:p>
          </table:table-cell>
          <table:table-cell office:value-type="string" calcext:value-type="string">
            <text:p>NER (spaCY)</text:p>
            <text:p>Reconnaissance vocale et transcription (WhisperX)</text:p>
            <text:p>pgvector </text:p>
            <text:p>Openpifpaf</text:p>
          </table:table-cell>
          <table:table-cell table:number-columns-repeated="16376"/>
        </table:table-row>
        <table:table-row table:style-name="ro2">
          <table:table-cell office:value-type="string" calcext:value-type="string">
            <text:p>Artificial Intelligence at the service of the RTS Audiovisual Archives</text:p>
          </table:table-cell>
          <table:table-cell office:value-type="string" calcext:value-type="string">
            <text:p>Pietro Rezzonico,</text:p>
          </table:table-cell>
          <table:table-cell office:value-type="string" calcext:value-type="string">
            <text:p>Indexation</text:p>
          </table:table-cell>
          <table:table-cell table:style-name="ce5" office:value-type="string" calcext:value-type="string">
            <text:p><text:a xlink:href="https://fiatifta.org/awards-editions/awards-2019/" xlink:type="simple">https://fiatifta.org/awards-editions/awards-2019/</text:a></text:p>
          </table:table-cell>
          <table:table-cell table:style-name="ce8" office:value-type="string" calcext:value-type="string">
            <text:p>Les archives de la RTS ont mis en place la reconnaissance faciale, recherche visuelle, et classification automatique. Un peu plus d'infos dans cette vidéo : </text:p>
            <text:p>https://www.youtube.com/watch?v=Cp-Sd0KQ-SA </text:p>
          </table:table-cell>
          <table:table-cell table:number-columns-repeated="16379"/>
        </table:table-row>
        <table:table-row table:style-name="ro10">
          <table:table-cell office:value-type="string" calcext:value-type="string">
            <text:p>La recherche avec IA</text:p>
          </table:table-cell>
          <table:table-cell office:value-type="string" calcext:value-type="string">
            <text:p>Amorce</text:p>
          </table:table-cell>
          <table:table-cell office:value-type="string" calcext:value-type="string">
            <text:p>NLP</text:p>
          </table:table-cell>
          <table:table-cell table:style-name="ce5" office:value-type="string" calcext:value-type="string">
            <text:p><text:a xlink:href="https://www.amorce.eu/projets-la-recherche-avec-ia-1535-1041-0-0.html" xlink:type="simple">https://www.amorce.eu/projets-la-recherche-avec-ia-1535-1041-0-0.html
https://archipanion.amorce.eu/fr </text:a></text:p>
          </table:table-cell>
          <table:table-cell table:style-name="ce8" office:value-type="string" calcext:value-type="string">
            <text:p>La plateforme Amorce a mis en place une recherche en langage naturel pour les archives audiovisuelles avec Archipanion</text:p>
          </table:table-cell>
          <table:table-cell/>
          <table:table-cell office:value-type="string" calcext:value-type="string">
            <text:p>Archipanion (recherche visuelle assistée par IA, extraction de données structurées. </text:p>
            <text:p>https://www.archipanion.com/fr/  </text:p>
          </table:table-cell>
          <table:table-cell table:number-columns-repeated="16377"/>
        </table:table-row>
        <table:table-row table:style-name="ro1">
          <table:table-cell office:value-type="string" calcext:value-type="string">
            <text:p>Traitements IA à l'INA</text:p>
          </table:table-cell>
          <table:table-cell office:value-type="string" calcext:value-type="string">
            <text:p>INA</text:p>
          </table:table-cell>
          <table:table-cell office:value-type="string" calcext:value-type="string">
            <text:p>Indexation</text:p>
          </table:table-cell>
          <table:table-cell table:style-name="ce5" office:value-type="string" calcext:value-type="string">
            <text:p><text:a xlink:href="https://data.ina.fr/traitements-ia" xlink:type="simple">https://data.ina.fr/traitements-ia</text:a></text:p>
          </table:table-cell>
          <table:table-cell table:style-name="ce8" office:value-type="string" calcext:value-type="string">
            <text:p>Présentation des traitements IA à l'INA comprenant : analyse du son, transcriptions automatiques, reconnaissance d'entités nommées. </text:p>
          </table:table-cell>
          <table:table-cell table:number-columns-repeated="16379"/>
        </table:table-row>
        <table:table-row table:style-name="ro11">
          <table:table-cell office:value-type="string" calcext:value-type="string">
            <text:p>CamemBERT: a Tasty French Language Model</text:p>
          </table:table-cell>
          <table:table-cell office:value-type="string" calcext:value-type="string">
            <text:p>Louis Martin</text:p>
            <text:p> Benjamin Muller Pedro Javier Ortiz Suárez</text:p>
            <text:p>Yoann Dupont Laurent Romary Éric Villemonte de la Clergerie</text:p>
            <text:p>Djamé Seddah Benoît Sagot</text:p>
          </table:table-cell>
          <table:table-cell office:value-type="string" calcext:value-type="string">
            <text:p>NLP</text:p>
          </table:table-cell>
          <table:table-cell table:style-name="ce5" office:value-type="string" calcext:value-type="string">
            <text:p><text:a xlink:href="https://inria.hal.science/hal-02889805/document" xlink:type="simple">https://inria.hal.science/hal-02889805/document</text:a></text:p>
          </table:table-cell>
          <table:table-cell table:style-name="ce8" office:value-type="string" calcext:value-type="string">
            <text:p>Article sur le modèle de langage camemBERT entrainé en français. </text:p>
          </table:table-cell>
          <table:table-cell table:number-columns-repeated="16379"/>
        </table:table-row>
        <table:table-row table:style-name="ro2">
          <table:table-cell office:value-type="string" calcext:value-type="string">
            <text:p>Qu’est ce que l’indexation de documents ? Guide complet et automatisation</text:p>
          </table:table-cell>
          <table:table-cell office:value-type="string" calcext:value-type="string">
            <text:p>Alexandre Baudon</text:p>
          </table:table-cell>
          <table:table-cell office:value-type="string" calcext:value-type="string">
            <text:p>Indexation </text:p>
          </table:table-cell>
          <table:table-cell table:style-name="ce5" office:value-type="string" calcext:value-type="string">
            <text:p><text:a xlink:href="https://deltic.fr/indexation-documents/" xlink:type="simple">https://deltic.fr/indexation-documents/</text:a></text:p>
          </table:table-cell>
          <table:table-cell office:value-type="string" calcext:value-type="string">
            <text:p>Article général qui présente les grands principe de l'indexation de documents et le challenge que l'automatisation de ce processus représente. </text:p>
          </table:table-cell>
          <table:table-cell table:number-columns-repeated="16379"/>
        </table:table-row>
        <table:table-row table:style-name="ro2">
          <table:table-cell office:value-type="string" calcext:value-type="string">
            <text:p>Utilisation du contexte pour l’indexation Sémantique des images et vidéos</text:p>
          </table:table-cell>
          <table:table-cell office:value-type="string" calcext:value-type="string">
            <text:p>Abdelkader Hamadi</text:p>
          </table:table-cell>
          <table:table-cell office:value-type="string" calcext:value-type="string">
            <text:p>Indexation</text:p>
          </table:table-cell>
          <table:table-cell table:style-name="ce5" office:value-type="string" calcext:value-type="string">
            <text:p><text:a xlink:href="https://hal.science/tel-01137526v1" xlink:type="simple">https://hal.science/tel-01137526v1</text:a></text:p>
          </table:table-cell>
          <table:table-cell office:value-type="string" calcext:value-type="string">
            <text:p>Thèse qui étudie les moyens en places et à mettre en place afin de créer une indexation automatisée intégrant des notions sémantiques. C'est à dire une indexation basée sur la compréhension d'un film/d'un image par l'IA. </text:p>
          </table:table-cell>
          <table:table-cell table:number-columns-repeated="16379"/>
        </table:table-row>
        <table:table-row table:style-name="ro2">
          <table:table-cell table:style-name="ce6" office:value-type="string" calcext:value-type="string">
            <text:p>Traitement automatique du langage naturel avec Python – Le NLP avec spaCy et NLTK</text:p>
          </table:table-cell>
          <table:table-cell office:value-type="string" calcext:value-type="string">
            <text:p>Benoît Prieur</text:p>
          </table:table-cell>
          <table:table-cell office:value-type="string" calcext:value-type="string">
            <text:p>NLP</text:p>
          </table:table-cell>
          <table:table-cell table:style-name="ce5" office:value-type="string" calcext:value-type="string">
            <text:p><text:a xlink:href="https://hal.science/hal-04610717v1" xlink:type="simple">https://hal.science/hal-04610717v1</text:a></text:p>
          </table:table-cell>
          <table:table-cell office:value-type="string" calcext:value-type="string">
            <text:p>Ouvrage disponible uniquement l'achat, le lien ne comporte que le résumé, qui présente deux bibliothèques python particulièrement utile pour le NLP.</text:p>
          </table:table-cell>
          <table:table-cell office:value-type="string" calcext:value-type="string">
            <text:p>SPACY et NLTK</text:p>
          </table:table-cell>
          <table:table-cell office:value-type="string" calcext:value-type="string">
            <text:p>NLP</text:p>
          </table:table-cell>
          <table:table-cell table:number-columns-repeated="16377"/>
        </table:table-row>
        <table:table-row table:style-name="ro2">
          <table:table-cell office:value-type="string" calcext:value-type="string">
            <text:p>Qu'est ce que le NLP ?</text:p>
          </table:table-cell>
          <table:table-cell office:value-type="string" calcext:value-type="string">
            <text:p>Cole Stryker et Jim Holdsworth</text:p>
          </table:table-cell>
          <table:table-cell office:value-type="string" calcext:value-type="string">
            <text:p>NLP</text:p>
          </table:table-cell>
          <table:table-cell table:style-name="ce5" office:value-type="string" calcext:value-type="string">
            <text:p><text:a xlink:href="https://www.ibm.com/fr-fr/think/topics/natural-language-processing" xlink:type="simple">https://www.ibm.com/fr-fr/think/topics/natural-language-processing</text:a></text:p>
          </table:table-cell>
          <table:table-cell office:value-type="string" calcext:value-type="string">
            <text:p>Article de IBM permettant de présenter et de comprendre les bases du NLP. </text:p>
          </table:table-cell>
          <table:table-cell table:number-columns-repeated="16379"/>
        </table:table-row>
        <table:table-row table:style-name="ro2">
          <table:table-cell office:value-type="string" calcext:value-type="string">
            <text:p>TRECVID 2024 : Evaluating video search, captionning and activity recognition</text:p>
          </table:table-cell>
          <table:table-cell office:value-type="string" calcext:value-type="string">
            <text:p>George Awad</text:p>
          </table:table-cell>
          <table:table-cell office:value-type="string" calcext:value-type="string">
            <text:p>Indexation</text:p>
          </table:table-cell>
          <table:table-cell table:style-name="ce5" office:value-type="string" calcext:value-type="string">
            <text:p><text:a xlink:href="https://trec.nist.gov/pubs/trec33/papers/Overview_avs_vtt_actev.pdf" xlink:type="simple">https://trec.nist.gov/pubs/trec33/papers/Overview_avs_vtt_actev.pdf</text:a></text:p>
          </table:table-cell>
          <table:table-cell table:style-name="ce4" office:value-type="string" calcext:value-type="string">
            <text:p><text:span text:style-name="T1">TRECVID est une publication annuelle de </text:span><text:span text:style-name="T2">Benchmark</text:span><text:span text:style-name="T3"> dans le domaine de l'application d'IA sur des vidéos et images pour leurs traitement.</text:span></text:p>
          </table:table-cell>
          <table:table-cell table:number-columns-repeated="16379"/>
        </table:table-row>
        <table:table-row table:style-name="ro7">
          <table:table-cell office:value-type="string" calcext:value-type="string">
            <text:p>Changing the Paradigm from Dynamic Queries to LLM-generated SQL Queries with Human Intervention</text:p>
          </table:table-cell>
          <table:table-cell office:value-type="string" calcext:value-type="string">
            <text:p>Ambre Assore, Hyeon Jeon, Sungbok Shin, Jean-Daniel Fekete</text:p>
          </table:table-cell>
          <table:table-cell office:value-type="string" calcext:value-type="string">
            <text:p>NLP</text:p>
          </table:table-cell>
          <table:table-cell table:style-name="ce5" office:value-type="string" calcext:value-type="string">
            <text:p><text:a xlink:href="https://hal.science/hal-05341025v1" xlink:type="simple">https://hal.science/hal-05341025v1</text:a></text:p>
          </table:table-cell>
          <table:table-cell office:value-type="string" calcext:value-type="string">
            <text:p>Article issus d'un Congrès, il présente l'utilisation possibl du LLM pour la génération automatisée de requête SQL sur une base de donnée médicale. </text:p>
          </table:table-cell>
          <table:table-cell table:number-columns-repeated="16379"/>
        </table:table-row>
        <table:table-row table:style-name="ro4">
          <table:table-cell table:style-name="ce6" office:value-type="string" calcext:value-type="string">
            <text:p>Think2SQL: Blueprinting Reward Density and Advantage Scaling for Effective Text-to-SQL Reasoning,</text:p>
          </table:table-cell>
          <table:table-cell office:value-type="string" calcext:value-type="string">
            <text:p>Simone Papicchio, Simone Rossi, Luca Cagliero, Paolo Papotti</text:p>
          </table:table-cell>
          <table:table-cell office:value-type="string" calcext:value-type="string">
            <text:p>NLP</text:p>
          </table:table-cell>
          <table:table-cell table:style-name="ce5" office:value-type="string" calcext:value-type="string">
            <text:p><text:a xlink:href="https://hal.science/hal-05523999v1" xlink:type="simple">https://hal.science/hal-05523999v1</text:a></text:p>
          </table:table-cell>
          <table:table-cell table:style-name="ce4" office:value-type="string" calcext:value-type="string">
            <text:p><text:span text:style-name="T1">Article présentant les améliorations possibles d'un pipeline classique de </text:span><text:span text:style-name="T2">text-to-SQL</text:span></text:p>
          </table:table-cell>
          <table:table-cell table:number-columns-repeated="16379"/>
        </table:table-row>
        <table:table-row table:style-name="ro1">
          <table:table-cell office:value-type="string" calcext:value-type="string">
            <text:p>Interroger vos bases en langage naturel</text:p>
          </table:table-cell>
          <table:table-cell/>
          <table:table-cell office:value-type="string" calcext:value-type="string">
            <text:p>NLP</text:p>
          </table:table-cell>
          <table:table-cell table:style-name="ce5" office:value-type="string" calcext:value-type="string">
            <text:p><text:a xlink:href="https://flowt.fr/blog/text-to-sql-ia-generative-interroger-bases-donnees-langage-naturel/" xlink:type="simple">https://flowt.fr/blog/text-to-sql-ia-generative-interroger-bases-donnees-langage-naturel/</text:a></text:p>
          </table:table-cell>
          <table:table-cell table:style-name="ce4" office:value-type="string" calcext:value-type="string">
            <text:p><text:span text:style-name="T1">Article web qui récapitule l'essentiel d'un pipeline </text:span><text:span text:style-name="T2">Text-to-SQL</text:span><text:span text:style-name="T3"> et qui présente des options de pipeline utilisable</text:span></text:p>
          </table:table-cell>
          <table:table-cell office:value-type="string" calcext:value-type="string">
            <text:p>VANA AI , LANGCHAIN SQL</text:p>
          </table:table-cell>
          <table:table-cell table:number-columns-repeated="16378"/>
        </table:table-row>
        <table:table-row table:style-name="ro7">
          <table:table-cell office:value-type="string" calcext:value-type="string">
            <text:p>Structural deep encoding for tabl question answering</text:p>
          </table:table-cell>
          <table:table-cell office:value-type="string" calcext:value-type="string">
            <text:p>Raphaël Mouraviee, Benjamin Piwowarski, Sylvain Lamprier</text:p>
          </table:table-cell>
          <table:table-cell office:value-type="string" calcext:value-type="string">
            <text:p>NLP</text:p>
          </table:table-cell>
          <table:table-cell table:style-name="ce5" office:value-type="string" calcext:value-type="string">
            <text:p><text:a xlink:href="https://hal.sorbonne-universite.fr/hal-05392142/file/2025.findings-acl.121.pdf" xlink:type="simple">https://hal.sorbonne-universite.fr/hal-05392142/file/2025.findings-acl.121.pdf</text:a></text:p>
          </table:table-cell>
          <table:table-cell table:style-name="ce4" office:value-type="string" calcext:value-type="string">
            <text:p><text:span text:style-name="T1">Article qui présente les fruits du projet TaBERT. Expose les difficultés et challenge à relever quant à l'application d'un NLP reposant sur des </text:span><text:span text:style-name="T2">transformers</text:span><text:span text:style-name="T3"> sur des données tabulaires. </text:span></text:p>
          </table:table-cell>
          <table:table-cell office:value-type="string" calcext:value-type="string">
            <text:p>BERT</text:p>
          </table:table-cell>
          <table:table-cell office:value-type="string" calcext:value-type="string">
            <text:p>Transformers</text:p>
          </table:table-cell>
          <table:table-cell table:number-columns-repeated="16377"/>
        </table:table-row>
        <table:table-row table:style-name="ro8">
          <table:table-cell office:value-type="string" calcext:value-type="string">
            <text:p>Logical and Physical Optimizations for SQL query execution over large language models</text:p>
          </table:table-cell>
          <table:table-cell office:value-type="string" calcext:value-type="string">
            <text:p>Dario Satriani, Enzo Veltri, Donatello Santoro, Sara Rosato, Simone Varriale, Paolo Papotti</text:p>
          </table:table-cell>
          <table:table-cell office:value-type="string" calcext:value-type="string">
            <text:p>NLP</text:p>
          </table:table-cell>
          <table:table-cell table:style-name="ce5" office:value-type="string" calcext:value-type="string">
            <text:p><text:a xlink:href="https://hal.science/hal-05034648v1" xlink:type="simple">https://hal.science/hal-05034648v1</text:a></text:p>
          </table:table-cell>
          <table:table-cell office:value-type="string" calcext:value-type="string">
            <text:p>Article qui propose une manière de fiabiliser les résultats obtenus par interrogation d'un LLM sur une base de donnée. Expose les difficultées repérée et des solutions à mettre en place afin de fiabiliser les résultats.</text:p>
          </table:table-cell>
          <table:table-cell office:value-type="string" calcext:value-type="string">
            <text:p>LLM, Galois </text:p>
          </table:table-cell>
          <table:table-cell table:number-columns-repeated="16378"/>
        </table:table-row>
        <table:table-row table:style-name="ro2">
          <table:table-cell office:value-type="string" calcext:value-type="string">
            <text:p>Comment générer du SQL à partir de texte avec les LLMs ? </text:p>
          </table:table-cell>
          <table:table-cell office:value-type="string" calcext:value-type="string">
            <text:p>Franck Scandolera</text:p>
          </table:table-cell>
          <table:table-cell office:value-type="string" calcext:value-type="string">
            <text:p>NLP</text:p>
          </table:table-cell>
          <table:table-cell table:style-name="ce5" office:value-type="string" calcext:value-type="string">
            <text:p><text:a xlink:href="https://elearning.formations-analytics.com/programmation/comment-generer-du-sql-a-partir-de-texte-avec-les-llms/" xlink:type="simple">https://elearning.formations-analytics.com/programmation/comment-generer-du-sql-a-partir-de-texte-avec-les-llms/</text:a></text:p>
          </table:table-cell>
          <table:table-cell table:style-name="ce4" office:value-type="string" calcext:value-type="string">
            <text:p><text:span text:style-name="T1">Article permettant de faire un point sur le </text:span><text:span text:style-name="T2">text-to-sql</text:span><text:span text:style-name="T3"> et de présenter différents outils et alternatives pour la génération de SQL à partir de requête en langage naturel via LLMs</text:span></text:p>
          </table:table-cell>
          <table:table-cell office:value-type="string" calcext:value-type="string">
            <text:p>LLM</text:p>
          </table:table-cell>
          <table:table-cell table:number-columns-repeated="16378"/>
        </table:table-row>
        <table:table-row table:style-name="ro3">
          <table:table-cell office:value-type="string" calcext:value-type="string">
            <text:p>Interroger la mémoire d'entreprise par l'IA : le RAG face aux archives orales. Enjeux et limites pour l'histoire appliquée</text:p>
          </table:table-cell>
          <table:table-cell office:value-type="string" calcext:value-type="string">
            <text:p>Bénédicte Tuza</text:p>
          </table:table-cell>
          <table:table-cell office:value-type="string" calcext:value-type="string">
            <text:p>Indexation </text:p>
          </table:table-cell>
          <table:table-cell table:style-name="ce5" office:value-type="string" calcext:value-type="string">
            <text:p><text:a xlink:href="https://dumas.ccsd.cnrs.fr/dumas-05390427v1/file/ENC-PSL_M2TNAH_TUZA_Bénédicte.pdf" xlink:type="simple">https://dumas.ccsd.cnrs.fr/dumas-05390427v1/file/ENC-PSL_M2TNAH_TUZA_B%C3%A9n%C3%A9dicte.pdf</text:a></text:p>
          </table:table-cell>
          <table:table-cell table:style-name="ce4" office:value-type="string" calcext:value-type="string">
            <text:p><text:span text:style-name="T1">Mémoire soutenu en 2025 par Bénédicte Tuza pour l'obtention de son diplôme Technologies Numériques Appliquées à l'Histoire. Il fait le tour sur l'utilisation possible du RAG dans les archives. Extrêmement intéressant pour comprendre comment un RAG fonctionne et les limites de cette technologies. Le RAG étant au centre de  l'indexation comme du </text:span><text:span text:style-name="T2">text-to-sql.</text:span></text:p>
          </table:table-cell>
          <table:table-cell table:number-columns-repeated="16379"/>
        </table:table-row>
        <table:table-row table:style-name="ro7">
          <table:table-cell table:style-name="ce4" office:value-type="string" calcext:value-type="string">
            <text:p><text:span text:style-name="T1">Battle of the Large Language Models : Dolly vs LLaMA vs Vicuna vs Guanaco vs Bard vs ChatGPT - A </text:span><text:span text:style-name="T2">text-too-SQL</text:span><text:span text:style-name="T3"> Parsing Comparaison</text:span></text:p>
          </table:table-cell>
          <table:table-cell office:value-type="string" calcext:value-type="string">
            <text:p>Shuo Sun, Yuchen Zhang, Jiahuan Yan, Yuze Gao, Donovan Ong, Bin Chen, Jian Su</text:p>
          </table:table-cell>
          <table:table-cell office:value-type="string" calcext:value-type="string">
            <text:p>NLP</text:p>
          </table:table-cell>
          <table:table-cell table:style-name="ce5" office:value-type="string" calcext:value-type="string">
            <text:p><text:a xlink:href="https://arxivv.org/abs/2310.10190" xlink:type="simple">https://arxivv.org/abs/2310.10190</text:a></text:p>
          </table:table-cell>
          <table:table-cell office:value-type="string" calcext:value-type="string">
            <text:p>Article de comparaison de différents LLMs en fonction de leurs capacité à générer une requête SQL valide et correspondant à une requête utilisateur formulée en Langage Naturel. </text:p>
          </table:table-cell>
          <table:table-cell office:value-type="string" calcext:value-type="string">
            <text:p>Dolly, LLaMA, Vicuna, Guanaco, Bard, ChatGPT</text:p>
          </table:table-cell>
          <table:table-cell table:number-columns-repeated="16378"/>
        </table:table-row>
        <table:table-row table:style-name="ro2">
          <table:table-cell table:style-name="ce7" office:value-type="string" calcext:value-type="string">
            <text:p>Cinéma &amp; IA : Incorporer une intelligence artificielle pour (ré)écrire l’histoire du cinéma ? Une exploration de méthodes et d’analyses possibles</text:p>
          </table:table-cell>
          <table:table-cell office:value-type="string" calcext:value-type="string">
            <text:p>Beatriz-Tadeo Fuica</text:p>
          </table:table-cell>
          <table:table-cell office:value-type="string" calcext:value-type="string">
            <text:p>Indexation </text:p>
          </table:table-cell>
          <table:table-cell table:style-name="ce5" office:value-type="string" calcext:value-type="string">
            <text:p><text:a xlink:href="https://inalelab.hypotheses.org/4192" xlink:type="simple">https://inalelab.hypotheses.org/4192</text:a></text:p>
          </table:table-cell>
          <table:table-cell office:value-type="string" calcext:value-type="string">
            <text:p>Article surtout utile pour sa large bibliographie vers d'autres projets, avancées et concepts dans l'application d'IA au monde des images animés.</text:p>
          </table:table-cell>
          <table:table-cell table:number-columns-repeated="16379"/>
        </table:table-row>
        <table:table-row table:style-name="ro2">
          <table:table-cell office:value-type="string" calcext:value-type="string">
            <text:p>SNOOP : moteurs de recherche d'objets visuels</text:p>
          </table:table-cell>
          <table:table-cell office:value-type="string" calcext:value-type="string">
            <text:p>INA</text:p>
          </table:table-cell>
          <table:table-cell office:value-type="string" calcext:value-type="string">
            <text:p>Indexation </text:p>
          </table:table-cell>
          <table:table-cell table:style-name="ce5" office:value-type="string" calcext:value-type="string">
            <text:p><text:a xlink:href="https://inalelab.hypotheses.org/642" xlink:type="simple">https://inalelab.hypotheses.org/642</text:a></text:p>
          </table:table-cell>
          <table:table-cell office:value-type="string" calcext:value-type="string">
            <text:p>Comme précédemment, cet article est assez peu bavard mais contient de la bibliographie pouvant être intéressant sur le projet SNOOP mis en place par l'INA. IA de reconnaissance d'objets. </text:p>
          </table:table-cell>
          <table:table-cell table:number-columns-repeated="16379"/>
        </table:table-row>
        <table:table-row table:style-name="ro2">
          <table:table-cell table:style-name="ce4" office:value-type="string" calcext:value-type="string">
            <text:p><text:span text:style-name="T1">Content Enhanced BERT-based </text:span><text:span text:style-name="T2">Text-to-SQL </text:span><text:span text:style-name="T3">Generation</text:span></text:p>
          </table:table-cell>
          <table:table-cell office:value-type="string" calcext:value-type="string">
            <text:p>Tong Guo, Huilin Gao</text:p>
          </table:table-cell>
          <table:table-cell office:value-type="string" calcext:value-type="string">
            <text:p>NLP</text:p>
          </table:table-cell>
          <table:table-cell table:style-name="ce5" office:value-type="string" calcext:value-type="string">
            <text:p><text:a xlink:href="https://arxiv.org/abs/1910.07179" xlink:type="simple">https://arxiv.org/abs/1910.07179 </text:a></text:p>
          </table:table-cell>
          <table:table-cell office:value-type="string" calcext:value-type="string">
            <text:p>Article d'approfondissement de la technologie BERT pour la génération de SQL à partir de texte. </text:p>
          </table:table-cell>
          <table:table-cell table:number-columns-repeated="16379"/>
        </table:table-row>
        <table:table-row table:style-name="ro7">
          <table:table-cell office:value-type="string" calcext:value-type="string">
            <text:p>Des usages archivistiques pour l'intelligence artificielle : le cas de l'automatisation de l'inventaire des archivesà la Chambre des Députés du Grand-Duché de Luxembourg</text:p>
          </table:table-cell>
          <table:table-cell office:value-type="string" calcext:value-type="string">
            <text:p>Sarah Marcq</text:p>
          </table:table-cell>
          <table:table-cell office:value-type="string" calcext:value-type="string">
            <text:p>Indexation </text:p>
          </table:table-cell>
          <table:table-cell table:style-name="ce5" office:value-type="string" calcext:value-type="string">
            <text:p><text:a xlink:href="https://dumas.ccsd.cnrs.fr/dumas-04765262" xlink:type="simple">https://dumas.ccsd.cnrs.fr/dumas-04765262</text:a></text:p>
          </table:table-cell>
          <table:table-cell office:value-type="string" calcext:value-type="string">
            <text:p>Mémoire soutenu en 2024 par Sarah Marcq pour l'obtention de son diplôme Technologie Numériques Appliquées à l'Histoire, il présente les méthodes de traitement mise en place pour l'automatisation du traitement des archives de la Chambre des Députés du Grand-Duché de Luxembourg. Très intéressant car elle s'appuie sur différentes technologies d'IA et balaye toute la richesse et complexité d'un tel projet. N'inclus pas de travail sur des vidéos.</text:p>
          </table:table-cell>
          <table:table-cell/>
          <table:table-cell office:value-type="string" calcext:value-type="string">
            <text:p>HTR, LLM, NEL,, NER, NLP, OCR, Embeddings, speech to tetx, token, topic modelling, RAG</text:p>
          </table:table-cell>
          <table:table-cell table:number-columns-repeated="16377"/>
        </table:table-row>
        <table:table-row table:style-name="ro2">
          <table:table-cell office:value-type="string" calcext:value-type="string">
            <text:p>Digital Humanities and Natural Language Processing : "Je t'aime... Moi non plus" </text:p>
          </table:table-cell>
          <table:table-cell office:value-type="string" calcext:value-type="string">
            <text:p>Thierry Poibeau, Pablo Ruiz</text:p>
          </table:table-cell>
          <table:table-cell office:value-type="string" calcext:value-type="string">
            <text:p>NLP</text:p>
          </table:table-cell>
          <table:table-cell table:style-name="ce5" office:value-type="string" calcext:value-type="string">
            <text:p><text:a xlink:href="https://hal.science/hal-02970302" xlink:type="simple">https://hal.science/hal-02970302</text:a></text:p>
          </table:table-cell>
          <table:table-cell table:style-name="ce4" office:value-type="string" calcext:value-type="string">
            <text:p><text:span text:style-name="T1">Article qui a pour objet de présenter différentes technologies NLP et la manière de les utiliser dans les Humanités Numériques, ou </text:span><text:span text:style-name="T2">Digital Humanities. </text:span><text:span text:style-name="T3">Part d'un constat d'une fiable utilisation de cette technologie et vise à la rendre plus "populaire' dans le monde des humanités numériques. </text:span></text:p>
          </table:table-cell>
          <table:table-cell/>
          <table:table-cell office:value-type="string" calcext:value-type="string">
            <text:p>NLP</text:p>
          </table:table-cell>
          <table:table-cell table:number-columns-repeated="16377"/>
        </table:table-row>
        <table:table-row table:style-name="ro2">
          <table:table-cell office:value-type="string" calcext:value-type="string">
            <text:p>Le traitement automatique des langues pour les sciences sociales. Quelques éléments de réflexion à partir d'expériences récentes</text:p>
          </table:table-cell>
          <table:table-cell office:value-type="string" calcext:value-type="string">
            <text:p>Thierry Poibeau </text:p>
          </table:table-cell>
          <table:table-cell office:value-type="string" calcext:value-type="string">
            <text:p>NLP</text:p>
          </table:table-cell>
          <table:table-cell table:style-name="ce5" office:value-type="string" calcext:value-type="string">
            <text:p><text:a xlink:href="https://shs.cairn.info/revue-reseaux-2014-6-page-25" xlink:type="simple">https://shs.cairn.info/revue-reseaux-2014-6-page-25</text:a></text:p>
          </table:table-cell>
          <table:table-cell office:value-type="string" calcext:value-type="string">
            <text:p>Article de 2014 qui propose des pistes de réflexions quant à l'évolution et l'utilisatioon du NLP </text:p>
          </table:table-cell>
          <table:table-cell table:number-columns-repeated="16379"/>
        </table:table-row>
        <table:table-row table:style-name="ro2">
          <table:table-cell office:value-type="string" calcext:value-type="string">
            <text:p>Object ddetection : combining YOLO and SAM2 for Enhanced Video Segmentation</text:p>
          </table:table-cell>
          <table:table-cell office:value-type="string" calcext:value-type="string">
            <text:p>Genet Gessessew</text:p>
          </table:table-cell>
          <table:table-cell office:value-type="string" calcext:value-type="string">
            <text:p>Indexation </text:p>
          </table:table-cell>
          <table:table-cell table:style-name="ce5" office:value-type="string" calcext:value-type="string">
            <text:p><text:a xlink:href="https://medium.com/@genet.gessessew/supercharging-object-detection-combining-yolo-and-sam2-for-enhanced-video-segmentation-3a8c5e603430" xlink:type="simple">https://medium.com/@genet.gessessew/supercharging-object-detection-combining-yolo-and-sam2-for-enhanced-video-segmentation-3a8c5e603430</text:a></text:p>
          </table:table-cell>
          <table:table-cell office:value-type="string" calcext:value-type="string">
            <text:p>Article WEB qui présent l'intérêt, et la réalisation technique, de combiner un modèle YOLO et SAM2 pour la segmentation de vidéos. </text:p>
          </table:table-cell>
          <table:table-cell table:number-columns-repeated="16379"/>
        </table:table-row>
        <table:table-row table:style-name="ro2">
          <table:table-cell office:value-type="string" calcext:value-type="string">
            <text:p>Qu'est ce que la recherche intelligente ?</text:p>
          </table:table-cell>
          <table:table-cell office:value-type="string" calcext:value-type="string">
            <text:p>IBM</text:p>
          </table:table-cell>
          <table:table-cell office:value-type="string" calcext:value-type="string">
            <text:p>NLP</text:p>
          </table:table-cell>
          <table:table-cell table:style-name="ce5" office:value-type="string" calcext:value-type="string">
            <text:p><text:a xlink:href="https://www.ibm.com/fr-fr/think/topics/intelligent-search" xlink:type="simple">https://www.ibm.com/fr-fr/think/topics/intelligent-search</text:a></text:p>
          </table:table-cell>
          <table:table-cell office:value-type="string" calcext:value-type="string">
            <text:p>Article WEB de IBM qui explique les bases de la recherche intelligente. C'est à dire un moteur de recherche qui repose sur le NLP et l'indexation de contenu à partir de bases de données afin de faciliter les recherches</text:p>
          </table:table-cell>
          <table:table-cell/>
          <table:table-cell office:value-type="string" calcext:value-type="string">
            <text:p>NLP </text:p>
          </table:table-cell>
          <table:table-cell table:number-columns-repeated="16377"/>
        </table:table-row>
        <table:table-row table:style-name="ro12">
          <table:table-cell office:value-type="string" calcext:value-type="string">
            <text:p>Review on Natural Language Processing Base on Different Techniques</text:p>
          </table:table-cell>
          <table:table-cell office:value-type="string" calcext:value-type="string">
            <text:p>Dastan Hussen Maulud, Siddeeq Y Ameen, Naaman Omar, Shakir Fattah Kak, Zryan Najat Rashid, Hajar Maseeh Yasin, Ibrahim Mahmood Ibrahim, Azar Abid Salih, Nareen O, M.Salim, Dindar Mikaeel Ahmed</text:p>
          </table:table-cell>
          <table:table-cell office:value-type="string" calcext:value-type="string">
            <text:p>NLP</text:p>
          </table:table-cell>
          <table:table-cell table:style-name="ce5" office:value-type="string" calcext:value-type="string">
            <text:p><text:a xlink:href="https://scispace.com/pdf/review-on-natural-language-processing-based-on-different-2qpw7nmbi4.pdf" xlink:type="simple">https://scispace.com/pdf/review-on-natural-language-processing-based-on-different-2qpw7nmbi4.pdf</text:a></text:p>
          </table:table-cell>
          <table:table-cell office:value-type="string" calcext:value-type="string">
            <text:p>Article qui met en comparaison différentes techniques d'application et d'entraïnement de différents NLP. La comparaison se fait le niveau de précision atteint par chaque méthdologies.</text:p>
          </table:table-cell>
          <table:table-cell/>
          <table:table-cell office:value-type="string" calcext:value-type="string">
            <text:p>NLP</text:p>
          </table:table-cell>
          <table:table-cell table:number-columns-repeated="16377"/>
        </table:table-row>
        <table:table-row table:style-name="ro3">
          <table:table-cell office:value-type="string" calcext:value-type="string">
            <text:p>SAM2 : Segment Anything in images and videos</text:p>
          </table:table-cell>
          <table:table-cell office:value-type="string" calcext:value-type="string">
            <text:p>Nikhila Ravi, Valentin Gabeur, Yuan-Ting Hu</text:p>
          </table:table-cell>
          <table:table-cell office:value-type="string" calcext:value-type="string">
            <text:p>Indexation </text:p>
          </table:table-cell>
          <table:table-cell table:style-name="ce5" office:value-type="string" calcext:value-type="string">
            <text:p><text:a xlink:href="https://arxiv.org/abs/2408.00714" xlink:type="simple">https://arxiv.org/abs/2408.00714</text:a></text:p>
          </table:table-cell>
          <table:table-cell office:value-type="string" calcext:value-type="string">
            <text:p>Article détaillé présentant l'outil SAM2. Permet d'en comprendre toute la complexité, les apports et limites de l'outil. </text:p>
          </table:table-cell>
          <table:table-cell office:value-type="string" calcext:value-type="string">
            <text:p>SAM2</text:p>
          </table:table-cell>
          <table:table-cell table:number-columns-repeated="16378"/>
        </table:table-row>
        <table:table-row table:style-name="ro3">
          <table:table-cell office:value-type="string" calcext:value-type="string">
            <text:p>Segment Anything for Video : A comprehensiv review of video object segmentation and tracking form Past to Future</text:p>
          </table:table-cell>
          <table:table-cell office:value-type="string" calcext:value-type="string">
            <text:p>Guoping Xu, Jayaram K. Udupa, Yajun Yu</text:p>
          </table:table-cell>
          <table:table-cell office:value-type="string" calcext:value-type="string">
            <text:p>Indexation </text:p>
          </table:table-cell>
          <table:table-cell table:style-name="ce5" office:value-type="string" calcext:value-type="string">
            <text:p><text:a xlink:href="https://arxiv.org/abs/2507.22792" xlink:type="simple">https://arxiv.org/abs/2507.22792</text:a></text:p>
          </table:table-cell>
          <table:table-cell office:value-type="string" calcext:value-type="string">
            <text:p>Examine l'application des technologies SAM et SAM2 et l'évolution qu'elle représennte dans le domaine. Permet aussi de comprendre comme SAM et SAM2 s'appliquent àà des films historiques et/ou des films créer pour le steaming.</text:p>
          </table:table-cell>
          <table:table-cell office:value-type="string" calcext:value-type="string">
            <text:p>SAM et SAM2</text:p>
          </table:table-cell>
          <table:table-cell table:number-columns-repeated="16378"/>
        </table:table-row>
        <table:table-row table:style-name="ro2">
          <table:table-cell office:value-type="string" calcext:value-type="string">
            <text:p>Watching historical films through AI : Reflections on Image Retrieval from heritage collection</text:p>
          </table:table-cell>
          <table:table-cell/>
          <table:table-cell office:value-type="string" calcext:value-type="string">
            <text:p>Indexation </text:p>
          </table:table-cell>
          <table:table-cell table:style-name="ce5" office:value-type="string" calcext:value-type="string">
            <text:p><text:a xlink:href="https://cinergie.unibo.it/article/view/13082" xlink:type="simple">https://cinergie.unibo.it/article/view/13082</text:a></text:p>
          </table:table-cell>
          <table:table-cell table:style-name="ce4" office:value-type="string" calcext:value-type="string">
            <text:p><text:span text:style-name="T1">Cet article vise à montrer comment l'IA peut être utilisé par les historiens du cinéma dans leurs travaux de recherches. Pour cela, l'article se concentre sur un état des lieux de l'IA appliqué aux vidéos et s'attarde sur différentes technologies comme SNOOP </text:span><text:span text:style-name="T2">(INA).</text:span></text:p>
          </table:table-cell>
          <table:table-cell office:value-type="string" calcext:value-type="string">
            <text:p>SNOOP</text:p>
          </table:table-cell>
          <table:table-cell table:number-columns-repeated="16378"/>
        </table:table-row>
        <table:table-row table:style-name="ro7">
          <table:table-cell office:value-type="string" calcext:value-type="string">
            <text:p>FairMOT : On the Fairness of Detection and Re-Identification in Multiple Object Tracking</text:p>
          </table:table-cell>
          <table:table-cell table:style-name="ce6" office:value-type="string" calcext:value-type="string">
            <text:p>Yifu Zhang, Chunyu Wang, Xinggang Wang, Wenjun Zeng, Wenyu Liu</text:p>
          </table:table-cell>
          <table:table-cell office:value-type="string" calcext:value-type="string">
            <text:p>Indexation </text:p>
          </table:table-cell>
          <table:table-cell table:style-name="ce5" office:value-type="string" calcext:value-type="string">
            <text:p><text:a xlink:href="https://arxiv.org/abs/2004.01888" xlink:type="simple">https://arxiv.org/abs/2004.01888</text:a></text:p>
          </table:table-cell>
          <table:table-cell table:style-name="ce4" office:value-type="string" calcext:value-type="string">
            <text:p><text:span text:style-name="T1">Article de présentation de l'outil FairMOT, les challenges qu'il relève, ces apports et limites. S'inscrit dans les MOTs, champs d'études pour le suivis, ou </text:span><text:span text:style-name="T2">tracking</text:span><text:span text:style-name="T3">, de différentes entités dans la même vidéos. </text:span></text:p>
          </table:table-cell>
          <table:table-cell table:number-columns-repeated="16379"/>
        </table:table-row>
        <table:table-row table:style-name="ro7">
          <table:table-cell table:style-name="ce7" office:value-type="string" calcext:value-type="string">
            <text:p>Seg2Track-SAM2: SAM2-based Multi-object Tracking and Segmentation</text:p>
          </table:table-cell>
          <table:table-cell table:style-name="ce4" office:value-type="string" calcext:value-type="string">
            <text:p>Diogo Mendonça, Tiago Barros, Cristiano Premebida, Urbano J. Nunes</text:p>
          </table:table-cell>
          <table:table-cell office:value-type="string" calcext:value-type="string">
            <text:p>Indexation </text:p>
          </table:table-cell>
          <table:table-cell table:style-name="ce5" office:value-type="string" calcext:value-type="string">
            <text:p><text:a xlink:href="https://arxiv.org/abs/2509.11772" xlink:type="simple">https://arxiv.org/abs/2509.11772</text:a></text:p>
          </table:table-cell>
          <table:table-cell table:style-name="ce4" office:value-type="string" calcext:value-type="string">
            <text:p><text:span text:style-name="T1">Présentation d'un </text:span><text:span text:style-name="T2">framework</text:span><text:span text:style-name="T3"> basé sur l'utilisation de deux librairies python afin de faire du suivis de cibles mutliples dans une vidéo et de fiabiliser ces résultats dans la durée.</text:span></text:p>
          </table:table-cell>
          <table:table-cell table:number-columns-repeated="16379"/>
        </table:table-row>
        <table:table-row table:style-name="ro8">
          <table:table-cell table:style-name="ce7" office:value-type="string" calcext:value-type="string">
            <text:p>Group Generalized Mean Pooling for Vision Transformer</text:p>
          </table:table-cell>
          <table:table-cell table:style-name="ce4" office:value-type="string" calcext:value-type="string">
            <text:p>Byungsoo Ko, Han-Gyu Kim, Byeongho Heo, Sangdoo Yun, Sanghyuk Chun, Geonmo Gu, Wonjae Kim</text:p>
          </table:table-cell>
          <table:table-cell office:value-type="string" calcext:value-type="string">
            <text:p>Indexation </text:p>
          </table:table-cell>
          <table:table-cell table:style-name="ce5" office:value-type="string" calcext:value-type="string">
            <text:p><text:a xlink:href="https://arxiv.org/abs/2212.04114" xlink:type="simple">https://arxiv.org/abs/2212.04114</text:a></text:p>
          </table:table-cell>
          <table:table-cell office:value-type="string" calcext:value-type="string">
            <text:p>Article de présentation du concept de GeM afin de fiabiliser la reconnaissance de l'architecture afin d'identifier un lieu. </text:p>
          </table:table-cell>
          <table:table-cell table:number-columns-repeated="16379"/>
        </table:table-row>
        <table:table-row table:style-name="ro7">
          <table:table-cell table:style-name="ce7" office:value-type="string" calcext:value-type="string">
            <text:p>PIGEON: Predicting Image Geolocations</text:p>
          </table:table-cell>
          <table:table-cell table:style-name="ce4" office:value-type="string" calcext:value-type="string">
            <text:p>Lukas Haas, Michal Skreta, Silas Alberti, Chelsea Finn</text:p>
          </table:table-cell>
          <table:table-cell office:value-type="string" calcext:value-type="string">
            <text:p>Indexation </text:p>
          </table:table-cell>
          <table:table-cell table:style-name="ce5" office:value-type="string" calcext:value-type="string">
            <text:p><text:a xlink:href="https://arxiv.org/abs/2307.05845" xlink:type="simple">https://arxiv.org/abs/2307.05845</text:a></text:p>
          </table:table-cell>
          <table:table-cell office:value-type="string" calcext:value-type="string">
            <text:p>Présentation d'un outil IA neuronal basé sur différentes technologies afin de pouvvoir estimer une position géographique. Entraîné sur les données de Géoguesseur, il utilise l'analyse de texte et d'image. </text:p>
          </table:table-cell>
          <table:table-cell office:value-type="string" calcext:value-type="string">
            <text:p>Transformers, OCR</text:p>
          </table:table-cell>
          <table:table-cell table:number-columns-repeated="16378"/>
        </table:table-row>
        <table:table-row table:style-name="ro1">
          <table:table-cell/>
          <table:table-cell table:style-name="ce6"/>
          <table:table-cell/>
          <table:table-cell table:style-name="ce5"/>
          <table:table-cell table:number-columns-repeated="16380"/>
        </table:table-row>
        <table:table-row table:style-name="ro2">
          <table:table-cell office:value-type="string" calcext:value-type="string">
            <text:p>Europeana enrichies its data with the AAT</text:p>
          </table:table-cell>
          <table:table-cell table:number-columns-repeated="2"/>
          <table:table-cell table:style-name="ce5" office:value-type="string" calcext:value-type="string">
            <text:p><text:a xlink:href="https://pro.europeana.eu/page/europeana-aat" xlink:type="simple">https://pro.europeana.eu/page/europeana-aat</text:a></text:p>
          </table:table-cell>
          <table:table-cell office:value-type="string" calcext:value-type="string">
            <text:p>Présentation d'un projet mené par Europeana, plateforme européenne numérique, qui vise a concilier indexation automatique par IA et utilisation des Thésaurus notamment l'AAT du GETTY. </text:p>
          </table:table-cell>
          <table:table-cell table:number-columns-repeated="16379"/>
        </table:table-row>
        <table:table-row table:style-name="ro2">
          <table:table-cell office:value-type="string" calcext:value-type="string">
            <text:p>Préparer les archives pour l'ère de l'IA </text:p>
          </table:table-cell>
          <table:table-cell office:value-type="string" calcext:value-type="string">
            <text:p>Memoriav</text:p>
          </table:table-cell>
          <table:table-cell office:value-type="string" calcext:value-type="string">
            <text:p>Indexation </text:p>
          </table:table-cell>
          <table:table-cell table:style-name="ce5" office:value-type="string" calcext:value-type="string">
            <text:p><text:a xlink:href="https://memoriav.ch/fr/actualite/preparer-les-archives-pour-lere-de-lia" xlink:type="simple">https://memoriav.ch/fr/actualite/preparer-les-archives-pour-lere-de-lia</text:a></text:p>
          </table:table-cell>
          <table:table-cell table:style-name="ce4" office:value-type="string" calcext:value-type="string">
            <text:p><text:span text:style-name="T1">Article qui présente des recommandations publiées depuis début 2026 afin par </text:span><text:span text:style-name="T2">Archives &amp; Records Association</text:span><text:span text:style-name="T3"> afin d'aider les archivistes dans cette transition. Cet article reprend les grandes lignes et en souligne l'intérêt pour les archives audiovisuel. </text:span></text:p>
          </table:table-cell>
          <table:table-cell table:number-columns-repeated="16379"/>
        </table:table-row>
        <table:table-row table:style-name="ro7">
          <table:table-cell table:style-name="ce7" office:value-type="string" calcext:value-type="string">
            <text:p>BERT: Pre-training of Deep Bidirectional Transformers for Language Understanding</text:p>
          </table:table-cell>
          <table:table-cell office:value-type="string" calcext:value-type="string">
            <text:p>Jacob Devlin, Mig-Wei Chang, Kenton Lee, Kristina Toutanova</text:p>
          </table:table-cell>
          <table:table-cell office:value-type="string" calcext:value-type="string">
            <text:p>NLP</text:p>
          </table:table-cell>
          <table:table-cell table:style-name="ce5" office:value-type="string" calcext:value-type="string">
            <text:p><text:a xlink:href="https://arxiv.org/abs/1810.04805" xlink:type="simple">https://arxiv.org/abs/1810.04805 </text:a></text:p>
          </table:table-cell>
          <table:table-cell office:value-type="string" calcext:value-type="string">
            <text:p>Article de présentation du projet BERT et de ses avancées. il s'attarde surtout sur l'entraînement du modèle, le besoin et l'objectif final. </text:p>
          </table:table-cell>
          <table:table-cell table:number-columns-repeated="16379"/>
        </table:table-row>
        <table:table-row table:style-name="ro7">
          <table:table-cell table:style-name="ce7" office:value-type="string" calcext:value-type="string">
            <text:p>TaBERT: Pretraining for Joint Understanding of Textual and Tabular Data</text:p>
          </table:table-cell>
          <table:table-cell table:style-name="ce4" office:value-type="string" calcext:value-type="string">
            <text:p>Pengcheng Yin, Graham Neubig, Wen-tau Yih, Sebastian Riedel</text:p>
          </table:table-cell>
          <table:table-cell office:value-type="string" calcext:value-type="string">
            <text:p>NLP</text:p>
          </table:table-cell>
          <table:table-cell table:style-name="ce5" office:value-type="string" calcext:value-type="string">
            <text:p><text:a xlink:href="https://arxiv.org/abs/2005.08314" xlink:type="simple">https://arxiv.org/abs/2005.08314</text:a></text:p>
          </table:table-cell>
          <table:table-cell table:style-name="ce9" office:value-type="string" calcext:value-type="string">
            <text:p><text:span text:style-name="T4">Article qui présente une reprise et amélioration du projet BERT et des technologies mises en places pour se faire. Pousse le modèle BERT jusqu'à la compréhension de base de données </text:span><text:span text:style-name="T5">(tables/colonnes)</text:span><text:span text:style-name="T6">.</text:span></text:p>
          </table:table-cell>
          <table:table-cell table:number-columns-repeated="16379"/>
        </table:table-row>
        <table:table-row table:style-name="ro3">
          <table:table-cell office:value-type="string" calcext:value-type="string">
            <text:p>Saint George on a Bike</text:p>
          </table:table-cell>
          <table:table-cell/>
          <table:table-cell office:value-type="string" calcext:value-type="string">
            <text:p>Indexation</text:p>
          </table:table-cell>
          <table:table-cell table:style-name="ce5" office:value-type="string" calcext:value-type="string">
            <text:p><text:a xlink:href="https://www.digitaltreasures.eu/wp-content/uploads/2021/12/What-AI-can-bring-to-GLAM-Artem-Reshetnikov.pdf" xlink:type="simple">https://www.digitaltreasures.eu/wp-content/uploads/2021/12/What-AI-can-bring-to-GLAM-Artem-Reshetnikov.pdf</text:a></text:p>
          </table:table-cell>
          <table:table-cell table:style-name="ce4" office:value-type="string" calcext:value-type="string">
            <text:p><text:span text:style-name="T1">Article de présentation du projet IA </text:span><text:span text:style-name="T2">Saint George on a Bike.</text:span><text:span text:style-name="T3"> Ce souhaite permettre à l'IA de faire de l'indexation à l'aide de thésaurus. L'idée est de permettre à l'IA de s'adapter à son contexte historique, reconnaîtres des formes et des concepts à partir de ces dernières afin de lié ce concept au mots correspondant dans le Thésaurus</text:span></text:p>
          </table:table-cell>
          <table:table-cell table:number-columns-repeated="16379"/>
        </table:table-row>
        <table:table-row table:style-name="ro1">
          <table:table-cell table:style-name="ce4" office:value-type="string" calcext:value-type="string">
            <text:p><text:span text:style-name="T1">Google Cloud </text:span><text:span text:style-name="T2">Text-to-SQL</text:span><text:span text:style-name="T3"> for Gemini 2.5</text:span></text:p>
          </table:table-cell>
          <table:table-cell office:value-type="string" calcext:value-type="string">
            <text:p>Google</text:p>
          </table:table-cell>
          <table:table-cell office:value-type="string" calcext:value-type="string">
            <text:p>NLP</text:p>
          </table:table-cell>
          <table:table-cell table:style-name="ce5" office:value-type="string" calcext:value-type="string">
            <text:p><text:a xlink:href="https://cloud.google.com/blog/fr/products/bases-de-donnees/comment-obtenir-du-code-sql-de-qualite-avec-lia-decryptage-des-techniques-de-text-to-sql" xlink:type="simple">https://cloud.google.com/blog/fr/products/bases-de-donnees/comment-obtenir-du-code-sql-de-qualite-avec-lia-decryptage-des-techniques-de-text-to-sql</text:a></text:p>
          </table:table-cell>
          <table:table-cell table:style-name="ce4" office:value-type="string" calcext:value-type="string">
            <text:p><text:span text:style-name="T1">Google avec son IA Gémini à réussi à développer et intégré un pipeline </text:span><text:span text:style-name="T2">text-to-SQL</text:span><text:span text:style-name="T3"> afin de générer des requêtes SQL à la volée sur des bases SQL</text:span></text:p>
          </table:table-cell>
          <table:table-cell table:style-name="ce5"/>
          <table:table-cell table:number-columns-repeated="16378"/>
        </table:table-row>
        <table:table-row table:style-name="ro3">
          <table:table-cell office:value-type="string" calcext:value-type="string">
            <text:p>Animer une base de connaissance : des ontologies aux modèles d'IA génératives</text:p>
          </table:table-cell>
          <table:table-cell office:value-type="string" calcext:value-type="string">
            <text:p>Peter Stockinger</text:p>
          </table:table-cell>
          <table:table-cell office:value-type="string" calcext:value-type="string">
            <text:p>Indexation </text:p>
          </table:table-cell>
          <table:table-cell table:style-name="ce5" office:value-type="string" calcext:value-type="string">
            <text:p><text:a xlink:href="https://arxiv.org/pdf/2509.01304" xlink:type="simple">https://arxiv.org/pdf/2509.01304</text:a></text:p>
          </table:table-cell>
          <table:table-cell table:style-name="ce4" office:value-type="string" calcext:value-type="string">
            <text:p><text:span text:style-name="T1">Article qui explore différents environements mis en place par différentes structures pour utiliser l'IA à des fins d'assitances.à l'indexation. Il explore notamment l'environement </text:span><text:span text:style-name="T2">okapi</text:span><text:span text:style-name="T3"> de l'INA qui permet d'extraire des index, de suggérer des mots clés, des propriétés ou encore de localiser des découpage de vidéos tout en observant un Thésaurus. </text:span></text:p>
          </table:table-cell>
          <table:table-cell table:number-columns-repeated="16379"/>
        </table:table-row>
        <table:table-row table:style-name="ro2">
          <table:table-cell office:value-type="string" calcext:value-type="string">
            <text:p>L'intelligence artificielle pour la valorisation des archives télévisuelles </text:p>
          </table:table-cell>
          <table:table-cell office:value-type="string" calcext:value-type="string">
            <text:p>B.Bsir</text:p>
          </table:table-cell>
          <table:table-cell office:value-type="string" calcext:value-type="string">
            <text:p>Indexation </text:p>
          </table:table-cell>
          <table:table-cell table:style-name="ce5" office:value-type="string" calcext:value-type="string">
            <text:p><text:a xlink:href="https://revues.imist.ma/index.php/JIS/article/view/54261/29964" xlink:type="simple">https://revues.imist.ma/index.php/JIS/article/view/54261/29964</text:a></text:p>
          </table:table-cell>
          <table:table-cell office:value-type="string" calcext:value-type="string">
            <text:p>Article qui présente un projet de gestion de collections d'archives télévisées par IA. L'objectif est de permettre l'automatisation de la mise à jour des données des archives.</text:p>
          </table:table-cell>
          <table:table-cell table:number-columns-repeated="16379"/>
        </table:table-row>
        <table:table-row table:style-name="ro3">
          <table:table-cell office:value-type="string" calcext:value-type="string">
            <text:p>Real time application to identifiy facial emotion using CNN and OpenCV</text:p>
          </table:table-cell>
          <table:table-cell table:style-name="ce6" office:value-type="string" calcext:value-type="string">
            <text:p>Sahabdeen Aysha Asra, K.H. Ramanayaka</text:p>
          </table:table-cell>
          <table:table-cell office:value-type="string" calcext:value-type="string">
            <text:p>Indexation </text:p>
          </table:table-cell>
          <table:table-cell table:style-name="ce5" office:value-type="string" calcext:value-type="string">
            <text:p><text:a xlink:href="https://irjss.com/index.php/journal/article/view/26" xlink:type="simple">https://irjss.com/index.php/journal/article/view/26</text:a></text:p>
          </table:table-cell>
          <table:table-cell office:value-type="string" calcext:value-type="string">
            <text:p>Article de recherches qui se concentrent sur la reconnaissance des émotions. Peut être utile afin d'envisager l'indexation de scène selon des thématiques basées sur des émotions "scènes tristes", "scènes de joie" etc. </text:p>
          </table:table-cell>
          <table:table-cell table:number-columns-repeated="16379"/>
        </table:table-row>
        <table:table-row table:style-name="ro4">
          <table:table-cell office:value-type="string" calcext:value-type="string">
            <text:p>The evolving Role of AI in Simulation-based Audiovisual Analysis </text:p>
          </table:table-cell>
          <table:table-cell office:value-type="string" calcext:value-type="string">
            <text:p>Selina Hassan, <text:s/>Ayesha Ahmed, Faisal Wassim Ismael</text:p>
          </table:table-cell>
          <table:table-cell office:value-type="string" calcext:value-type="string">
            <text:p>Indexation </text:p>
          </table:table-cell>
          <table:table-cell table:style-name="ce5" office:value-type="string" calcext:value-type="string">
            <text:p><text:a xlink:href="https://pmc.ncbi.nlm.nih.gov/articles/PMC13091622/" xlink:type="simple">https://pmc.ncbi.nlm.nih.gov/articles/PMC13091622/</text:a></text:p>
          </table:table-cell>
          <table:table-cell office:value-type="string" calcext:value-type="string">
            <text:p>Article qui expose les limites de l'indexation par IA, notamment l'indexation totalement automatisée.</text:p>
          </table:table-cell>
          <table:table-cell table:number-columns-repeated="16379"/>
        </table:table-row>
        <table:table-row table:style-name="ro3">
          <table:table-cell office:value-type="string" calcext:value-type="string">
            <text:p>Projet OKAPI</text:p>
          </table:table-cell>
          <table:table-cell office:value-type="string" calcext:value-type="string">
            <text:p>Equipe de recherche de l'INA</text:p>
          </table:table-cell>
          <table:table-cell office:value-type="string" calcext:value-type="string">
            <text:p>Indexation</text:p>
          </table:table-cell>
          <table:table-cell table:style-name="ce5" office:value-type="string" calcext:value-type="string">
            <text:p><text:a xlink:href="https://www.ina.fr/institut-national-audiovisuel/equipe-recherche/projet-okapi" xlink:type="simple">https://www.ina.fr/institut-national-audiovisuel/equipe-recherche/projet-okapi</text:a></text:p>
          </table:table-cell>
          <table:table-cell office:value-type="string" calcext:value-type="string">
            <text:p>Article qui expose très rapidement ce qu'est le projet OKAPI de l'INA, sa portée et sa composition, et propose quelques liens vers des articles en lien avec ce projet. </text:p>
          </table:table-cell>
          <table:table-cell table:number-columns-repeated="16379"/>
        </table:table-row>
        <table:table-row table:style-name="ro4">
          <table:table-cell office:value-type="string" calcext:value-type="string">
            <text:p>Automatic Detection of Intro and Credits in Video using CLIP and Multihead Attention</text:p>
            <text:p/>
          </table:table-cell>
          <table:table-cell office:value-type="string" calcext:value-type="string">
            <text:p>Vasilii Korolkov, Andrey Yanchenko</text:p>
            <text:p/>
          </table:table-cell>
          <table:table-cell office:value-type="string" calcext:value-type="string">
            <text:p>Indexation</text:p>
          </table:table-cell>
          <table:table-cell table:style-name="ce5" office:value-type="string" calcext:value-type="string">
            <text:p><text:a xlink:href="https://arxiv.org/abs/2504.09738" xlink:type="simple">https://arxiv.org/abs/2504.09738</text:a></text:p>
          </table:table-cell>
          <table:table-cell table:style-name="ce4" office:value-type="string" calcext:value-type="string">
            <text:p><text:span text:style-name="T1">Article qui propose une nouvelle manière de reconnaître et isoler les génériques d'un films de manière automatique dans l'objectif de pouvoir en extraire toutes les métadonnées disponibles </text:span><text:span text:style-name="T2">(titre, réalisateurs, acteur, etc) </text:span></text:p>
          </table:table-cell>
          <table:table-cell table:number-columns-repeated="16379"/>
        </table:table-row>
        <table:table-row table:style-name="ro2">
          <table:table-cell office:value-type="string" calcext:value-type="string">
            <text:p>How to extract Metadata from Scannned document using OCR</text:p>
          </table:table-cell>
          <table:table-cell office:value-type="string" calcext:value-type="string">
            <text:p>Fast.io editorial Team</text:p>
          </table:table-cell>
          <table:table-cell office:value-type="string" calcext:value-type="string">
            <text:p>Indexation</text:p>
          </table:table-cell>
          <table:table-cell table:style-name="ce5" office:value-type="string" calcext:value-type="string">
            <text:p><text:a xlink:href="https://fast.io/resources/ocr-metadata-extraction-scanned-documents/" xlink:type="simple">https://fast.io/resources/ocr-metadata-extraction-scanned-documents/</text:a></text:p>
          </table:table-cell>
          <table:table-cell table:style-name="ce4" office:value-type="string" calcext:value-type="string">
            <text:p><text:span text:style-name="T1">Article présentant le </text:span><text:span text:style-name="T2">pipeline</text:span><text:span text:style-name="T3"> à mettre en place afinn d'extraire de la métadonnés depuis des documents numériques, comme des vidéos.</text:span></text:p>
          </table:table-cell>
          <table:table-cell office:value-type="string" calcext:value-type="string">
            <text:p>ExifTool, PDFPlumber, Apache Tika, </text:p>
          </table:table-cell>
          <table:table-cell office:value-type="string" calcext:value-type="string">
            <text:p>OCR</text:p>
          </table:table-cell>
          <table:table-cell table:number-columns-repeated="16377"/>
        </table:table-row>
        <table:table-row table:style-name="ro2">
          <table:table-cell office:value-type="string" calcext:value-type="string">
            <text:p>L'indexation automatique des archives audiovisuelles privées au prisme des Linked Open Data </text:p>
          </table:table-cell>
          <table:table-cell office:value-type="string" calcext:value-type="string">
            <text:p>Lénaïk Leyoudec</text:p>
          </table:table-cell>
          <table:table-cell office:value-type="string" calcext:value-type="string">
            <text:p>Indexation </text:p>
          </table:table-cell>
          <table:table-cell table:style-name="ce5" office:value-type="string" calcext:value-type="string">
            <text:p><text:a xlink:href="https://intelligibilite-numerique.numerev.com/numeros/n-1-2020/14-l-indexation-automatique-des-archives-audiovisuelles-privees-au-prisme-des-linked-open-data-analyse-semiotique-de-l-architexte-famille" xlink:type="simple">https://intelligibilite-numerique.numerev.com/numeros/n-1-2020/14-l-indexation-automatique-des-archives-audiovisuelles-privees-au-prisme-des-linked-open-data-analyse-semiotique-de-l-architexte-famille</text:a></text:p>
          </table:table-cell>
          <table:table-cell office:value-type="string" calcext:value-type="string">
            <text:p>Article scientifique qui envisage l'indexation automatique dans le cadre de la donnée liée, du web sémantique. L'idée est de mettre l'IA en relation avec des bases de données afin de passer de la transcription de donnnée bruts à une réelle indexation conceptuelle. </text:p>
          </table:table-cell>
          <table:table-cell table:number-columns-repeated="16379"/>
        </table:table-row>
        <table:table-row table:style-name="ro7">
          <table:table-cell office:value-type="string" calcext:value-type="string">
            <text:p>A Comprehensive Survey of Deep Learning for Image Captioning</text:p>
          </table:table-cell>
          <table:table-cell office:value-type="string" calcext:value-type="string">
            <text:p>MD Zakir Hossain, Ferdous Sohel, Mohd Fairuz, Shiratuddin, Hamid laga</text:p>
          </table:table-cell>
          <table:table-cell office:value-type="string" calcext:value-type="string">
            <text:p>Indexation</text:p>
          </table:table-cell>
          <table:table-cell table:style-name="ce5" office:value-type="string" calcext:value-type="string">
            <text:p><text:a xlink:href="https://dl.acm.org/doi/abs/10.1145/3295748?fbclid=IwAR0Yyw_nl2PpaX7ek78wCrh9TBHqa7ytSW5w_Fz4sv5-sx3jAHEYabCvt9c" xlink:type="simple">https://dl.acm.org/doi/abs/10.1145/3295748?fbclid=IwAR0Yyw_nl2PpaX7ek78wCrh9TBHqa7ytSW5w_Fz4sv5-sx3jAHEYabCvt9c</text:a></text:p>
          </table:table-cell>
          <table:table-cell table:style-name="ce4" office:value-type="string" calcext:value-type="string">
            <text:p><text:span text:style-name="T1">Article scientifique qui fait un état des lieux des techniques et technologies de Deep Learning utilisées aujourd'hui pour l'</text:span><text:span text:style-name="T2">image captionning </text:span><text:span text:style-name="T3">qui est la description automatisée d'image.  Chaque techniques et technologies est examinée pour comprendre son fonctionnement et but puis analysé pour souligner sa performance. Les techniques et technologie sont ensuite mis en comparaison afin d'avoir une vue d'ensemble.</text:span></text:p>
          </table:table-cell>
          <table:table-cell office:value-type="string" calcext:value-type="string">
            <text:p>BLIP-2</text:p>
          </table:table-cell>
          <table:table-cell table:number-columns-repeated="16378"/>
        </table:table-row>
        <table:table-row table:style-name="ro3">
          <table:table-cell office:value-type="string" calcext:value-type="string">
            <text:p>BLIP-2: Bootstrapping Language-Image Pre-training with Frozen Image Encoders and Large Language Models</text:p>
            <text:p/>
          </table:table-cell>
          <table:table-cell office:value-type="string" calcext:value-type="string">
            <text:p>Junnan Li, Dongxu Li, Silvio Savarese, Steven Hoi</text:p>
          </table:table-cell>
          <table:table-cell office:value-type="string" calcext:value-type="string">
            <text:p>Indexation </text:p>
          </table:table-cell>
          <table:table-cell table:style-name="ce5" office:value-type="string" calcext:value-type="string">
            <text:p><text:a xlink:href="https://arxiv.org/abs/2301.12597" xlink:type="simple">https://arxiv.org/abs/2301.12597</text:a></text:p>
          </table:table-cell>
          <table:table-cell table:style-name="ce4" office:value-type="string" calcext:value-type="string">
            <text:p><text:span text:style-name="T1">Article de présentation de l'outil BLIP-2 qui est un outil de pré entraînement d'IA pour l'analyse des vidéos et donc l''</text:span><text:span text:style-name="T2">image captionning.</text:span><text:span text:style-name="T3"> </text:span></text:p>
          </table:table-cell>
          <table:table-cell table:number-columns-repeated="16379"/>
        </table:table-row>
        <table:table-row table:style-name="ro2">
          <table:table-cell office:value-type="string" calcext:value-type="string">
            <text:p>Stratégie vidéo et IA : les 10 tendances qui vont marquer 2026</text:p>
          </table:table-cell>
          <table:table-cell office:value-type="string" calcext:value-type="string">
            <text:p>Etienne Caillebotte</text:p>
          </table:table-cell>
          <table:table-cell office:value-type="string" calcext:value-type="string">
            <text:p>Indexation</text:p>
          </table:table-cell>
          <table:table-cell table:style-name="ce5" office:value-type="string" calcext:value-type="string">
            <text:p><text:a xlink:href="https://www.blogdumoderateur.com/strategie-video-ia-10-tendances-marquer-2026/" xlink:type="simple">https://www.blogdumoderateur.com/strategie-video-ia-10-tendances-marquer-2026/</text:a></text:p>
          </table:table-cell>
          <table:table-cell office:value-type="string" calcext:value-type="string">
            <text:p>Article général qui présente les nouvelles technologies dans l'univers de l'analyses des images animés par IA prévue pour 2026. Très intéressant afin de faire un point sur les évolutions à venir et l'impact qu'elles peuvent avoir.</text:p>
          </table:table-cell>
          <table:table-cell/>
          <table:table-cell office:value-type="string" calcext:value-type="string">
            <text:p>AI slop, GEO et AEO, </text:p>
          </table:table-cell>
          <table:table-cell table:number-columns-repeated="16377"/>
        </table:table-row>
        <table:table-row table:style-name="ro8">
          <table:table-cell office:value-type="string" calcext:value-type="string">
            <text:p>A novel NLP-driven approach for enriching artefact descriptions, provenance, and entities in cultural heritage</text:p>
          </table:table-cell>
          <table:table-cell office:value-type="string" calcext:value-type="string">
            <text:p>Sara Ferro, Riccardo Giovanelli, Madison Leeson, Michela De Bernardin &amp; Arianna Traviglia</text:p>
          </table:table-cell>
          <table:table-cell office:value-type="string" calcext:value-type="string">
            <text:p>NLP</text:p>
          </table:table-cell>
          <table:table-cell table:style-name="ce5" office:value-type="string" calcext:value-type="string">
            <text:p><text:a xlink:href="https://link.springer.com/article/10.1007/s00521-025-11449-2" xlink:type="simple">https://link.springer.com/article/10.1007/s00521-025-11449-2</text:a></text:p>
          </table:table-cell>
          <table:table-cell office:value-type="string" calcext:value-type="string">
            <text:p>Article qui explique le projet RITHMS qui consistait à construire une base SQL structurée à partir de donnée textuelle brutes à l'aide de LLM et de NLP</text:p>
          </table:table-cell>
          <table:table-cell table:number-columns-repeated="16379"/>
        </table:table-row>
        <table:table-row table:style-name="ro5">
          <table:table-cell office:value-type="string" calcext:value-type="string">
            <text:p>LEAF-SQL: Level-wise Exploration with Adaptive Fine-graining for Text-to-SQL Skeleton Prediction</text:p>
          </table:table-cell>
          <table:table-cell office:value-type="string" calcext:value-type="string">
            <text:p>Zhao Tan, Xiping Liu, Qing Shu, Qizhi Wan, Dexi Liu, Changxuan Wan</text:p>
            <text:p/>
          </table:table-cell>
          <table:table-cell office:value-type="string" calcext:value-type="string">
            <text:p>NLP</text:p>
          </table:table-cell>
          <table:table-cell table:style-name="ce5" office:value-type="string" calcext:value-type="string">
            <text:p><text:a xlink:href="https://arxiv.org/abs/2605.09295" xlink:type="simple">https://arxiv.org/abs/2605.09295</text:a></text:p>
          </table:table-cell>
          <table:table-cell table:style-name="ce4" office:value-type="string" calcext:value-type="string">
            <text:p><text:span text:style-name="T1">Une des grandes difficultés du </text:span><text:span text:style-name="T2">text-to-sql </text:span><text:span text:style-name="T3">c'est la génération de requête complexe. Pour cela, des </text:span><text:span text:style-name="T2">pipelines</text:span><text:span text:style-name="T3"> mettent à disposition des squelettes de requêtes afin que le LLM puisse partir d'une base fiable. Cet article vise à proposer un </text:span><text:span text:style-name="T2">pipeline</text:span><text:span text:style-name="T3"> plus solie et fiable pour l'intégration et l'utilisation de ces requêtes squelettes.</text:span></text:p>
          </table:table-cell>
          <table:table-cell table:number-columns-repeated="16379"/>
        </table:table-row>
        <table:table-row table:style-name="ro6">
          <table:table-cell office:value-type="string" calcext:value-type="string">
            <text:p>FINER-SQL: Boosting Small Language Models for Text-to-SQL</text:p>
          </table:table-cell>
          <table:table-cell office:value-type="string" calcext:value-type="string">
            <text:p>Thanh Dat Hoang, Thanh Trung Huynh, Matthias Weidlich, Thanh Tam Nguyen, Tong Chen, Hongzhi Yin, Quoc Viet Hung Nguyen</text:p>
          </table:table-cell>
          <table:table-cell office:value-type="string" calcext:value-type="string">
            <text:p>NLP</text:p>
          </table:table-cell>
          <table:table-cell table:style-name="ce5" office:value-type="string" calcext:value-type="string">
            <text:p><text:a xlink:href="https://arxiv.org/abs/2605.03465" xlink:type="simple">https://arxiv.org/abs/2605.03465</text:a></text:p>
          </table:table-cell>
          <table:table-cell table:style-name="ce4" office:value-type="string" calcext:value-type="string">
            <text:p><text:span text:style-name="T1">Article scientifique qui proposer des solutions afin de pousser l'efficacité de petits moodèles de langues à leurs maximums sur du </text:span><text:span text:style-name="T2">text-to-sql</text:span><text:span text:style-name="T3">. L'idée générale est d'explorer des moyens de compenser le faible raisonement qu'offrent ces petits modèles de langues. Le moyen pensé est un framework de renforcement d'apprentissage de ces petits modèles en optimisant leurs capacités. </text:span><text:span text:style-name="T2">Ministral, LLAMA, GEMMA, GPT-4o Mini sont des petits modèles de langues ou SLMs en opposition à LLMs.</text:span></text:p>
          </table:table-cell>
          <table:table-cell table:number-columns-repeated="16379"/>
        </table:table-row>
        <table:table-row table:style-name="ro8">
          <table:table-cell office:value-type="string" calcext:value-type="string">
            <text:p>FlexSQL: Flexible Exploration and Execution Make Better Text-to-SQL Agents</text:p>
          </table:table-cell>
          <table:table-cell office:value-type="string" calcext:value-type="string">
            <text:p>Quang Hieu Pham, Yang He, Ping Nie, Canwen Xu, Davood Rafiei, Yuepeng Wang, Xi Ye, Jocelyn Qiaochu Chen</text:p>
          </table:table-cell>
          <table:table-cell office:value-type="string" calcext:value-type="string">
            <text:p>NLP</text:p>
          </table:table-cell>
          <table:table-cell table:style-name="ce5" office:value-type="string" calcext:value-type="string">
            <text:p><text:a xlink:href="https://arxiv.org/abs/2605.02815" xlink:type="simple">https://arxiv.org/abs/2605.02815</text:a></text:p>
          </table:table-cell>
          <table:table-cell table:style-name="ce4" office:value-type="string" calcext:value-type="string">
            <text:p><text:span text:style-name="T1">Cet article souligne que dans un pipeline </text:span><text:span text:style-name="T2">text-to-sql</text:span><text:span text:style-name="T3"> classique, l'interprétation de la base de donnée est faites en amont et parfois avec des erreurs de lectures et/ou de compréhension. Cela peut amener à fausser les requêtes générées. Ici , il est proposé un agent IA qui permettrait de fiabiliser la génératio de requête en créant un processus itératif d'analyse de la base SQL à différents moments afin de détecter de potentielles erreurs non détectées, etc. </text:span></text:p>
          </table:table-cell>
          <table:table-cell table:number-columns-repeated="16379"/>
        </table:table-row>
        <table:table-row table:style-name="ro5">
          <table:table-cell office:value-type="string" calcext:value-type="string">
            <text:p>SQLStructEval: Structural Evaluation of LLM Text-to-SQL Generation</text:p>
          </table:table-cell>
          <table:table-cell office:value-type="string" calcext:value-type="string">
            <text:p>Yixi Zhou, Fan Zhang, Zhiqiao Guo, Yu Chen, Haipeng Zhang, Preslav Nakov, Zhuohan Xie</text:p>
          </table:table-cell>
          <table:table-cell office:value-type="string" calcext:value-type="string">
            <text:p>NLP</text:p>
          </table:table-cell>
          <table:table-cell table:style-name="ce5" office:value-type="string" calcext:value-type="string">
            <text:p><text:a xlink:href="https://arxiv.org/abs/2604.06736" xlink:type="simple">https://arxiv.org/abs/2604.06736</text:a></text:p>
          </table:table-cell>
          <table:table-cell table:style-name="ce4" office:value-type="string" calcext:value-type="string">
            <text:p><text:span text:style-name="T1">Cet article se concentre sur le fait que les requêtes générées par LLM sont parfois syntaxiquement mauvaise et/ou soumises à de trop grande variations sur des changements minimes lors du requêtage en langage naturel. L'article précédent avait pour solution d'augmenter la fréquence d'analyser de la base SQL. Cet article propose une solution alternative. Un </text:span><text:span text:style-name="T2">framework </text:span><text:span text:style-name="T3">qui analyse le squelette des requêtes générées, les corriges et surtout les homogénéise en contrôlant plus les changements fait par le LLM sur des requêtes en langage naturel différentes. </text:span></text:p>
          </table:table-cell>
          <table:table-cell table:number-columns-repeated="16379"/>
        </table:table-row>
        <table:table-row table:style-name="ro13">
          <table:table-cell office:value-type="string" calcext:value-type="string">
            <text:p>Can AI Agents Answer Your Data Questions? A Benchmark for Data Agents</text:p>
          </table:table-cell>
          <table:table-cell office:value-type="string" calcext:value-type="string">
            <text:p>Ruiying Ma, Shreya Shankar, Ruiqi Chen, Yiming Lin, Sepanta Zeighami, Rajoshi Ghosh, Abhinav Gupta, Anushrut Gupta, Tanmai Gopal, Aditya G. Parameswaran</text:p>
          </table:table-cell>
          <table:table-cell office:value-type="string" calcext:value-type="string">
            <text:p>NLP</text:p>
          </table:table-cell>
          <table:table-cell table:style-name="ce5" office:value-type="string" calcext:value-type="string">
            <text:p><text:a xlink:href="https://arxiv.org/abs/2603.20576" xlink:type="simple">https://arxiv.org/abs/2603.20576</text:a></text:p>
          </table:table-cell>
          <table:table-cell table:style-name="ce4" office:value-type="string" calcext:value-type="string">
            <text:p><text:span text:style-name="T1">Article de réflexions sur la capacité des agent IA à faire du </text:span><text:span text:style-name="T2">text-to-SQL</text:span><text:span text:style-name="T3"> sur nos données et benchmark fait via un outil, </text:span><text:span text:style-name="T2">Data Agent Benchmark</text:span><text:span text:style-name="T3">,  sur 5 LLMs. </text:span></text:p>
          </table:table-cell>
          <table:table-cell table:number-columns-repeated="16379"/>
        </table:table-row>
        <table:table-row table:style-name="ro7">
          <table:table-cell office:value-type="string" calcext:value-type="string">
            <text:p>Draft-Refine-Optimize: Self-Evolved Learning for Natural Language to MongoDB Query Generation</text:p>
          </table:table-cell>
          <table:table-cell office:value-type="string" calcext:value-type="string">
            <text:p>Mingwei Ye, Jiaxi Zhuang, Mingjun Xu, Linfeng Zhang, Guolin Ke, Hengxing Cai</text:p>
          </table:table-cell>
          <table:table-cell office:value-type="string" calcext:value-type="string">
            <text:p>NLP-nosql</text:p>
          </table:table-cell>
          <table:table-cell table:style-name="ce5" office:value-type="string" calcext:value-type="string">
            <text:p><text:a xlink:href="https://arxiv.org/abs/2604.13045" xlink:type="simple">https://arxiv.org/abs/2604.13045</text:a></text:p>
          </table:table-cell>
          <table:table-cell table:style-name="ce4" office:value-type="string" calcext:value-type="string">
            <text:p><text:span text:style-name="T1">Cet article interroge la manière d'intégrer le </text:span><text:span text:style-name="T2">text-to-SQL </text:span><text:span text:style-name="T3">à des environements </text:span><text:span text:style-name="T2">No-SQL</text:span><text:span text:style-name="T3"> comme MongoDB. </text:span></text:p>
          </table:table-cell>
          <table:table-cell table:number-columns-repeated="16379"/>
        </table:table-row>
        <table:table-row table:style-name="ro8">
          <table:table-cell office:value-type="string" calcext:value-type="string">
            <text:p>Bridging the Gap: Enabling Natural Language Queries for NoSQL Databases through Text-to-NoSQL Translation</text:p>
          </table:table-cell>
          <table:table-cell office:value-type="string" calcext:value-type="string">
            <text:p>Jinwei Lu, Yuanfeng Song, Zhiqian Qin, Haodi Zhang, Chen Zhang, Raymond Chi-Wing Wong</text:p>
          </table:table-cell>
          <table:table-cell office:value-type="string" calcext:value-type="string">
            <text:p>NLP-nosql</text:p>
          </table:table-cell>
          <table:table-cell table:style-name="ce5" office:value-type="string" calcext:value-type="string">
            <text:p><text:a xlink:href="https://arxiv.org/html/2502.11201v1" xlink:type="simple">https://arxiv.org/html/2502.11201v1</text:a></text:p>
          </table:table-cell>
          <table:table-cell table:style-name="ce4" office:value-type="string" calcext:value-type="string">
            <text:p><text:span text:style-name="T1">Article qui propose d'appliquer et adapter le pipeline </text:span><text:span text:style-name="T2">text-to-sql</text:span><text:span text:style-name="T3"> à une base de donnée noSQL. Les outils restent les mêmes et le concept global également. Il présente un nouvel outil, SMART qui est conçu pour les conversionsdu langage naturel vers le nosql. Le pipeline proposé semble prendre en charge la convertion d'une base SQL en noSQL en amont du process, une étape supplémentaire qui n'existe pas dans le pipeline </text:span><text:span text:style-name="T2">text-to-sql</text:span><text:span text:style-name="T3"> de base. </text:span></text:p>
          </table:table-cell>
          <table:table-cell table:style-name="ce4" office:value-type="string" calcext:value-type="string">
            <text:p><text:span text:style-name="T1">TEND </text:span><text:span text:style-name="T2">(text-to-nosql-dataset)</text:span><text:span text:style-name="T3">, SLM, RAG, SMART</text:span></text:p>
          </table:table-cell>
          <table:table-cell table:number-columns-repeated="16378"/>
        </table:table-row>
        <table:table-row table:style-name="ro1">
          <table:table-cell office:value-type="string" calcext:value-type="string">
            <text:p>Text to NSQL </text:p>
          </table:table-cell>
          <table:table-cell office:value-type="string" calcext:value-type="string">
            <text:p>Query Loop</text:p>
          </table:table-cell>
          <table:table-cell office:value-type="string" calcext:value-type="string">
            <text:p>NLP</text:p>
          </table:table-cell>
          <table:table-cell table:style-name="ce5" office:value-type="string" calcext:value-type="string">
            <text:p><text:a xlink:href="https://docs.queryloop.ai/features/text-to-nosql/" xlink:type="simple">https://docs.queryloop.ai/features/text-to-nosql/</text:a></text:p>
          </table:table-cell>
          <table:table-cell table:style-name="ce4" office:value-type="string" calcext:value-type="string">
            <text:p><text:span text:style-name="T1">Article qui présente le pipeline déployé par l'outil QueryLoop afin de faire de la conversion </text:span><text:span text:style-name="T2">text-to-nosql. </text:span><text:span text:style-name="T3">Présente. également les outils utilisé.</text:span></text:p>
          </table:table-cell>
          <table:table-cell office:value-type="string" calcext:value-type="string">
            <text:p>GPT-4o-mini model, MongoDB</text:p>
          </table:table-cell>
          <table:table-cell table:number-columns-repeated="16378"/>
        </table:table-row>
        <table:table-row table:style-name="ro5">
          <table:table-cell office:value-type="string" calcext:value-type="string">
            <text:p>BERT Model-based Natural Language to NoSQL Query Conversion using Deep Learning Approach</text:p>
            <text:p/>
          </table:table-cell>
          <table:table-cell office:value-type="string" calcext:value-type="string">
            <text:p>Kazi Mojammel Hossen, Mohammed Nasir Uddin, Minhazul Arefin, Md Ashraf Uddin</text:p>
          </table:table-cell>
          <table:table-cell office:value-type="string" calcext:value-type="string">
            <text:p>NLP-nosql</text:p>
          </table:table-cell>
          <table:table-cell table:style-name="ce5" office:value-type="string" calcext:value-type="string">
            <text:p><text:a xlink:href="https://www.researchgate.net/publication/369057820_BERT_Model-based_Natural_Language_to_NoSQL_Query_Conversion_using_Deep_Learning_Approach" xlink:type="simple">https://www.researchgate.net/publication/369057820_BERT_Model-based_Natural_Language_to_NoSQL_Query_Conversion_using_Deep_Learning_Approach</text:a></text:p>
          </table:table-cell>
          <table:table-cell table:style-name="ce4" office:value-type="string" calcext:value-type="string">
            <text:p><text:span text:style-name="T1">Cet article propose de revisiter le </text:span><text:span text:style-name="T2">text-to-SQL</text:span><text:span text:style-name="T3"> afin de l'adapter aux bases NoSQL en partant de l'origine de ce pipeline : le modèle BERT. Le modèle BERT est repris et combiné à des réseaux de neuronnes profonds afin de pouvoir convertir des requêtes formulée en langage naturel en requête NoSQL. Article très détaillé sur le procédé mis en place et les résultats obtenus. </text:span></text:p>
          </table:table-cell>
          <table:table-cell table:number-columns-repeated="16379"/>
        </table:table-row>
        <table:table-row table:style-name="ro3">
          <table:table-cell office:value-type="string" calcext:value-type="string">
            <text:p>Natural language querying on NoSQL Databases : Opportunities and Challenges</text:p>
          </table:table-cell>
          <table:table-cell office:value-type="string" calcext:value-type="string">
            <text:p>Wenlong Zhang, Tian Shi, Ping Wang</text:p>
          </table:table-cell>
          <table:table-cell office:value-type="string" calcext:value-type="string">
            <text:p>NLP-nosql</text:p>
          </table:table-cell>
          <table:table-cell table:style-name="ce5" office:value-type="string" calcext:value-type="string">
            <text:p><text:a xlink:href="https://ieeexplore.ieee.org/document/10825998" xlink:type="simple">https://ieeexplore.ieee.org/document/10825998</text:a></text:p>
          </table:table-cell>
          <table:table-cell office:value-type="string" calcext:value-type="string">
            <text:p>Article de réflexion sur les défis et potentiels solutions quant à l'interrogation en langage naturel d'une base de donnée NoSQL. Très utiles pour explorer les piste d'avenirs.</text:p>
          </table:table-cell>
          <table:table-cell table:number-columns-repeated="16379"/>
        </table:table-row>
        <table:table-row table:style-name="ro4">
          <table:table-cell office:value-type="string" calcext:value-type="string">
            <text:p>The futur of database queries : evaluating text-to-SQL and text-to-noSQL with AI</text:p>
          </table:table-cell>
          <table:table-cell office:value-type="string" calcext:value-type="string">
            <text:p>Auzair - Medium</text:p>
          </table:table-cell>
          <table:table-cell office:value-type="string" calcext:value-type="string">
            <text:p>NLP-nosql</text:p>
          </table:table-cell>
          <table:table-cell table:style-name="ce5" office:value-type="string" calcext:value-type="string">
            <text:p><text:a xlink:href="https://medium.com/@auzair2011/the-future-of-database-queries-evaluating-text-to-sql-and-text-to-nosql-with-ai-bcb4e767cfee" xlink:type="simple">https://medium.com/@auzair2011/the-future-of-database-queries-evaluating-text-to-sql-and-text-to-nosql-with-ai-bcb4e767cfee</text:a></text:p>
          </table:table-cell>
          <table:table-cell table:style-name="ce4" office:value-type="string" calcext:value-type="string">
            <text:p><text:span text:style-name="T1">Article qui permet de comparer les deux approches, les deux pipelines, en expliquant leurs différences, et qui se focus sur l'application d'un piepline approprié à une base MongoDB. Il semblerait que le principal challenge soit dans la gestion des pipelines d'agrégations propre à MongoDB, en dehors de ça la structure reste identique ou presque. Fait aussi une remarque général : le </text:span><text:span text:style-name="T2">text-to-SQL</text:span><text:span text:style-name="T3"> est aujourd'hui mieux maitriser et développé que le </text:span><text:span text:style-name="T2">text-to-noSQL. </text:span><text:span text:style-name="T3">Ainsi, ce nouveau pipeline à tendance à être plus lent et moins précis à cause de son aspect expérimental et nouveau. </text:span></text:p>
          </table:table-cell>
          <table:table-cell table:number-columns-repeated="16379"/>
        </table:table-row>
        <table:table-row table:style-name="ro3">
          <table:table-cell office:value-type="string" calcext:value-type="string">
            <text:p>Natural language interface for NoSQL document-oriented database</text:p>
          </table:table-cell>
          <table:table-cell office:value-type="string" calcext:value-type="string">
            <text:p>?</text:p>
          </table:table-cell>
          <table:table-cell office:value-type="string" calcext:value-type="string">
            <text:p>NLP-nosql</text:p>
          </table:table-cell>
          <table:table-cell table:style-name="ce5" office:value-type="string" calcext:value-type="string">
            <text:p><text:a xlink:href="https://link.springer.com/chapter/10.1007/978-3-032-18857-1_45" xlink:type="simple">https://link.springer.com/chapter/10.1007/978-3-032-18857-1_45</text:a></text:p>
          </table:table-cell>
          <table:table-cell table:style-name="ce4" office:value-type="string" calcext:value-type="string">
            <text:p><text:span text:style-name="T1">Article qui nourris la réflexion autour de la création d'un pipeline </text:span><text:span text:style-name="T2">text-to-noSQL</text:span><text:span text:style-name="T3"> avec un focus sur les databse orientée documents en NoSQL </text:span><text:span text:style-name="T2">(MongoDB en est une)</text:span><text:span text:style-name="T3">. L'idée de l'article est de trouver des pistes afin de développer un IA capable de comprendre le NoSQL, ce qui n'est pas encore largement le cas, afin de comprendre ainsi ces bases de données. </text:span></text:p>
          </table:table-cell>
          <table:table-cell table:number-columns-repeated="16379"/>
        </table:table-row>
        <table:table-row table:style-name="ro6">
          <table:table-cell office:value-type="string" calcext:value-type="string">
            <text:p>Query intelligence : A natural language interface to SQL and NoSQL databases using AI</text:p>
          </table:table-cell>
          <table:table-cell office:value-type="string" calcext:value-type="string">
            <text:p>Suraj Kiran Chougale, Sanket Sarjerao More-Patil, Udaysinh Uttamrav Patil, Varad Shailesh Bhise, Mrs. Trupti H. Mulik</text:p>
          </table:table-cell>
          <table:table-cell office:value-type="string" calcext:value-type="string">
            <text:p>NLP-nosql</text:p>
          </table:table-cell>
          <table:table-cell table:style-name="ce5" office:value-type="string" calcext:value-type="string">
            <text:p><text:a xlink:href="https://www.irjmets.com/upload_newfiles/irjmets80500063449/paper_file/irjmets80500063449.pdf" xlink:type="simple">https://www.irjmets.com/upload_newfiles/irjmets80500063449/paper_file/irjmets80500063449.pdf</text:a></text:p>
          </table:table-cell>
          <table:table-cell table:style-name="ce4" office:value-type="string" calcext:value-type="string">
            <text:p><text:span text:style-name="T1">Article de réflexion et de proposition de solutions sur l'accès et l'interrogeabilité des bases de données par l'intelligence artificielle. L'article mène deux axes : le </text:span><text:span text:style-name="T2">text-to-sql</text:span><text:span text:style-name="T3"> avec l'application LangChain SQL et le </text:span><text:span text:style-name="T2">text-to-noSQL</text:span></text:p>
          </table:table-cell>
          <table:table-cell table:number-columns-repeated="16379"/>
        </table:table-row>
        <table:table-row table:style-name="ro3">
          <table:table-cell office:value-type="string" calcext:value-type="string">
            <text:p>Natural Language to NoSQL query conversion using deep learning</text:p>
          </table:table-cell>
          <table:table-cell office:value-type="string" calcext:value-type="string">
            <text:p>?</text:p>
          </table:table-cell>
          <table:table-cell office:value-type="string" calcext:value-type="string">
            <text:p>NLP-nosql</text:p>
          </table:table-cell>
          <table:table-cell table:style-name="ce5" office:value-type="string" calcext:value-type="string">
            <text:p><text:a xlink:href="https://papers.ssrn.com/sol3/papers.cfm?abstract_id=3436631" xlink:type="simple">https://papers.ssrn.com/sol3/papers.cfm?abstract_id=3436631</text:a></text:p>
          </table:table-cell>
          <table:table-cell office:value-type="string" calcext:value-type="string">
            <text:p>Article qui propose une réflexion sur la manière d'utiliser le deep learning et des réseaux de neuronnes profonds pour la traduction d'une requête en langage naturel en langage NoSQL. L'article va jusqu'à proposé un système d'utilisation de ces réseaux de neuronnes profonds qui ont déjà fait leurs preuves sur MongoDB. </text:p>
          </table:table-cell>
          <table:table-cell table:number-columns-repeated="16379"/>
        </table:table-row>
        <table:table-row table:style-name="ro2">
          <table:table-cell office:value-type="string" calcext:value-type="string">
            <text:p>Natural Language Processing with NoSQL</text:p>
          </table:table-cell>
          <table:table-cell office:value-type="string" calcext:value-type="string">
            <text:p>Meegle</text:p>
          </table:table-cell>
          <table:table-cell office:value-type="string" calcext:value-type="string">
            <text:p>NLP-nosql</text:p>
          </table:table-cell>
          <table:table-cell table:style-name="ce5" office:value-type="string" calcext:value-type="string">
            <text:p><text:a xlink:href="https://www.meegle.com/en_us/topics/nosql/natural-language-processing-with-nosql" xlink:type="simple">https://www.meegle.com/en_us/topics/nosql/natural-language-processing-with-nosql</text:a></text:p>
          </table:table-cell>
          <table:table-cell table:style-name="ce4" office:value-type="string" calcext:value-type="string">
            <text:p><text:span text:style-name="T1">Article qui explique comment appliquer du traitement NLP à une base de données NoSQL. Il présente les points d'attentions, quelques recommandations et tips, quelques exemples de process à mettre en place et différentes profondeurs de traitements </text:span><text:span text:style-name="T2">(basique/avancée)</text:span></text:p>
          </table:table-cell>
          <table:table-cell table:number-columns-repeated="16379"/>
        </table:table-row>
        <table:table-row table:style-name="ro1" table:number-rows-repeated="1048483">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swiss" style:font-pitch="variable"/>
    <style:font-face style:name="Calibri" svg:font-family="Calibri" style:font-family-generic="swiss"/>
    <style:font-face style:name="Calibri1" svg:font-family="Calibri"/>
    <style:font-face style:name="Calibri2" svg:font-family="Calibri"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29P0" style:volatile="true">
      <number:currency-symbol/>
      <number:number number:decimal-places="0" number:min-decimal-places="0" number:min-integer-digits="1" number:grouping="true"/>
      <number:text loext:blank-width-char=")"> </number:text>
    </number:currency-style>
    <number:currency-style style:name="N129">
      <number:text>(</number:text>
      <number:currency-symbol/>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number number:decimal-places="0" number:min-decimal-places="0" number:min-integer-digits="1" number:grouping="true"/>
      <number:text loext:blank-width-char=")"> </number:text>
    </number:currency-style>
    <number:currency-style style:name="N130">
      <style:text-properties fo:color="#ff000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2" number:min-decimal-places="2" number:min-integer-digits="1" number:grouping="true"/>
      <number:text loext:blank-width-char=")"> </number:text>
    </number:currency-style>
    <number:currency-style style:name="N131">
      <number:text>(</number:text>
      <number:currency-symbol/>
      <number:number number:decimal-places="2" number:min-decimal-places="2" number:min-integer-digits="1" number:grouping="true"/>
      <number:text>)</number:text>
      <style:map style:condition="value()&gt;=0" style:apply-style-name="N131P0"/>
    </number:currency-style>
    <number:currency-style style:name="N132P0" style:volatile="true">
      <number:currency-symbol/>
      <number:number number:decimal-places="2" number:min-decimal-places="2" number:min-integer-digits="1" number:grouping="true"/>
      <number:text loext:blank-width-char=")"> </number:text>
    </number:currency-style>
    <number:currency-style style:name="N132">
      <style:text-properties fo:color="#ff0000"/>
      <number:text>(</number:text>
      <number:currency-symbol/>
      <number:number number:decimal-places="2" number:min-decimal-places="2" number:min-integer-digits="1" number:grouping="true"/>
      <number:text>)</number:text>
      <style:map style:condition="value()&gt;=0" style:apply-style-name="N132P0"/>
    </number:currency-style>
    <number:date-style style:name="N133">
      <number:month/>
      <number:text>/</number:text>
      <number:day/>
      <number:text>/</number:text>
      <number:year number:style="long"/>
    </number:date-style>
    <number:date-style style:name="N134">
      <number:day/>
      <number:text>-</number:text>
      <number:month number:textual="true"/>
      <number:text>-</number:text>
      <number:year/>
    </number:date-style>
    <number:date-style style:name="N135">
      <number:day/>
      <number:text>-</number:text>
      <number:month number:textual="true"/>
    </number:date-style>
    <number:date-style style:name="N136">
      <number:month number:textual="true"/>
      <number:text>-</number:text>
      <number:year/>
    </number:date-style>
    <number:time-style style:name="N137">
      <number:hours/>
      <number:text>:</number:text>
      <number:minutes number:style="long"/>
      <number:text> </number:text>
      <number:am-pm/>
    </number:time-style>
    <number:time-style style:name="N138">
      <number:hours/>
      <number:text>:</number:text>
      <number:minutes number:style="long"/>
      <number:text>:</number:text>
      <number:seconds number:style="long"/>
      <number:text> </number:text>
      <number:am-pm/>
    </number:time-style>
    <number:time-style style:name="N139">
      <number:hours/>
      <number:text>:</number:text>
      <number:minutes number:style="long"/>
    </number:time-style>
    <number:time-style style:name="N140">
      <number:hours/>
      <number:text>:</number:text>
      <number:minutes number:style="long"/>
      <number:text>:</number:text>
      <number:seconds number:style="long"/>
    </number:time-style>
    <number:date-style style:name="N141">
      <number:month/>
      <number:text>/</number:text>
      <number:day/>
      <number:text>/</number:text>
      <number:year number:style="long"/>
      <number:text> </number:text>
      <number:hours/>
      <number:text>:</number:text>
      <number:minutes number:style="long"/>
    </number:date-style>
    <number:number-style style:name="N142P0" style:volatile="true">
      <number:number number:decimal-places="0" number:min-decimal-places="0" number:min-integer-digits="1" number:grouping="true"/>
      <number:text loext:blank-width-char=")"> </number:text>
    </number:number-style>
    <number:number-style style:name="N142">
      <style:text-properties fo:color="#ff0000"/>
      <number:text>(</number:text>
      <number:number number:decimal-places="0" number:min-decimal-places="0" number:min-integer-digits="1" number:grouping="true"/>
      <number:text>)</number:text>
      <style:map style:condition="value()&gt;=0" style:apply-style-name="N142P0"/>
    </number:number-style>
    <number:number-style style:name="N143P0" style:volatile="true">
      <number:number number:decimal-places="2" number:min-decimal-places="2" number:min-integer-digits="1" number:grouping="true"/>
      <number:text loext:blank-width-char=")"> </number:text>
    </number:number-style>
    <number:number-style style:name="N143">
      <style:text-properties fo:color="#ff0000"/>
      <number:text>(</number:text>
      <number:number number:decimal-places="2" number:min-decimal-places="2" number:min-integer-digits="1" number:grouping="true"/>
      <number:text>)</number:text>
      <style:map style:condition="value()&gt;=0" style:apply-style-name="N143P0"/>
    </number:number-style>
    <number:number-style style:name="N144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44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44P2" style:volatile="true">
      <number:text loext:blank-width-char="("> </number:text>
      <number:fill-character> </number:fill-character>
      <number:text loext:blank-width-char=")1">- </number:text>
    </number:number-style>
    <number:text-style style:name="N144">
      <number:text loext:blank-width-char="("> </number:text>
      <number:text-content/>
      <number:text loext:blank-width-char=")"> </number:text>
      <style:map style:condition="value()&gt;0" style:apply-style-name="N144P0"/>
      <style:map style:condition="value()&lt;0" style:apply-style-name="N144P1"/>
      <style:map style:condition="value()=0" style:apply-style-name="N144P2"/>
    </number:text-style>
    <number:currency-style style:name="N145P0" style:volatile="true">
      <number:text loext:blank-width-char="("> </number:text>
      <number:currency-symbol/>
      <number:fill-character> </number:fill-character>
      <number:number number:decimal-places="0" number:min-decimal-places="0" number:min-integer-digits="1" number:grouping="true"/>
      <number:text loext:blank-width-char=")"> </number:text>
    </number:currency-style>
    <number:currency-style style:name="N14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45P2" style:volatile="true">
      <number:text loext:blank-width-char="("> </number:text>
      <number:currency-symbol/>
      <number:fill-character> </number:fill-character>
      <number:text loext:blank-width-char=")1">- </number:text>
    </number:currency-style>
    <number:text-style style:name="N145">
      <number:text loext:blank-width-char="("> </number:text>
      <number:text-content/>
      <number:text loext:blank-width-char=")"> </number:text>
      <style:map style:condition="value()&gt;0" style:apply-style-name="N145P0"/>
      <style:map style:condition="value()&lt;0" style:apply-style-name="N145P1"/>
      <style:map style:condition="value()=0" style:apply-style-name="N145P2"/>
    </number:text-style>
    <number:number-style style:name="N146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6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46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6">
      <number:text loext:blank-width-char="("> </number:text>
      <number:text-content/>
      <number:text loext:blank-width-char=")"> </number:text>
      <style:map style:condition="value()&gt;0" style:apply-style-name="N146P0"/>
      <style:map style:condition="value()&lt;0" style:apply-style-name="N146P1"/>
      <style:map style:condition="value()=0" style:apply-style-name="N146P2"/>
    </number:text-style>
    <number:currency-style style:name="N147P0" style:volatile="true">
      <number:text loext:blank-width-char="("> </number:text>
      <number:currency-symbol/>
      <number:fill-character> </number:fill-character>
      <number:number number:decimal-places="2" number:min-decimal-places="2" number:min-integer-digits="1" number:grouping="true"/>
      <number:text loext:blank-width-char=")"> </number:text>
    </number:currency-style>
    <number:currency-style style:name="N147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47P2" style:volatile="true">
      <number:text loext:blank-width-char="("> </number:text>
      <number:currency-symbol/>
      <number:fill-character> </number:fill-character>
      <number:text>-</number:text>
      <number:number number:decimal-places="0" number:min-decimal-places="0" number:min-integer-digits="2" loext:max-blank-integer-digits="2"/>
      <number:text loext:blank-width-char=")"> </number:text>
    </number:currency-style>
    <number:text-style style:name="N147">
      <number:text loext:blank-width-char="("> </number:text>
      <number:text-content/>
      <number:text loext:blank-width-char=")"> </number:text>
      <style:map style:condition="value()&gt;0" style:apply-style-name="N147P0"/>
      <style:map style:condition="value()&lt;0" style:apply-style-name="N147P1"/>
      <style:map style:condition="value()=0" style:apply-style-name="N147P2"/>
    </number:text-style>
    <number:time-style style:name="N148">
      <number:minutes number:style="long"/>
      <number:text>:</number:text>
      <number:seconds number:style="long"/>
    </number:time-style>
    <number:time-style style:name="N149" number:truncate-on-overflow="false">
      <number:hours/>
      <number:text>:</number:text>
      <number:minutes number:style="long"/>
      <number:text>:</number:text>
      <number:seconds number:style="long"/>
    </number:time-style>
    <number:time-style style:name="N150">
      <number:minutes number:style="long"/>
      <number:text>:</number:text>
      <number:seconds number:style="long" number:decimal-places="1"/>
    </number:time-style>
    <number:number-style style:name="N151">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yperlink_20_1" style:display-name="Hyperlink 1"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563c1"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loext:char-complex-color loext:theme-type="hyperlink" loext:color-type="theme"/>
      </style:text-properties>
    </style:style>
    <draw:marker draw:name="Arrowheads_20_1" draw:display-name="Arrowheads 1" svg:viewBox="0 0 20 30" svg:d="M10 0l-10 30h20z"/>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5in" fo:margin-bottom="0.3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45in" fo:margin-left="0in" fo:margin-right="0in" fo:margin-top="0.2972in"/>
      </style:footer-style>
    </style:page-layout>
    <style:style style:name="MT1" style:family="text">
      <style:text-properties fo:color="#000000" loext:opacity="100%" style:text-outline="false" style:text-line-through-style="none" style:text-line-through-type="none" style:text-position="0% 100%" style:font-name="Calibri2"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MT2" style:family="text">
      <style:text-properties fo:color="#000000" loext:opacity="100%" style:text-outline="false" style:text-line-through-style="none" style:text-line-through-type="none" style:text-position="0% 100%" style:font-name="Calibri2" fo:font-size="1pt" fo:font-style="normal" fo:text-shadow="none" style:text-underline-style="none" fo:font-weight="normal" style:font-size-asian="1pt" style:font-style-asian="normal" style:font-weight-asian="normal" style:font-size-complex="1pt" style:font-style-complex="normal" style:font-weight-complex="normal"/>
    </style:style>
    <style:style style:name="MT3" style:family="text">
      <style:text-properties fo:color="#000000" loext:opacity="100%" style:text-outline="false" style:text-line-through-style="none" style:text-line-through-type="none" style:text-position="0% 100%" style:font-name="Aptos" fo:font-size="8pt" fo:font-style="normal" fo:text-shadow="none" style:text-underline-style="none" fo:font-weight="normal" style:font-size-asian="8pt" style:font-style-asian="normal" style:font-weight-asian="normal" style:font-size-complex="8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6-18">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Projets_20_" style:display-name="PageStyle_Projets " style:page-layout-name="Mpm3">
      <style:header style:display="false"/>
      <style:header-left style:display="false"/>
      <style:header-first style:display="false"/>
      <style:footer>
        <style:region-left>
          <text:p><text:span text:style-name="MT1">_x005F_x000D_</text:span><text:span text:style-name="MT2">#</text:span><text:span text:style-name="MT3"> C2 - Interne uniquement - ©SKINsoft</text:span></text:p>
        </style:region-left>
      </style:footer>
      <style:footer-left style:display="false"/>
      <style:footer-first style:display="false"/>
    </style:master-page>
    <style:master-page style:name="PageStyle_5f_Articles_20_de_20_recherche" style:display-name="PageStyle_Articles de recherche" style:page-layout-name="Mpm3">
      <style:header style:display="false"/>
      <style:header-left style:display="false"/>
      <style:header-first style:display="false"/>
      <style:footer>
        <style:region-left>
          <text:p><text:span text:style-name="MT1">_x005F_x000D_</text:span><text:span text:style-name="MT2">#</text:span><text:span text:style-name="MT3"> C2 - Interne uniquement - ©SKINsoft</text:span></text:p>
        </style:region-left>
      </style:footer>
      <style:footer-left style:display="false"/>
      <style:footer-first style:display="false"/>
    </style:master-page>
    <style:master-page style:name="PageStyle_5f_NLP" style:display-name="PageStyle_NLP" style:page-layout-name="Mpm3">
      <style:header style:display="false"/>
      <style:header-left style:display="false"/>
      <style:header-first style:display="false"/>
      <style:footer>
        <style:region-left>
          <text:p><text:span text:style-name="MT1">_x005F_x000D_</text:span><text:span text:style-name="MT2">#</text:span><text:span text:style-name="MT3"> C2 - Interne uniquement - ©SKINsoft</text:span></text:p>
        </style:region-left>
      </style:footer>
      <style:footer-left style:display="false"/>
      <style:footer-first style:display="false"/>
    </style:master-page>
    <style:master-page style:name="PageStyle_5f_articles_5f_lecture" style:display-name="PageStyle_articles_lecture" style:page-layout-name="Mpm3">
      <style:header style:display="false"/>
      <style:header-left style:display="false"/>
      <style:header-first style:display="false"/>
      <style:footer>
        <style:region-left>
          <text:p><text:span text:style-name="MT1">_x005F_x000D_</text:span><text:span text:style-name="MT2">#</text:span><text:span text:style-name="MT3"> C2 - Interne uniquement - ©SKINsoft</text:span></text:p>
        </style:region-left>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06T08:57:52</meta:creation-date>
    <dc:language>en-US</dc:language>
    <dc:date>2026-06-18T07:22:41.372838769</dc:date>
    <meta:editing-cycles>6</meta:editing-cycles>
    <meta:editing-duration>P4DT46M25S</meta:editing-duration>
    <meta:generator>LibreOffice/24.2.7.2$Linux_X86_64 LibreOffice_project/420$Build-2</meta:generator>
    <meta:document-statistic meta:table-count="4" meta:cell-count="1861" meta:object-count="0"/>
    <meta:user-defined meta:name="AppVersion">15.0000</meta:user-defined>
    <meta:user-defined meta:name="ContentTypeId">0x01010027F978398CE11B4B82B846683B37D1F4</meta:user-defined>
    <meta:user-defined meta:name="MSIP_Label_d46567e7-166b-4744-b80e-3f320535890a_ActionId">068132fe-9bdb-42fd-aa0e-ff243dc23136</meta:user-defined>
    <meta:user-defined meta:name="MSIP_Label_d46567e7-166b-4744-b80e-3f320535890a_ContentBits">2</meta:user-defined>
    <meta:user-defined meta:name="MSIP_Label_d46567e7-166b-4744-b80e-3f320535890a_Enabled" meta:value-type="string">true</meta:user-defined>
    <meta:user-defined meta:name="MSIP_Label_d46567e7-166b-4744-b80e-3f320535890a_Method" meta:value-type="string">Privileged</meta:user-defined>
    <meta:user-defined meta:name="MSIP_Label_d46567e7-166b-4744-b80e-3f320535890a_Name" meta:value-type="string">C2</meta:user-defined>
    <meta:user-defined meta:name="MSIP_Label_d46567e7-166b-4744-b80e-3f320535890a_SetDate" meta:value-type="string">2026-05-06T09:09:21Z</meta:user-defined>
    <meta:user-defined meta:name="MSIP_Label_d46567e7-166b-4744-b80e-3f320535890a_SiteId" meta:value-type="string">a6d5a5dc-4238-44bc-960a-b6120f0138c8</meta:user-defined>
    <meta:user-defined meta:name="MSIP_Label_d46567e7-166b-4744-b80e-3f320535890a_Tag" meta:value-type="string">10, 0, 1, 2</meta:user-defined>
    <meta:user-defined meta:name="MediaServiceImageTags" meta:value-type="string"/>
  </office:meta>
</office:document-meta>
</file>